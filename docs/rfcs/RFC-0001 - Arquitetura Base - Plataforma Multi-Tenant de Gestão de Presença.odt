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d7f77"/>
    </style:style>
    <style:style style:name="P2" style:family="paragraph" style:parent-style-name="Heading_20_3">
      <style:text-properties officeooo:paragraph-rsid="00240ea0"/>
    </style:style>
    <style:style style:name="P3" style:family="paragraph" style:parent-style-name="Horizontal_20_Line">
      <style:text-properties style:use-window-font-color="true" loext:opacity="0%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style:use-window-font-color="true" loext:opacity="0%" fo:letter-spacing="normal" officeooo:paragraph-rsid="002154d1" loext:padding-left="0.049cm" loext:padding-right="0cm" loext:padding-top="0cm" loext:padding-bottom="0cm" loext:border-left="0.06pt solid #37383b" loext:border-right="none" loext:border-top="none" loext:border-bottom="none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06pt solid #37383b" fo:border-right="none" fo:border-top="none" fo:border-bottom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06pt solid #37383b" fo:border-right="none" fo:border-top="none" fo:border-bottom="none"/>
      <style:text-properties fo:font-variant="normal" fo:text-transform="none" style:use-window-font-color="true" loext:opacity="0%" style:font-name="Google Sans Text" fo:font-size="10.5pt" fo:letter-spacing="normal" fo:font-style="normal" fo:font-weight="normal"/>
    </style:style>
    <style:style style:name="P16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style:use-window-font-color="true" loext:opacity="0%" style:font-name="Google Sans Text" fo:font-size="10.5pt" fo:letter-spacing="normal" fo:font-style="normal" fo:font-weight="normal"/>
    </style:style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style:use-window-font-color="true" loext:opacity="0%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Google Sans Code" fo:font-weight="bold"/>
    </style:style>
    <style:style style:name="T3" style:family="text">
      <style:text-properties style:font-name="Google Sans Code" fo:font-size="14pt" fo:font-weight="bold" style:font-size-asian="14pt" style:font-size-complex="14pt"/>
    </style:style>
    <style:style style:name="T4" style:family="text">
      <style:text-properties fo:font-variant="normal" fo:text-transform="none" style:font-name="Google Sans Code" fo:font-size="10.5pt" fo:letter-spacing="normal" fo:font-style="normal" fo:font-weight="bold"/>
    </style:style>
    <style:style style:name="T5" style:family="text">
      <style:text-properties fo:font-variant="normal" fo:text-transform="none" style:font-name="Google Sans Text" fo:font-size="10.5pt" fo:letter-spacing="normal" fo:font-style="normal" fo:font-weight="normal"/>
    </style:style>
    <style:style style:name="T6" style:family="text">
      <style:text-properties fo:font-variant="normal" fo:text-transform="none" style:font-name="Google Sans Text" fo:font-size="10.5pt" fo:letter-spacing="normal" fo:font-style="normal" fo:font-weight="bold"/>
    </style:style>
    <style:style style:name="T7" style:family="text">
      <style:text-properties fo:font-variant="normal" fo:text-transform="none" style:use-window-font-color="true" loext:opacity="0%" style:font-name="Google Sans Code" fo:font-size="10.5pt" fo:letter-spacing="normal" fo:font-style="normal" fo:font-weight="bold"/>
    </style:style>
    <style:style style:name="T8" style:family="text">
      <style:text-properties fo:font-variant="normal" fo:text-transform="none" style:use-window-font-color="true" loext:opacity="0%" style:font-name="Google Sans Code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style:font-name="Google Sans Text" fo:font-size="10.5pt" fo:letter-spacing="normal" fo:font-style="normal" fo:font-weight="normal"/>
    </style:style>
    <style:style style:name="T10" style:family="text">
      <style:text-properties fo:font-variant="normal" fo:text-transform="none" style:use-window-font-color="true" loext:opacity="0%" style:font-name="Google Sans Text" fo:font-size="10.5pt" fo:letter-spacing="normal" fo:font-style="normal" fo:font-weight="bold"/>
    </style:style>
    <style:style style:name="T11" style:family="text">
      <style:text-properties fo:font-variant="normal" fo:text-transform="none" style:use-window-font-color="true" loext:opacity="0%" style:font-name="Google Sans Text" fo:font-size="12pt" fo:letter-spacing="normal" fo:font-style="normal" fo:font-weight="normal"/>
    </style:style>
    <style:style style:name="T12" style:family="text">
      <style:text-properties fo:font-variant="normal" fo:text-transform="none" style:use-window-font-color="true" loext:opacity="0%" fo:letter-spacing="normal"/>
    </style:style>
    <style:style style:name="T1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style:font-size-asian="12pt" style:font-size-complex="12pt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Liberation Serif" fo:font-size="14pt" fo:font-weight="bold" style:font-name-asian="Noto Serif CJK SC" style:font-size-asian="14pt" style:font-weight-asian="bold" style:font-name-complex="Noto Sans Devanagari1" style:font-size-complex="14pt" style:font-weight-complex="bold"/>
    </style:style>
    <style:style style:name="T17" style:family="text">
      <style:text-properties style:use-window-font-color="true" loext:opacity="0%" style:font-name="Liberation Serif" fo:font-size="12pt" fo:letter-spacing="normal" fo:font-style="italic" fo:font-weight="normal" style:font-size-asian="12pt" style:font-size-complex="12pt"/>
    </style:style>
    <style:style style:name="T18" style:family="text">
      <style:text-properties fo:font-size="14pt" fo:font-weight="bold" style:font-size-asian="14pt" style:font-size-complex="14pt"/>
    </style:style>
    <style:style style:name="T19" style:family="text">
      <style:text-properties officeooo:rsid="002154d1"/>
    </style:style>
    <style:style style:name="T20" style:family="text">
      <style:text-properties officeooo:rsid="00228a16"/>
    </style:style>
    <style:style style:name="T21" style:family="text">
      <style:text-properties officeooo:rsid="0025ddc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1</text:h>
      <text:h text:style-name="Heading_20_1" text:outline-level="1">Arquitetura Base — Plataforma Multi-Tenant de Gestão de Presença</text:h>
      <text:p text:style-name="P1"><text:span text:style-name="Strong_20_Emphasis">Status:</text:span> Aprovado e Atualizado (v1.2) </text:p>
      <text:p text:style-name="P1"><text:span text:style-name="Strong_20_Emphasis">Autor:</text:span> Equipe de Arquitetura </text:p>
      <text:p text:style-name="P1"><text:span text:style-name="Strong_20_Emphasis">Data:</text:span> 07/05/2026 </text:p>
      <text:p text:style-name="P1"><text:span text:style-name="Strong_20_Emphasis">Escopo:</text:span> Fundação arquitetural e decisões estruturais do MVP</text:p>
      <text:p text:style-name="Horizontal_20_Line"/>
      <text:h text:style-name="Heading_20_2" text:outline-level="2">1. Contexto</text:h>
      <text:p text:style-name="Text_20_body">Este RFC define a fundação arquitetural da plataforma de gestão de presença multi-tenant com validação geográfica e biométrica de grau governamental.</text:p>
      <text:p text:style-name="Text_20_body">O sistema baseia-se no princípio de <text:span text:style-name="Emphasis">Zero Trust</text:span> (Confiança Zero) e na rigorosa separação de domínios de falha. A delegação da autenticação para o Keycloak opera em conjunto com o backend (Spring Boot), estabelecendo que o IAM atua exclusivamente na autenticação da credencial, enquanto o backend assume o papel de resolução da identidade canônica (a pessoa física real) e aplicação de regras de negócio.</text:p>
      <text:p text:style-name="Text_20_body"><text:span text:style-name="Strong_20_Emphasis">Foco desta fase:</text:span> Arquitetura estrutural correta, evolutiva, resiliente a falhas do IdP e estritamente aderente à LGPD.</text:p>
      <text:p text:style-name="Horizontal_20_Line"/>
      <text:h text:style-name="Heading_20_2" text:outline-level="2">2. Objetivos</text:h>
      <text:list text:style-name="L1">
        <text:list-item>
          <text:p text:style-name="P7">Definir arquitetura técnica do MVP. </text:p>
        </text:list-item>
        <text:list-item>
          <text:p text:style-name="P7">Garantir base multi-tenant segura com isolamento de schemas. </text:p>
        </text:list-item>
        <text:list-item>
          <text:p text:style-name="P7">Estabelecer separação irrefutável entre a identidade técnica (IAM) e a identidade canônica (Domínio local). </text:p>
        </text:list-item>
        <text:list-item>
          <text:p text:style-name="P7">Preparar infraestrutura antifraude com Validação 2x2 para mitigação de sequestro de CPF (<text:span text:style-name="Emphasis">Cross-IdP Impersonation</text:span>). </text:p>
        </text:list-item>
        <text:list-item>
          <text:p text:style-name="P7">Implementar onboarding obrigatório <text:span text:style-name="Emphasis">durante</text:span> o fluxo de login via Custom SPIs. </text:p>
        </text:list-item>
        <text:list-item>
          <text:p text:style-name="P6">Operar exclusivamente com tecnologias open source e integrações de fé pública. </text:p>
        </text:list-item>
      </text:list>
      <text:p text:style-name="Horizontal_20_Line"/>
      <text:h text:style-name="Heading_20_2" text:outline-level="2">3. Requisitos Funcionais do MVP</text:h>
      <text:p text:style-name="Text_20_body">O MVP deve permitir:</text:p>
      <text:list text:style-name="L2">
        <text:list-item>
          <text:p text:style-name="P9">Autenticação OIDC/OAuth2 via Keycloak. </text:p>
        </text:list-item>
        <text:list-item>
          <text:p text:style-name="P9"><text:soft-page-break/>Criação de entidade organizacional. </text:p>
        </text:list-item>
        <text:list-item>
          <text:p text:style-name="P9">Preenchimento de perfil obrigatório integrado ao fluxo de login. </text:p>
        </text:list-item>
        <text:list-item>
          <text:p text:style-name="P9">Associação de usuários via código de convite ou bootstrap via LDAP. </text:p>
        </text:list-item>
        <text:list-item>
          <text:p text:style-name="P9">Registro de presença (evento bruto imutável). </text:p>
        </text:list-item>
        <text:list-item>
          <text:p text:style-name="P8">Captura efêmera de biometria facial para prova de vida e geolocalização. </text:p>
        </text:list-item>
      </text:list>
      <text:p text:style-name="Horizontal_20_Line"/>
      <text:h text:style-name="Heading_20_2" text:outline-level="2">4. Requisitos Não Funcionais</text:h>
      <text:list text:style-name="L3">
        <text:list-item>
          <text:p text:style-name="P11">Multi-tenancy com isolamento lógico via schemas funcionais (pessoa, seguranca e folha_ponto). </text:p>
        </text:list-item>
        <text:list-item>
          <text:p text:style-name="P11">Resiliência estrutural a <text:span text:style-name="Emphasis">reset</text:span> de banco de dados do IAM (Zero Data Loss). </text:p>
        </text:list-item>
        <text:list-item>
          <text:p text:style-name="P11">Retenção temporária da mídia fonte biométrica em storage isolado (S3) com expurgo automatizado via agendamento (Cron). </text:p>
        </text:list-item>
        <text:list-item>
          <text:p text:style-name="P11">Auditoria rastreável (Envers / Triggers). </text:p>
        </text:list-item>
        <text:list-item>
          <text:p text:style-name="P11">Execução via contêineres Docker. </text:p>
        </text:list-item>
        <text:list-item>
          <text:p text:style-name="P10">Arquitetura evolutiva (monolito modular). </text:p>
        </text:list-item>
      </text:list>
      <text:p text:style-name="Horizontal_20_Line"/>
      <text:h text:style-name="Heading_20_2" text:outline-level="2">5. Modelo Conceitual de Domínio</text:h>
      <text:p text:style-name="Text_20_body">As entidades físicas que suportam o domínio foram estruturadas com base na flexibilização de chaves primárias: <text:span text:style-name="Strong_20_Emphasis">UUIDs</text:span> para o domínio isolado multi-tenant e <text:span text:style-name="Strong_20_Emphasis">Inteiros Sequenciais (</text:span><text:span text:style-name="Strong_20_Emphasis"><text:span text:style-name="Source_20_Text">int8</text:span></text:span><text:span text:style-name="Strong_20_Emphasis">)</text:span> para domínios globais.</text:p>
      <text:h text:style-name="Heading_20_3" text:outline-level="3">5.1 Identidade Canônica Global (Schema <text:span text:style-name="Source_20_Text">pessoa</text:span>)</text:h>
      <text:p text:style-name="Text_20_body">A arquitetura estabelece três camadas rigorosas de abstração de identidade para suportar falhas do Keycloak e múltiplos logins da mesma pessoa:</text:p>
      <text:list text:style-name="L4">
        <text:list-item>
          <text:p text:style-name="P13"><text:span text:style-name="Strong_20_Emphasis"><text:span text:style-name="Source_20_Text">pessoa.pessoa</text:span></text:span><text:span text:style-name="Strong_20_Emphasis"> (PK: int8)</text:span>: Tabela raiz que concentra a entidade biológica ou estrutural. </text:p>
        </text:list-item>
        <text:list-item>
          <text:p text:style-name="P13"><text:span text:style-name="Strong_20_Emphasis"><text:span text:style-name="Source_20_Text">pessoa.pessoa_fisica</text:span></text:span><text:span text:style-name="Strong_20_Emphasis"> (PK: int8)</text:span>: Ramificação ancorada no <text:span text:style-name="Strong_20_Emphasis">CPF</text:span> (chave canônica inegociável e imutável). </text:p>
        </text:list-item>
        <text:list-item>
          <text:p text:style-name="P12"><text:span text:style-name="Strong_20_Emphasis"><text:span text:style-name="Source_20_Text"><text:span text:style-name="T21">seguranca</text:span></text:span></text:span><text:span text:style-name="Strong_20_Emphasis"><text:span text:style-name="Source_20_Text">.identidade_acesso</text:span></text:span><text:span text:style-name="Strong_20_Emphasis"> (PK: int8)</text:span>: Tabela associativa 1:N vital que vincula a <text:span text:style-name="Source_20_Text">pessoa</text:span> aos múltiplos identificadores técnicos efêmeros (<text:span text:style-name="Source_20_Text">keycloak_sub</text:span>) e <text:span text:style-name="Source_20_Text">provedor</text:span>. É esta tabela que garante o princípio de <text:span text:style-name="Strong_20_Emphasis">Zero Data Loss</text:span>, permitindo a recuperação integral do histórico da pessoa caso <text:span text:style-name="T15">o banco do Keycloak seja corrompido ou resetado. </text:span></text:p>
        </text:list-item>
      </text:list>
      <text:p text:style-name="P4"><text:span text:style-name="T18">5.2 IAM e Controle de Acesso (Schema </text:span><text:span text:style-name="T3">seguranca</text:span><text:span text:style-name="T18">) - Resiliência a Desastres</text:span></text:p>
      <text:p text:style-name="P4"><text:span text:style-name="T19">A</text:span>tua como a ponte entre o Provedor de Identidade externo e as lógicas internas. Garante o princípio de <text:span text:style-name="T1">Zero Data Loss</text:span>:</text:p>
      <text:list text:style-name="L5">
        <text:list-item>
          <text:p text:style-name="P14"><text:span text:style-name="T7">seguranca.identidade_acesso</text:span><text:span text:style-name="T9"> </text:span><text:span text:style-name="T10">(PK: int8):</text:span><text:span text:style-name="T9"> Tabela associativa 1:N vital que vincula o CPF da </text:span><text:span text:style-name="Source_20_Text"><text:span text:style-name="T7">pessoa</text:span></text:span><text:span text:style-name="T9"> aos múltiplos identificadores técnicos efêmeros (</text:span><text:span text:style-name="Source_20_Text"><text:span text:style-name="T7">keycloak_sub</text:span></text:span><text:span text:style-name="T9">) e </text:span><text:span text:style-name="Source_20_Text"><text:span text:style-name="T7">provedor</text:span></text:span><text:span text:style-name="T9">.</text:span></text:p>
        </text:list-item>
        <text:list-item>
          <text:p text:style-name="P15"><text:span text:style-name="T2">seguranca.perfil_biometrico</text:span> <text:span text:style-name="T1">(PK: uuid):</text:span> Mantém o Hash Biométrico vetorial do usuário.</text:p>
        </text:list-item>
        <text:list-item>
          <text:p text:style-name="P15"><text:soft-page-break/><text:span text:style-name="T2">seguranca.dispositivo</text:span> <text:span text:style-name="T1">(PK: uuid):</text:span> Cadastro de hardwares (devices) confiáveis.</text:p>
        </text:list-item>
        <text:list-item>
          <text:p text:style-name="P15"><text:span text:style-name="T2">seguranca.log_auditoria</text:span> <text:span text:style-name="T1">(PK: uuid):</text:span> Trilha centralizada de eventos e rejeições críticas de segurança.</text:p>
        </text:list-item>
      </text:list>
      <text:p text:style-name="P5"/>
      <text:h text:style-name="Heading_20_3" text:outline-level="3">5.<text:span text:style-name="T20">3</text:span> Gestão Multi-Tenant e Negócio (Schema <text:span text:style-name="Source_20_Text">folha_ponto</text:span>)</text:h>
      <text:list text:style-name="L6">
        <text:list-item>
          <text:p text:style-name="P17"><text:span text:style-name="Source_20_Text">folha_ponto.organizacao</text:span><text:span text:style-name="Strong_20_Emphasis"> (PK: uuid)</text:span>: Representa o locatário (tenant) ou órgão público. </text:p>
        </text:list-item>
        <text:list-item>
          <text:p text:style-name="P17"><text:span text:style-name="Source_20_Text">folha_ponto.unidade</text:span><text:span text:style-name="Strong_20_Emphasis"> (PK: uuid)</text:span>: Delimita os locais físicos (geofence) da organização. </text:p>
        </text:list-item>
        <text:list-item>
          <text:p text:style-name="P17"><text:span text:style-name="Source_20_Text">folha_ponto.vinculo_usuario</text:span><text:span text:style-name="Strong_20_Emphasis"> (PK: uuid)</text:span>: Relaciona a conta técnica autenticada ao papel (Role) dentro de uma organização específica. </text:p>
        </text:list-item>
        <text:list-item>
          <text:p text:style-name="P17"><text:span text:style-name="Source_20_Text">folha_ponto.registro_presenca</text:span><text:span text:style-name="Strong_20_Emphasis"> (PK: uuid)</text:span>: Concentra os eventos brutos, coordenadas de GPS e links para os templates biométricos. </text:p>
        </text:list-item>
      </text:list>
      <text:p text:style-name="Horizontal_20_Line"/>
      <text:h text:style-name="Heading_20_2" text:outline-level="2">6. Bounded Contexts Propostos</text:h>
      <text:p text:style-name="Text_20_body">A arquitetura estabelece a divisão estrita de responsabilidades:</text:p>
      <text:list text:style-name="L7">
        <text:list-item>
          <text:p text:style-name="P19"><text:span text:style-name="Strong_20_Emphasis">Identidade</text:span><text:span text:style-name="Strong_20_Emphasis"><text:span text:style-name="T15"> Técnica (Keycloak):</text:span></text:span><text:span text:style-name="T15"> Valida a posse da credencial técnica e emite um token efêmero. </text:span></text:p>
        </text:list-item>
        <text:list-item>
          <text:p text:style-name="P19"><text:span text:style-name="T10">Controle e Identidade de Segurança (Schema </text:span><text:span text:style-name="T7">seguranca</text:span><text:span text:style-name="T10">):</text:span><text:span text:style-name="T9"> Resolve a pessoa real através do cruzamento do </text:span><text:span text:style-name="Source_20_Text"><text:span text:style-name="T7">sub</text:span></text:span><text:span text:style-name="T9"> com o CPF na tabela </text:span><text:span text:style-name="Source_20_Text"><text:span text:style-name="T7">identidade_acesso</text:span></text:span><text:span text:style-name="T9"> e orquestra biometrias e permissões avançadas.</text:span></text:p>
        </text:list-item>
        <text:list-item>
          <text:p text:style-name="P20"><text:span text:style-name="T6">Pessoa Canônica (Schema </text:span><text:span text:style-name="T4">pessoa</text:span><text:span text:style-name="T6">):</text:span><text:span text:style-name="T5"> A abstração final da biologia, endereços e parentescos.</text:span></text:p>
        </text:list-item>
        <text:list-item>
          <text:p text:style-name="P16"><text:span text:style-name="T1">Organization Management &amp; Attendance (Schema </text:span><text:span text:style-name="T2">folha_ponto</text:span><text:span text:style-name="T1">):</text:span> Gestão do tenant, controle de acesso dinâmico de negócio e captura de eventos de presença.</text:p>
        </text:list-item>
        <text:list-item>
          <text:p text:style-name="P18"><text:span text:style-name="Strong_20_Emphasis"><text:span text:style-name="T15">Attendance Capture &amp; Biom</text:span></text:span><text:span text:style-name="Strong_20_Emphasis">etric Validation:</text:span> Processamento do evento bruto de presença. </text:p>
        </text:list-item>
      </text:list>
      <text:p text:style-name="Horizontal_20_Line"/>
      <text:h text:style-name="Heading_20_2" text:outline-level="2">7. Estratégia de Multi-Tenancy (Schema Funcional)</text:h>
      <text:list text:style-name="L8">
        <text:list-item>
          <text:p text:style-name="P22"><text:span text:style-name="Strong_20_Emphasis">Banco</text:span><text:span text:style-name="Strong_20_Emphasis"><text:span text:style-name="T15"> de dados único.</text:span></text:span><text:span text:style-name="T15"> </text:span></text:p>
        </text:list-item>
        <text:list-item>
          <text:p text:style-name="P22"><text:span text:style-name="T11">Múltiplos Schemas Funcionais:</text:span><text:span text:style-name="T12"> </text:span><text:span text:style-name="T11">Separação tríplice entre </text:span><text:span text:style-name="Source_20_Text"><text:span text:style-name="T8">pessoa</text:span></text:span><text:span text:style-name="T11">, </text:span><text:span text:style-name="Source_20_Text"><text:span text:style-name="T8">seguranca</text:span></text:span><text:span text:style-name="T12"> </text:span><text:span text:style-name="T11">e o domínio multi-tenant </text:span><text:span text:style-name="Source_20_Text"><text:span text:style-name="T8">folha_ponto</text:span></text:span></text:p>
        </text:list-item>
        <text:list-item>
          <text:p text:style-name="P21"><text:span text:style-name="T15">Isolamento </text:span>lógico em tabelas de negócio através do pilar <text:span text:style-name="Source_20_Text">organizacao_id</text:span>. </text:p>
        </text:list-item>
      </text:list>
      <text:p text:style-name="Horizontal_20_Line"/>
      <text:h text:style-name="Heading_20_2" text:outline-level="2"><text:soft-page-break/>8. Estratégia de IAM (Keycloak) e Lightweight Tokens</text:h>
      <text:h text:style-name="Heading_20_3" text:outline-level="3">8.1 Integração com AD/LDAP (Bootstrap Stateless)</text:h>
      <text:list text:style-name="L9">
        <text:list-item>
          <text:p text:style-name="P24">O parâmetro <text:span text:style-name="Source_20_Text">Import Users</text:span> ficará em <text:span text:style-name="Source_20_Text">Off</text:span>. O LDAP atua como autenticador em tempo real (cortando acesso imediato caso o servidor saia do órgão). </text:p>
        </text:list-item>
        <text:list-item>
          <text:p text:style-name="P23">O AD servirá para o preenchimento automático (<text:span text:style-name="Emphasis">Bootstrap</text:span>) das tabelas de <text:span text:style-name="Source_20_Text">unidade</text:span> e <text:span text:style-name="Source_20_Text">vinculo_usuario</text:span>. Modificações subsequentes na estrutura de setores ocorrem no banco PostgreSQL. </text:p>
        </text:list-item>
      </text:list>
      <text:h text:style-name="Heading_20_3" text:outline-level="3">8.2 Claims OIDC e Lightweight Tokens</text:h>
      <text:p text:style-name="Text_20_body">A arquitetura proíbe expressamente o transporte de PII (CPF, Endereços) e Biometria dentro do Access Token. O token deve ser utilitário (<text:span text:style-name="Emphasis">Lightweight Token</text:span>), contendo apenas:</text:p>
      <text:list text:style-name="L10">
        <text:list-item>
          <text:p text:style-name="P26"><text:span text:style-name="Source_20_Text">sub</text:span> (Identificador técnico imutável). </text:p>
        </text:list-item>
        <text:list-item>
          <text:p text:style-name="P26"><text:span text:style-name="Source_20_Text">email</text:span> e <text:span text:style-name="Source_20_Text">preferred_username</text:span>. </text:p>
        </text:list-item>
        <text:list-item>
          <text:p text:style-name="P25"><text:span text:style-name="Strong_20_Emphasis"><text:span text:style-name="Source_20_Text">profile_complete</text:span></text:span><text:span text:style-name="Strong_20_Emphasis"> (Flag Booleana Customizada):</text:span> Claim injetada via Mapper no Keycloak para agilizar o roteamento no SPA React, sinalizando se o usuário já ultrapassou o fluxo de completude obrigatório. </text:p>
        </text:list-item>
      </text:list>
      <text:p text:style-name="Horizontal_20_Line"/>
      <text:h text:style-name="Heading_20_2" text:outline-level="2">9. Biometria e Antifraude (Validação 2x2 e Descarte de Mídia)</text:h>
      <text:h text:style-name="Heading_20_3" text:outline-level="3">9.1 Mitigação de Sequestro de Identidade (Validação 2x2)</text:h>
      <text:p text:style-name="Text_20_body">Para impedir o <text:span text:style-name="Emphasis">Cross-IdP Impersonation</text:span> (um invasor usar um login social novo e amarrar ao CPF de terceiros), a criação do vínculo inicial na tabela <text:span text:style-name="Source_20_Text">identidade_acesso</text:span> exige um <text:span text:style-name="Strong_20_Emphasis">Protocolo de Validação 2x2</text:span>. A face em tempo real e o CPF informados no Frontend devem ser orquestrados pelo Spring Boot contra uma entidade de fé pública (ex: Serpro/Datavalid) simultaneamente (Biográfica + Biométrica). Somente após aprovação governamental o <text:span text:style-name="Source_20_Text">sub</text:span> do Keycloak é atrelado ao CPF no banco de dados. O motor Python interno será utilizado para a validação cotidiana da folha de ponto.</text:p>
      <text:h text:style-name="P2" text:outline-level="3"><text:span text:style-name="T16">9.2 Ciclo de Vida e Expurgo da Mídia Fonte (Compliance LGPD)</text:span><text:span text:style-name="T12"> </text:span></text:h>
      <text:h text:style-name="P2" text:outline-level="3"><text:span text:style-name="T13">Diferente de sistemas não regulados, a retenção de mídias fotográficas rasterizadas (</text:span><text:span text:style-name="Source_20_Text"><text:span text:style-name="T13">.JPG</text:span></text:span><text:span text:style-name="T13">/</text:span><text:span text:style-name="Source_20_Text"><text:span text:style-name="T13">.PNG</text:span></text:span><text:span text:style-name="T13">) brutas da face gera um imenso passivo perante a LGPD.</text:span><text:span text:style-name="T14"> </text:span><text:span text:style-name="T13">A "selfie" capturada na autenticação ou no ponto diário será transmitida para uma área de armazenamento de ativos (</text:span><text:span text:style-name="T17">Object Storage</text:span><text:span text:style-name="T14"> </text:span><text:span text:style-name="T13">isolado via SeaweedFS/S3) atuando como uma Quarentena Visual para Sindicâncias e Auditorias de Curto Prazo.</text:span><text:span text:style-name="T14"> </text:span><text:span text:style-name="T13">O sistema extrairá o Hash Biométrico</text:span><text:span text:style-name="T14"> </text:span><text:span text:style-name="T13">(template matemático/vetorial) armazenando-o permanentemente no banco de dados estruturado. A imagem original no S3 possuirá um ciclo de vida estrito e temporário, sendo objeto de expurgo automatizado (hard delete)</text:span><text:span text:style-name="T14"> </text:span><text:span text:style-name="T13">pelo Spring Boot (via CRON job agendado) tão logo o prazo político de auditoria retenção expire, garantindo a conformidade regulatória.</text:span></text:h>
      <text:p text:style-name="P3"/>
      <text:h text:style-name="Heading_20_2" text:outline-level="2"><text:soft-page-break/>10. Fluxo Orquestrado de Login (Custom SPI e Action Tokens)</text:h>
      <text:p text:style-name="Text_20_body">A completude de perfil (Foto, CPF, GPS) <text:span text:style-name="Strong_20_Emphasis">não pode ser relegada a uma tela após a emissão do token final</text:span>. Ela deve ser imposta dentro do <text:span text:style-name="Emphasis">pipeline</text:span> de autenticação:</text:p>
      <text:list text:style-name="L11">
        <text:list-item>
          <text:p text:style-name="P28"><text:span text:style-name="Strong_20_Emphasis">Acesso:</text:span> O usuário tenta acessar a aplicação React e é redirecionado ao Keycloak. </text:p>
        </text:list-item>
        <text:list-item>
          <text:p text:style-name="P28"><text:span text:style-name="Strong_20_Emphasis">Autenticação:</text:span> O usuário fornece a credencial (LDAP/Google) e o Keycloak valida matematicamente a senha. </text:p>
        </text:list-item>
        <text:list-item>
          <text:p text:style-name="P28"><text:span text:style-name="Strong_20_Emphasis">Interceptação (Custom Authenticator SPI):</text:span> Um plugin customizado no Keycloak pausa o login e faz uma requisição (M2M) ao Backend Spring Boot, consultando se aquele <text:span text:style-name="Source_20_Text">sub</text:span> possui o CPF e atributos básicos preenchidos. </text:p>
        </text:list-item>
        <text:list-item>
          <text:p text:style-name="P28"><text:span text:style-name="Strong_20_Emphasis">Onboarding Obrigatório:</text:span> Se o backend responder que está incompleto, o SPI emite um <text:span text:style-name="Strong_20_Emphasis">Action Token</text:span> (JWT de curtíssima duração) e redireciona o usuário para uma rota pública do React. </text:p>
        </text:list-item>
        <text:list-item>
          <text:p text:style-name="P28"><text:span text:style-name="Strong_20_Emphasis">Captura no SPA:</text:span> O React captura via WebRTC a foto, o GPS e o CPF do usuário, submetendo tudo ao Spring Boot com o Action Token anexado. </text:p>
        </text:list-item>
        <text:list-item>
          <text:p text:style-name="P28"><text:span text:style-name="Strong_20_Emphasis">Validação e Persistência:</text:span> O Spring Boot executa a Validação 2x2 (Serpro), extrai o Hash Biométrico (descartando a imagem original da memória) e persiste a Identidade Canônica. </text:p>
        </text:list-item>
        <text:list-item>
          <text:p text:style-name="P27"><text:span text:style-name="Strong_20_Emphasis">Retomada da Sessão:</text:span> O React redireciona o usuário de volta ao endpoint do Action Token no Keycloak. Um <text:span text:style-name="Emphasis">ActionTokenHandler SPI</text:span> valida a conclusão da tarefa, retoma a sessão exata onde havia parado e gera o Access Token definitivo contendo a claim <text:span text:style-name="Source_20_Text">profile_complete = true</text:span>. </text:p>
        </text:list-item>
      </text:list>
      <text:p text:style-name="Horizontal_20_Line"/>
      <text:h text:style-name="Heading_20_2" text:outline-level="2">11. Auditoria e Rastreabilidade</text:h>
      <text:list text:style-name="L12">
        <text:list-item>
          <text:p text:style-name="P30"><text:span text:style-name="T9">Todas as recusas biométricas, vínculos criados na tabela </text:span><text:span text:style-name="Source_20_Text"><text:span text:style-name="T7">identidade_acesso</text:span></text:span><text:span text:style-name="T9"> e passagens de registro devem ser registradas com </text:span><text:span text:style-name="Source_20_Text"><text:span text:style-name="T7">IP Address</text:span></text:span><text:span text:style-name="T9"> e carimbo de tempo na tabela </text:span><text:span text:style-name="T7">seguranca.log_auditoria</text:span><text:span text:style-name="T9">.</text:span></text:p>
        </text:list-item>
        <text:list-item>
          <text:p text:style-name="P30"><text:span text:style-name="T15">Tabelas de histórico temporal utiliz</text:span>am mecanismo de snapshots de revisão (Envers). </text:p>
        </text:list-item>
        <text:list-item>
          <text:p text:style-name="P29"><text:span text:style-name="Strong_20_Emphasis">Regra de Ouro:</text:span> O evento bruto da tabela <text:span text:style-name="Source_20_Text">registro_presenca</text:span> é gerado sob Comando Único e jamais é apagado ou sobrescrito estruturalmente. </text:p>
        </text:list-item>
      </text:list>
      <text:p text:style-name="Horizontal_20_Line"/>
      <text:h text:style-name="Heading_20_2" text:outline-level="2">12. Conclusão Estratégica</text:h>
      <text:p text:style-name="Text_20_body">Este RFC estabelece um modelo de engenharia de segurança que transcende um simples registro de ponto, alcançando grau governamental. Ao implementar a Identidade Canônica Centralizada, o uso de Lightweight Tokens, o fluxo orquestrado via SPIs e a Validação Dupla de Fé Pública, a plataforma é blindada contra vazamentos, fraudes de representação facial e perdas catastróficas de dados provenientes do provedor de identidade técnico.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7:36:12.503746334</dc:date>
    <meta:editing-duration>PT1H10M36S</meta:editing-duration>
    <meta:editing-cycles>8</meta:editing-cycles>
    <meta:generator>LibreOffice/24.2.7.2$Linux_X86_64 LibreOffice_project/420$Build-2</meta:generator>
    <meta:print-date>2026-05-08T17:33:21.419556462</meta:print-date>
    <meta:printed-by>Arquivos PDF</meta:printed-by>
    <meta:document-statistic meta:table-count="0" meta:image-count="0" meta:object-count="0" meta:page-count="5" meta:paragraph-count="90" meta:word-count="1478" meta:character-count="9968" meta:non-whitespace-character-count="8584"/>
  </office:meta>
</office:document-meta>
</file>