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Liberation Serif" fo:font-size="12pt" style:font-size-asian="12pt" style:font-size-complex="12pt"/>
    </style:style>
    <style:style style:name="P2" style:family="paragraph" style:parent-style-name="Horizontal_20_Line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09da0c"/>
    </style:style>
    <style:style style:name="P4" style:family="paragraph" style:parent-style-name="Heading_20_2">
      <style:text-properties officeooo:paragraph-rsid="000c0e97"/>
    </style:style>
    <style:style style:name="P5" style:family="paragraph" style:parent-style-name="Heading_20_3">
      <style:text-properties officeooo:paragraph-rsid="000c0e97"/>
    </style:style>
    <style:style style:name="P6" style:family="paragraph" style:parent-style-name="Standard">
      <style:text-properties officeooo:paragraph-rsid="000c0e97"/>
    </style:style>
    <style:style style:name="P7" style:family="paragraph" style:parent-style-name="Standard">
      <style:paragraph-properties fo:text-align="start" style:justify-single-word="false" fo:text-indent="0cm" style:auto-text-indent="false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style:font-name="Monospace1" fo:font-size="10pt" style:font-size-asian="10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paragraph-rsid="000c0e97"/>
    </style:style>
    <style:style style:name="P20" style:family="paragraph" style:parent-style-name="Text_20_body" style:list-style-name="L6">
      <style:text-properties officeooo:paragraph-rsid="000c3d6b"/>
    </style:style>
    <style:style style:name="P21" style:family="paragraph" style:parent-style-name="Text_20_body">
      <style:text-properties officeooo:paragraph-rsid="000c0e97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font-name="Google Sans Text" fo:font-size="10.5pt" fo:letter-spacing="normal" fo:font-style="normal" fo:font-weight="bold"/>
    </style:style>
    <style:style style:name="T3" style:family="text"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style:font-name="Google Sans Code" fo:font-size="10.5pt" fo:letter-spacing="normal" fo:font-style="normal" fo:font-weight="bold"/>
    </style:style>
    <style:style style:name="T6" style:family="text">
      <style:text-properties fo:font-variant="normal" fo:text-transform="none" style:use-window-font-color="true" loext:opacity="0%" style:font-name="Google Sans Code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fo:font-size="10.5pt" fo:letter-spacing="normal" fo:font-style="normal" fo:font-weight="bold"/>
    </style:style>
    <style:style style:name="T8" style:family="text">
      <style:text-properties fo:font-variant="normal" fo:text-transform="none" style:use-window-font-color="true" loext:opacity="0%" fo:font-size="10.5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Liberation Serif" fo:font-size="10.5pt" fo:letter-spacing="normal" fo:font-style="normal" fo:font-weight="bold"/>
    </style:style>
    <style:style style:name="T10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style:font-name="Liberation Serif" fo:letter-spacing="normal"/>
    </style:style>
    <style:style style:name="T12" style:family="text">
      <style:text-properties fo:font-variant="normal" fo:text-transform="none" style:use-window-font-color="true" loext:opacity="0%" style:font-name="Liberation Serif" fo:letter-spacing="normal" fo:font-style="normal" fo:font-weight="bold"/>
    </style:style>
    <style:style style:name="T13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use-window-font-color="true" loext:opacity="0%" fo:letter-spacing="normal"/>
    </style:style>
    <style:style style:name="T20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21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bold"/>
    </style:style>
    <style:style style:name="T25" style:family="text"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T26" style:family="text"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T27" style:family="text">
      <style:text-properties fo:font-variant="normal" fo:text-transform="none" fo:color="#c7c7c7" loext:opacity="100%" style:font-name="Google Sans Text" fo:font-size="12pt" fo:letter-spacing="normal" fo:font-style="normal" fo:font-weight="normal"/>
    </style:style>
    <style:style style:name="T28" style:family="text">
      <style:text-properties fo:font-variant="normal" fo:text-transform="none" fo:color="#c7c7c7" loext:opacity="100%" style:font-name="Google Sans Code" fo:font-size="10.5pt" fo:letter-spacing="normal" fo:font-style="normal" fo:font-weight="bold"/>
    </style:style>
    <style:style style:name="T29" style:family="text">
      <style:text-properties fo:font-variant="normal" fo:text-transform="none" fo:color="#c7c7c7" loext:opacity="100%" style:font-name="Google Sans Code" fo:letter-spacing="normal" fo:font-style="normal" fo:font-weight="normal"/>
    </style:style>
    <style:style style:name="T30" style:family="text">
      <style:text-properties fo:font-variant="normal" fo:text-transform="none" fo:color="#c7c7c7" loext:opacity="100%" fo:letter-spacing="normal"/>
    </style:style>
    <style:style style:name="T31" style:family="text">
      <style:text-properties fo:font-variant="normal" fo:text-transform="none" style:font-name="Google Sans Text" fo:font-size="10.5pt" fo:letter-spacing="normal" fo:font-style="normal" fo:font-weight="bold"/>
    </style:style>
    <style:style style:name="T32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33" style:family="text">
      <style:text-properties fo:font-variant="normal" fo:text-transform="none" style:font-name="Google Sans Text" fo:font-size="12pt" fo:letter-spacing="normal" fo:font-style="normal" fo:font-weight="normal"/>
    </style:style>
    <style:style style:name="T34" style:family="text">
      <style:text-properties fo:font-variant="normal" fo:text-transform="none" style:font-name="Google Sans Code" fo:font-size="10.5pt" fo:letter-spacing="normal" fo:font-style="normal" fo:font-weight="bold"/>
    </style:style>
    <style:style style:name="T35" style:family="text">
      <style:text-properties fo:font-variant="normal" fo:text-transform="none" style:font-name="Google Sans Code" fo:letter-spacing="normal" fo:font-style="normal" fo:font-weight="normal"/>
    </style:style>
    <style:style style:name="T36" style:family="text">
      <style:text-properties fo:font-variant="normal" fo:text-transform="none" fo:font-size="10.5pt" fo:letter-spacing="normal" fo:font-style="normal" fo:font-weight="bold"/>
    </style:style>
    <style:style style:name="T37" style:family="text">
      <style:text-properties fo:font-variant="normal" fo:text-transform="none" fo:font-size="10.5pt" fo:letter-spacing="normal" fo:font-style="normal" fo:font-weight="normal"/>
    </style:style>
    <style:style style:name="T38" style:family="text">
      <style:text-properties style:use-window-font-color="true" loext:opacity="0%"/>
    </style:style>
    <style:style style:name="T39" style:family="text">
      <style:text-properties style:use-window-font-color="true" loext:opacity="0%" style:font-name="Liberation Serif"/>
    </style:style>
    <style:style style:name="T40" style:family="text">
      <style:text-properties style:font-name="FreeMono"/>
    </style:style>
    <style:style style:name="T41" style:family="text">
      <style:text-properties style:font-name="Google Sans Code" fo:font-weight="bold"/>
    </style:style>
    <style:style style:name="T42" style:family="text">
      <style:text-properties officeooo:rsid="000c0e97"/>
    </style:style>
    <style:style style:name="T43" style:family="text">
      <style:text-properties fo:color="#669768" loext:opacity="100%" style:font-name="Monospace1" fo:font-size="10pt" style:font-size-asian="10pt"/>
    </style:style>
    <style:style style:name="T44" style:family="text">
      <style:text-properties fo:color="#669768" loext:opacity="100%" style:font-name="Monospace" fo:font-size="10pt" style:font-size-asian="10pt"/>
    </style:style>
    <style:style style:name="T45" style:family="text">
      <style:text-properties style:font-name="Monospace1"/>
    </style:style>
    <style:style style:name="T46" style:family="text">
      <style:text-properties style:font-name="Monospace1" fo:font-size="10pt" style:font-size-asian="10pt"/>
    </style:style>
    <style:style style:name="T47" style:family="text">
      <style:text-properties fo:color="#739eca" loext:opacity="100%" style:font-name="Monospace1" fo:font-size="10pt" fo:font-weight="bold" style:font-size-asian="10pt" style:font-weight-asian="bold"/>
    </style:style>
    <style:style style:name="T48" style:family="text">
      <style:text-properties fo:color="#cccccc" loext:opacity="100%" style:font-name="Monospace1" fo:font-size="10pt" style:font-size-asian="10pt"/>
    </style:style>
    <style:style style:name="T49" style:family="text">
      <style:text-properties fo:color="#9e9e9e" loext:opacity="100%" style:font-name="Monospace1" fo:font-size="10pt" style:font-size-asian="10pt"/>
    </style:style>
    <style:style style:name="T50" style:family="text">
      <style:text-properties fo:color="#eecc64" loext:opacity="100%" style:font-name="Monospace1" fo:font-size="10pt" style:font-size-asian="10pt"/>
    </style:style>
    <style:style style:name="T51" style:family="text">
      <style:text-properties fo:color="#eecc64" loext:opacity="100%" fo:font-size="10pt" style:font-size-asian="10pt"/>
    </style:style>
    <style:style style:name="T52" style:family="text">
      <style:text-properties fo:color="#b788d3" loext:opacity="100%" style:font-name="Monospace1" fo:font-size="10pt" style:font-size-asian="10pt"/>
    </style:style>
    <style:style style:name="T53" style:family="text">
      <style:text-properties fo:color="#b788d3" loext:opacity="100%" style:font-name="Monospace1" fo:font-size="10pt" fo:font-style="italic" style:font-size-asian="10pt" style:font-style-asian="italic"/>
    </style:style>
    <style:style style:name="T54" style:family="text">
      <style:text-properties fo:color="#00b8b8" loext:opacity="100%" style:font-name="Monospace1" fo:font-size="10pt" style:font-size-asian="10pt"/>
    </style:style>
    <style:style style:name="T55" style:family="text">
      <style:text-properties fo:color="#c1aa6c" loext:opacity="100%" style:font-name="Monospace1" fo:font-size="10pt" fo:font-weight="bold" style:font-size-asian="10pt" style:font-weight-asian="bold"/>
    </style:style>
    <style:style style:name="T56" style:family="text">
      <style:text-properties fo:color="#c0c0c0" loext:opacity="100%" style:font-name="Monospace1" fo:font-size="10pt" style:font-size-asian="10pt"/>
    </style:style>
    <style:style style:name="T57" style:family="text">
      <style:text-properties fo:color="#cac580" loext:opacity="100%" style:font-name="Monospace1" fo:font-size="10pt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5 - Modelo de Dados Detalhado (Schemas Segregados + DDLs Implementados)</text:h>
      <text:p text:style-name="P3"><text:span text:style-name="Strong_20_Emphasis">Status:</text:span> Aprovado e Implementado </text:p>
      <text:p text:style-name="P3"><text:span text:style-name="Strong_20_Emphasis">Autor:</text:span> Equipe de Arquitetura </text:p>
      <text:p text:style-name="P3"><text:span text:style-name="Strong_20_Emphasis">Data:</text:span> 07/05/2026 </text:p>
      <text:p text:style-name="P3"><text:span text:style-name="Strong_20_Emphasis">Depende de:</text:span> RFC-0001, RFC-0002, RFC-0003, RFC-0004</text:p>
      <text:p text:style-name="P2"/>
      <text:h text:style-name="Heading_20_2" text:outline-level="2">1. Contexto e Evolução Arquitetural</text:h>
      <text:p text:style-name="Text_20_body">Este RFC define:</text:p>
      <text:list text:style-name="L1">
        <text:list-item>
          <text:p text:style-name="P10">Modelo relacional estabelecido. </text:p>
        </text:list-item>
        <text:list-item>
          <text:p text:style-name="P10">Estrutura física das tabelas segregadas por domínios de negócio (Schemas). </text:p>
        </text:list-item>
        <text:list-item>
          <text:p text:style-name="P10">Índices obrigatórios. </text:p>
        </text:list-item>
        <text:list-item>
          <text:p text:style-name="P10">Estratégia de versionamento de schema. </text:p>
        </text:list-item>
        <text:list-item>
          <text:p text:style-name="P10">Preparação para evolução multi-tenant. </text:p>
        </text:list-item>
        <text:list-item>
          <text:p text:style-name="P9">Estratégia de migração futura (schema por tenant / banco por tenant). </text:p>
        </text:list-item>
      </text:list>
      <text:p text:style-name="Text_20_body"><text:span text:style-name="Strong_20_Emphasis">Banco alvo:</text:span> PostgreSQL.</text:p>
      <text:h text:style-name="Heading_20_3" text:outline-level="3">1.1 A Segregação de Schemas</text:h>
      <text:p text:style-name="Text_20_body">Diferente da proposta do MVP inicial que concentrava todos os domínios em um único schema <text:span text:style-name="Source_20_Text">public</text:span>, a arquitetura evoluiu para a utilização de <text:span text:style-name="Strong_20_Emphasis">schemas funcionais separados</text:span>. Essa decisão visa criar uma fachada de serviços limpa e garantir a governança dos dados. Foram estabelecidos dois schemas fundamentais:</text:p>
      <text:list text:style-name="L2">
        <text:list-item>
          <text:p text:style-name="P11"><text:span text:style-name="Strong_20_Emphasis"><text:span text:style-name="T15">Schema pessoa:</text:span></text:span><text:span text:style-name="Strong_20_Emphasis"><text:span text:style-name="T18"> Atua como o núcleo de identidade canônica global (independente do Keycloak), centralizando os dados demográficos, físicos e estruturais.</text:span></text:span></text:p>
        </text:list-item>
        <text:list-item>
          <text:p text:style-name="P11"><text:span text:style-name="Strong_20_Emphasis"><text:span text:style-name="T16">Schema seguranca</text:span></text:span><text:span text:style-name="Strong_20_Emphasis"><text:span text:style-name="T18">: Atua como a ponte isolada entre o IAM externo (Keycloak) e as regras de negócio locais. Concentra o motor de autorização dinâmico (PBAC/ReBAC), a auditoria de acessos, a quarentena biométrica e a rastreabilidade antifraude de dispositivos.</text:span></text:span></text:p>
        </text:list-item>
        <text:list-item>
          <text:p text:style-name="P11"><text:span text:style-name="Strong_20_Emphasis"><text:span text:style-name="T16">Schema folha_ponto</text:span></text:span><text:span text:style-name="Strong_20_Emphasis"><text:span text:style-name="T18">: Atua como o domínio específico multi-tenant, puramente focado em orquestrar organizações, unidades físicas, turnos e o registro de presença imutável.</text:span></text:span></text:p>
        </text:list-item>
      </text:list>
      <text:p text:style-name="Horizontal_20_Line"/>
      <text:h text:style-name="Heading_20_2" text:outline-level="2">2. Princípios de Modelagem (Diretrizes Arquiteturais)</text:h>
      <text:list text:style-name="L3">
        <text:list-item>
          <text:p text:style-name="P13"><text:span text:style-name="Strong_20_Emphasis">Auditoria:</text:span> Preparar colunas para auditoria desde o início: <text:span text:style-name="Source_20_Text">criado_por</text:span>, <text:span text:style-name="Source_20_Text">criado_em</text:span>, <text:span text:style-name="Source_20_Text">atualizado_por</text:span> e <text:span text:style-name="Source_20_Text">atualizado_em</text:span> operando em UTC. Adicionalmente, tabelas críticas implementam tabelas de histórico <text:span text:style-name="Source_20_Text">_aud</text:span> ou triggers específicos no banco. </text:p>
        </text:list-item>
        <text:list-item>
          <text:p text:style-name="P13"><text:soft-page-break/><text:span text:style-name="Strong_20_Emphasis">Biometria:</text:span> Deve ser referenciada de forma relacional na tabela de eventos, com os vetores (templates) armazenados em sistemas especializados de Storage (ex: SeaweedFS / S3) ou colunas adequadas para processamento. </text:p>
        </text:list-item>
        <text:list-item>
          <text:p text:style-name="P13"><text:span text:style-name="Strong_20_Emphasis">Defesa em Profundidade:</text:span> Constraints do banco de dados (CHECK, UNIQUE, ENUMS) são a última linha de defesa; nunca confiar apenas em validações de aplicação. </text:p>
        </text:list-item>
        <text:list-item>
          <text:p text:style-name="P13"><text:span text:style-name="Strong_20_Emphasis">Imutabilidade Real:</text:span> Tabelas de log e registro de eventos são estritamente imutáveis, servindo apenas para inclusão (append-only), garantindo a preservação do evento bruto conforme o princípio do Comando Único. </text:p>
        </text:list-item>
        <text:list-item>
          <text:p text:style-name="P13"><text:span text:style-name="Strong_20_Emphasis">Multi-tenancy:</text:span> Toda tabela de escopo organizacional no schema <text:span text:style-name="Source_20_Text">folha_ponto</text:span> deve conter <text:span text:style-name="Source_20_Text">organizacao_id</text:span> obrigatório para isolamento lógico. Tabelas do schema <text:span text:style-name="Source_20_Text">pessoa</text:span> operam de forma global. </text:p>
        </text:list-item>
        <text:list-item>
          <text:p text:style-name="P12"><text:span text:style-name="Strong_20_Emphasis">Performance:</text:span> Índices B-Tree, espaciais (GIST) e únicos devem refletir os padrões de acesso reais estipulados no MVP. </text:p>
        </text:list-item>
      </text:list>
      <text:p text:style-name="Horizontal_20_Line"/>
      <text:h text:style-name="Heading_20_2" text:outline-level="2">3. Convenções (Texto Atualizado)</text:h>
      <text:list text:style-name="L4">
        <text:list-item>
          <text:p text:style-name="P15"><text:span text:style-name="Strong_20_Emphasis">Chaves Primárias (Flexibilizadas):</text:span> A escolha do tipo de chave primária dependerá do contexto arquitetural da entidade: </text:p>
          <text:list>
            <text:list-item>
              <text:p text:style-name="P15"><text:span text:style-name="Strong_20_Emphasis">Inteiros Sequenciais (Padrão Majoritário):</text:span> A maioria das tabelas do sistema utilizará o tradicional número de tamanho grande (<text:span text:style-name="Source_20_Text">int8</text:span> / <text:span text:style-name="Source_20_Text">BIGINT</text:span> GENERATED BY DEFAULT AS IDENTITY), obrigatório e gerado automaticamente pelo banco caso não seja informado pelo usuário. Este formato garante alta densidade e performance ideal para os índices B-Tree (padrão já adotado globalmente no schema <text:span text:style-name="Source_20_Text">pessoa</text:span>). </text:p>
            </text:list-item>
            <text:list-item>
              <text:p text:style-name="P15"><text:span text:style-name="Strong_20_Emphasis">UUIDs (Uso Restrito):</text:span> Entidades específicas de domínio isolado que necessitam de identificação global e ofuscação (como a <text:span text:style-name="Source_20_Text">Organização</text:span> ou links externos) utilizarão <text:span text:style-name="Source_20_Text">UUID</text:span> (gerados via <text:span text:style-name="Source_20_Text">gen_random_uuid()</text:span>), evitando a exposição de sequências lógicas. </text:p>
            </text:list-item>
          </text:list>
        </text:list-item>
        <text:list-item>
          <text:p text:style-name="P15"><text:span text:style-name="Strong_20_Emphasis">Timezones:</text:span> <text:span text:style-name="Source_20_Text">criado_em</text:span> e <text:span text:style-name="Source_20_Text">atualizado_em</text:span> operam obrigatoriamente em UTC (timestamps sem e com timezone conforme o contexto). </text:p>
        </text:list-item>
        <text:list-item>
          <text:p text:style-name="P15"><text:span text:style-name="Strong_20_Emphasis">Timestamp Seguro:</text:span> <text:span text:style-name="Source_20_Text">recebido_no_servidor_em</text:span> é obrigatório para registros críticos e representa a hora oficial do servidor, imune a fraudes no dispositivo cliente. </text:p>
        </text:list-item>
        <text:list-item>
          <text:p text:style-name="P15"><text:span text:style-name="Strong_20_Emphasis">Deleção:</text:span> Soft delete e status cycle onde necessário (ex: ENUM 'ativo', 'inativo', 'suspenso'). Nunca deletar registros de presença contidos no evento bruto. </text:p>
        </text:list-item>
        <text:list-item>
          <text:p text:style-name="P14"><text:span text:style-name="Strong_20_Emphasis">Nomenclatura Explícita:</text:span> Todas as constraints (FKs, UQs, CHECKs) devem ser nomeadas explicitamente para facilitar a manutenção e o versionamento das tabelas. </text:p>
        </text:list-item>
      </text:list>
      <text:p text:style-name="Horizontal_20_Line"/>
      <text:h text:style-name="Heading_20_2" text:outline-level="2">4. O Schema: Pessoa</text:h>
      <text:h text:style-name="Heading_20_3" text:outline-level="3">4.1 Introdução e Descrição Técnica</text:h>
      <text:p text:style-name="Text_20_body">O schema <text:span text:style-name="Source_20_Text">pessoa</text:span> é a fundação arquitetural da identidade global do sistema. Ele foi desenhado sob uma forte normalização e utiliza o padrão de <text:span text:style-name="Strong_20_Emphasis">herança/subtipagem</text:span> de tabelas. No centro existe a <text:soft-page-break/>tabela raiz <text:span text:style-name="Source_20_Text">pessoa</text:span>, da qual derivam ramificações altamente especializadas: <text:span text:style-name="Source_20_Text">pessoa_fisica</text:span> (ancorada no CPF como chave canônica imutável da identidade), <text:span text:style-name="Source_20_Text">pessoa_juridica</text:span> (CNPJ e atributos corporativos) e <text:span text:style-name="Source_20_Text">pessoa_grupo</text:span> (para aglomerações e hierarquias).</text:p>
      <text:p text:style-name="Text_20_body">Este schema é estritamente <text:span text:style-name="Strong_20_Emphasis">global</text:span> (não possui conceito de <text:span text:style-name="Source_20_Text">organizacao_id</text:span> ou tenant). Ele orquestra dados geográficos complexos (<text:span text:style-name="Source_20_Text">local</text:span>, centróides e áreas via <text:span text:style-name="Emphasis">PostGIS</text:span>), meios de comunicação (<text:span text:style-name="Source_20_Text">contato</text:span>, segregados em email, telefone, endereço) e relacionamentos infinitos entre partes interessadas. As chaves primárias são inteiros pesados (<text:span text:style-name="Source_20_Text">int8</text:span>) baseados em sequências (Sequences/Identity), o que otimiza profundamente as consultas de JOIN para dados centrais lidos frequentemente pelo sistema.</text:p>
      <text:h text:style-name="Heading_20_3" text:outline-level="3">4.2 Definição Física do Banco (DDL)</text:h>
      <text:p text:style-name="P7" loext:marker-style-name="T46"><text:span text:style-name="Source_20_Text"><text:span text:style-name="T44">-- =========================================</text:span></text:span></text:p>
      <text:p text:style-name="P7" loext:marker-style-name="T46"><text:span text:style-name="T43">-- SCHEM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SCHEMA</text:span><text:span text:style-name="T48"> </text:span><text:span text:style-name="T49">pessoa</text:span><text:span text:style-name="T48"> </text:span><text:span text:style-name="T47">AUTHORIZATION</text:span><text:span text:style-name="T48"> </text:span><text:span text:style-name="T49">backend</text:span><text:span text:style-name="T50">;</text:span></text:p>
      <text:p text:style-name="P8" loext:marker-style-name="T46"/>
      <text:p text:style-name="P7" loext:marker-style-name="T46"><text:span text:style-name="T47">SET</text:span><text:span text:style-name="T48"> </text:span><text:span text:style-name="T49">search_path</text:span><text:span text:style-name="T48"> </text:span><text:span text:style-name="T47">TO</text:span><text:span text:style-name="T48"> </text:span><text:span text:style-name="T49">pessoa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ENUMS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tipo_pessoa_enum</text:span><text:span text:style-name="T48"> </text:span><text:span text:style-name="T47">AS</text:span><text:span text:style-name="T48"> </text:span><text:span text:style-name="T49">ENUM</text:span><text:span text:style-name="T48"> (</text:span><text:span text:style-name="T57">'fisica'</text:span><text:span text:style-name="T48">,</text:span><text:span text:style-name="T57">'juridica'</text:span><text:span text:style-name="T48">,</text:span><text:span text:style-name="T57">'grupo'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status_enum</text:span><text:span text:style-name="T48"> </text:span><text:span text:style-name="T47">AS</text:span><text:span text:style-name="T48"> </text:span><text:span text:style-name="T49">ENUM</text:span><text:span text:style-name="T48"> (</text:span><text:span text:style-name="T57">'ativo'</text:span><text:span text:style-name="T48">,</text:span><text:span text:style-name="T57">'inativo'</text:span><text:span text:style-name="T48">,</text:span><text:span text:style-name="T57">'suspenso'</text:span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sexo_enum</text:span><text:span text:style-name="T48"> </text:span><text:span text:style-name="T47">AS</text:span><text:span text:style-name="T48"> </text:span><text:span text:style-name="T49">ENUM</text:span><text:span text:style-name="T48"> (</text:span><text:span text:style-name="T57">'masculino'</text:span><text:span text:style-name="T48">,</text:span><text:span text:style-name="T57">'feminino'</text:span><text:span text:style-name="T48">,</text:span><text:span text:style-name="T57">'outro'</text:span><text:span text:style-name="T48">,</text:span><text:span text:style-name="T57">'nao_informado'</text:span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estado_civil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solteiro'</text:span><text:span text:style-name="T48">,</text:span><text:span text:style-name="T57">'casado'</text:span><text:span text:style-name="T48">,</text:span><text:span text:style-name="T57">'divorciado'</text:span><text:span text:style-name="T48">,</text:span><text:span text:style-name="T57">'viuvo'</text:span><text:span text:style-name="T48">,</text:span></text:p>
      <text:p text:style-name="P7" loext:marker-style-name="T46"><text:span text:style-name="T48"><text:s text:c="4"/></text:span><text:span text:style-name="T57">'uniao_estavel'</text:span><text:span text:style-name="T48">,</text:span><text:span text:style-name="T57">'separado'</text:span><text:span text:style-name="T48">,</text:span><text:span text:style-name="T57">'nao_informado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nacionalidade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brasileira'</text:span><text:span text:style-name="T48">,</text:span><text:span text:style-name="T57">'estrangeira'</text:span><text:span text:style-name="T48">,</text:span><text:span text:style-name="T57">'nacionalizado'</text:span><text:span text:style-name="T48">,</text:span><text:span text:style-name="T57">'nao_informado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tipo_local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pais'</text:span><text:span text:style-name="T48">,</text:span><text:span text:style-name="T57">'estado'</text:span><text:span text:style-name="T48">,</text:span><text:span text:style-name="T57">'municipio'</text:span><text:span text:style-name="T48">,</text:span><text:span text:style-name="T57">'bairro'</text:span><text:span text:style-name="T48">,</text:span></text:p>
      <text:p text:style-name="P7" loext:marker-style-name="T46"><text:span text:style-name="T48"><text:s text:c="4"/></text:span><text:span text:style-name="T57">'logradouro'</text:span><text:span text:style-name="T48">,</text:span><text:span text:style-name="T57">'regiao'</text:span><text:span text:style-name="T48">,</text:span><text:span text:style-name="T57">'area_geografica'</text:span><text:span text:style-name="T48">,</text:span></text:p>
      <text:p text:style-name="P7" loext:marker-style-name="T46"><text:span text:style-name="T48"><text:s text:c="4"/></text:span><text:span text:style-name="T57">'estabelecimento'</text:span><text:span text:style-name="T48">,</text:span><text:span text:style-name="T57">'local_generico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tipo_contato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telefone'</text:span><text:span text:style-name="T48">,</text:span><text:span text:style-name="T57">'email'</text:span><text:span text:style-name="T48">,</text:span><text:span text:style-name="T57">'endereco'</text:span><text:span text:style-name="T48">,</text:span><text:span text:style-name="T57">'pessoa_relacionada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classificacao_contato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residencial'</text:span><text:span text:style-name="T48">,</text:span><text:span text:style-name="T57">'comercial'</text:span><text:span text:style-name="T48">,</text:span><text:span text:style-name="T57">'outro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YPE</text:span><text:span text:style-name="T48"> </text:span><text:span text:style-name="T49">papel_grupo_enum</text:span><text:span text:style-name="T48"> </text:span><text:span text:style-name="T47">AS</text:span><text:span text:style-name="T48"> </text:span><text:span text:style-name="T49">ENUM</text:span><text:span text:style-name="T48"> (</text:span></text:p>
      <text:p text:style-name="P7" loext:marker-style-name="T46"><text:span text:style-name="T48"><text:s text:c="4"/></text:span><text:span text:style-name="T57">'gestor'</text:span><text:span text:style-name="T48">,</text:span><text:span text:style-name="T57">'membro'</text:span><text:span text:style-name="T48">,</text:span><text:span text:style-name="T57">'associado'</text:span><text:span text:style-name="T48">,</text:span><text:span text:style-name="T57">'interessado'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LOCAL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oft-page-break/><text:span text:style-name="T47">CREATE</text:span><text:span text:style-name="T48"> </text:span><text:span text:style-name="T47">TABLE</text:span><text:span text:style-name="T48"> </text:span><text:span text:style-name="T52">local</text:span><text:span text:style-name="T48"> (</text:span></text:p>
      <text:p text:style-name="P7" loext:marker-style-name="T46"><text:span text:style-name="T48"><text:s text:c="4"/></text:span><text:span text:style-name="T54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54">nome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54">sigla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54">tipo</text:span><text:span text:style-name="T48"> </text:span><text:span text:style-name="T49">tipo_local_enum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id_local_pai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centroide</text:span><text:span text:style-name="T48"> </text:span><text:span text:style-name="T49">public</text:span><text:span text:style-name="T48">.</text:span><text:span text:style-name="T55">geometry</text:span><text:span text:style-name="T48">(</text:span><text:span text:style-name="T49">Point</text:span><text:span text:style-name="T48">, </text:span><text:span text:style-name="T56">4326</text:span><text:span text:style-name="T48">),</text:span></text:p>
      <text:p text:style-name="P7" loext:marker-style-name="T46"><text:span text:style-name="T48"><text:s text:c="4"/></text:span><text:span text:style-name="T54">area</text:span><text:span text:style-name="T48"> </text:span><text:span text:style-name="T49">public</text:span><text:span text:style-name="T48">.</text:span><text:span text:style-name="T55">geometry</text:span><text:span text:style-name="T48">(</text:span><text:span text:style-name="T49">MultiPolygon</text:span><text:span text:style-name="T48">, </text:span><text:span text:style-name="T56">4326</text:span><text:span text:style-name="T48">)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54">id_local_pai</text:span><text:span text:style-name="T48">) </text:span><text:span text:style-name="T47">REFERENCES</text:span><text:span text:style-name="T48"> </text:span><text:span text:style-name="T52">local</text:span><text:span text:style-name="T48">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local_pai</text:span><text:span text:style-name="T48"> </text:span><text:span text:style-name="T47">ON</text:span><text:span text:style-name="T48"> </text:span><text:span text:style-name="T47">local</text:span><text:span text:style-name="T48">(</text:span><text:span text:style-name="T49">id_local_pai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local_area</text:span><text:span text:style-name="T48"> </text:span><text:span text:style-name="T47">ON</text:span><text:span text:style-name="T48"> </text:span><text:span text:style-name="T47">local</text:span><text:span text:style-name="T48"> </text:span><text:span text:style-name="T47">USING</text:span><text:span text:style-name="T48"> </text:span><text:span text:style-name="T49">GIST</text:span><text:span text:style-name="T48"> (</text:span><text:span text:style-name="T49">area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PESSO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pessoa</text:span><text:span text:style-name="T48"> (</text:span></text:p>
      <text:p text:style-name="P7" loext:marker-style-name="T46"><text:span text:style-name="T48"><text:s text:c="4"/></text:span><text:span text:style-name="T54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nome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54">tipo</text:span><text:span text:style-name="T48"> </text:span><text:span text:style-name="T49">tipo_pessoa_enum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54">status</text:span><text:span text:style-name="T48"> </text:span><text:span text:style-name="T49">status_enum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DEFAULT</text:span><text:span text:style-name="T48"> </text:span><text:span text:style-name="T57">'ativo'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observacao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data_inicio</text:span><text:span text:style-name="T48"> </text:span><text:span text:style-name="T47">DATE</text:span><text:span text:style-name="T48">,</text:span></text:p>
      <text:p text:style-name="P7" loext:marker-style-name="T46"><text:span text:style-name="T48"><text:s text:c="4"/></text:span><text:span text:style-name="T54">data_termino</text:span><text:span text:style-name="T48"> </text:span><text:span text:style-name="T47">DATE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54">criado_por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54">criado_em</text:span><text:span text:style-name="T48"> </text:span><text:span text:style-name="T49">TIMESTAMPTZ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DEFAULT</text:span><text:span text:style-name="T48"> </text:span><text:span text:style-name="T49">now</text:span><text:span text:style-name="T48">(),</text:span></text:p>
      <text:p text:style-name="P7" loext:marker-style-name="T46"><text:span text:style-name="T48"><text:s text:c="4"/></text:span><text:span text:style-name="T54">atualizado_por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54">atualizado_em</text:span><text:span text:style-name="T48"> </text:span><text:span text:style-name="T49">TIMESTAMPTZ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DEFAULT</text:span><text:span text:style-name="T48"> </text:span><text:span text:style-name="T49">now</text:span><text:span text:style-name="T48">(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essoa_tipo</text:span><text:span text:style-name="T48"> </text:span><text:span text:style-name="T47">ON</text:span><text:span text:style-name="T48"> </text:span><text:span text:style-name="T49">pessoa</text:span><text:span text:style-name="T48">(</text:span><text:span text:style-name="T49">tipo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essoa_status</text:span><text:span text:style-name="T48"> </text:span><text:span text:style-name="T47">ON</text:span><text:span text:style-name="T48"> </text:span><text:span text:style-name="T49">pessoa</text:span><text:span text:style-name="T48">(</text:span><text:span text:style-name="T49">status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</text:span><text:span text:style-name="T43"/></text:p>
      <text:p text:style-name="P7" loext:marker-style-name="T46"><text:span text:style-name="T43">-- TRIGGER AUDITORIA</text:span><text:span text:style-name="T43"/></text:p>
      <text:p text:style-name="P7" loext:marker-style-name="T46"><text:span text:style-name="T43">-- =========================</text:span><text:span text:style-name="T43"/></text:p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set_auditoria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IF</text:span><text:span text:style-name="T48"> </text:span><text:span text:style-name="T49">TG_OP</text:span><text:span text:style-name="T48"> = </text:span><text:span text:style-name="T57">'INSERT'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NEW</text:span><text:span text:style-name="T48">.</text:span><text:span text:style-name="T49">atualizado_por</text:span><text:span text:style-name="T48"> := </text:span><text:span text:style-name="T47">NEW</text:span><text:span text:style-name="T48">.</text:span><text:span text:style-name="T49">criado_por</text:span><text:span text:style-name="T50">;</text:span></text:p>
      <text:p text:style-name="P7" loext:marker-style-name="T46"><text:span text:style-name="T48"><text:s text:c="8"/></text:span><text:span text:style-name="T47">NEW</text:span><text:span text:style-name="T48">.</text:span><text:span text:style-name="T49">atualizado_em</text:span><text:span text:style-name="T48"> := </text:span><text:span text:style-name="T47">NEW</text:span><text:span text:style-name="T48">.</text:span><text:span text:style-name="T49">criado_em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auditoria_pessoa</text:span></text:p>
      <text:p text:style-name="P7" loext:marker-style-name="T46"><text:span text:style-name="T47">BEFORE</text:span><text:span text:style-name="T48"> </text:span><text:span text:style-name="T47">INSERT</text:span><text:span text:style-name="T48"> </text:span><text:span text:style-name="T47">ON</text:span><text:span text:style-name="T48"> </text:span><text:span text:style-name="T49">pessoa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/text:p>
      <text:p text:style-name="P7" loext:marker-style-name="T46"><text:span text:style-name="T47">EXECUTE</text:span><text:span text:style-name="T48"> </text:span><text:span text:style-name="T47">FUNCTION</text:span><text:span text:style-name="T48"> </text:span><text:span text:style-name="T49">trg_set_auditoria</text:span><text:span text:style-name="T48">()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oft-page-break/><text:span text:style-name="T43">-- PROFISSAO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rofissa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nome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PESSOA FISIC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fisica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cpf</text:span><text:span text:style-name="T48"> </text:span><text:span text:style-name="T47">VARCHAR</text:span><text:span text:style-name="T48">(</text:span><text:span text:style-name="T56">11</text:span><text:span text:style-name="T48">),</text:span></text:p>
      <text:p text:style-name="P7" loext:marker-style-name="T46"><text:span text:style-name="T48"><text:s text:c="4"/></text:span><text:span text:style-name="T49">rg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apelido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pessoa_mae</text:span><text:span text:style-name="T48"> </text:span><text:span text:style-name="T47">BIGINT</text:span><text:span text:style-name="T48">,</text:span></text:p>
      <text:p text:style-name="P7" loext:marker-style-name="T46"><text:span text:style-name="T48"><text:s text:c="4"/></text:span><text:span text:style-name="T49">id_pessoa_pai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nome_mae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nome_pai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local_nascimento_nome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id_local_nascimento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local_falecimento_nome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id_local_falecimento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sexo</text:span><text:span text:style-name="T48"> </text:span><text:span text:style-name="T49">sexo_enum</text:span><text:span text:style-name="T48">,</text:span></text:p>
      <text:p text:style-name="P7" loext:marker-style-name="T46"><text:span text:style-name="T48"><text:s text:c="4"/></text:span><text:span text:style-name="T49">estado_civil</text:span><text:span text:style-name="T48"> </text:span><text:span text:style-name="T49">estado_civil_enum</text:span><text:span text:style-name="T48">,</text:span></text:p>
      <text:p text:style-name="P7" loext:marker-style-name="T46"><text:span text:style-name="T48"><text:s text:c="4"/></text:span><text:span text:style-name="T49">nacionalidade</text:span><text:span text:style-name="T48"> </text:span><text:span text:style-name="T49">nacionalidade_enum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profissao</text:span><text:span text:style-name="T48"> </text:span><text:span text:style-name="T47">BIGINT</text:span><text:span text:style-name="T48">,</text:span></text:p>
      <text:p text:style-name="P7" loext:marker-style-name="T46"><text:span text:style-name="T48"><text:s text:c="4"/></text:span><text:span text:style-name="T49">profissao_nome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text:span text:style-name="T48">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_mae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_pai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local_nascimento</text:span><text:span text:style-name="T48">) </text:span><text:span text:style-name="T47">REFERENCES</text:span><text:span text:style-name="T48"> </text:span><text:span text:style-name="T47">local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local_falecimento</text:span><text:span text:style-name="T48">) </text:span><text:span text:style-name="T47">REFERENCES</text:span><text:span text:style-name="T48"> </text:span><text:span text:style-name="T47">local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rofissao</text:span><text:span text:style-name="T48">) </text:span><text:span text:style-name="T47">REFERENCES</text:span><text:span text:style-name="T48"> </text:span><text:span text:style-name="T49">profissa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pf_cpf</text:span><text:span text:style-name="T48"> </text:span><text:span text:style-name="T47">ON</text:span><text:span text:style-name="T48"> </text:span><text:span text:style-name="T49">pessoa_fisica</text:span><text:span text:style-name="T48">(</text:span><text:span text:style-name="T49">cpf</text:span><text:span text:style-name="T48">) </text:span><text:span text:style-name="T47">WHERE</text:span><text:span text:style-name="T48"> </text:span><text:span text:style-name="T49">cpf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PESSOA JURIDIC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juridica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cnpj</text:span><text:span text:style-name="T48"> </text:span><text:span text:style-name="T47">VARCHAR</text:span><text:span text:style-name="T48">(</text:span><text:span text:style-name="T56">14</text:span><text:span text:style-name="T48">),</text:span></text:p>
      <text:p text:style-name="P7" loext:marker-style-name="T46"><text:span text:style-name="T48"><text:s text:c="4"/></text:span><text:span text:style-name="T49">inscricao_estadual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inscricao_municipal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razao_social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sigla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local_sede_nome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id_local_sede</text:span><text:span text:style-name="T48"> </text:span><text:span text:style-name="T47">BIGINT</text:span><text:span text:style-name="T48">,</text:span></text:p>
      <text:p text:style-name="P8" loext:marker-style-name="T46"><text:soft-page-break/></text:p>
      <text:p text:style-name="P7" loext:marker-style-name="T46"><text:span text:style-name="T48"><text:s text:c="4"/></text:span><text:span text:style-name="T49">natureza_juridica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regime_tributari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porte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capital_social</text:span><text:span text:style-name="T48"> </text:span><text:span text:style-name="T47">NUMERIC</text:span><text:span text:style-name="T48">(</text:span><text:span text:style-name="T56">15</text:span><text:span text:style-name="T48">,</text:span><text:span text:style-name="T56">2</text:span><text:span text:style-name="T48">),</text:span></text:p>
      <text:p text:style-name="P8" loext:marker-style-name="T46"/>
      <text:p text:style-name="P7" loext:marker-style-name="T46"><text:span text:style-name="T48"><text:s text:c="4"/></text:span><text:span text:style-name="T49">id_empresa_controladora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text:span text:style-name="T48">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local_sede</text:span><text:span text:style-name="T48">) </text:span><text:span text:style-name="T47">REFERENCES</text:span><text:span text:style-name="T48"> </text:span><text:span text:style-name="T47">local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empresa_controladora</text:span><text:span text:style-name="T48">) </text:span><text:span text:style-name="T47">REFERENCES</text:span><text:span text:style-name="T48"> </text:span><text:span text:style-name="T49">pessoa_juridica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pj_cnpj</text:span><text:span text:style-name="T48"> </text:span><text:span text:style-name="T47">ON</text:span><text:span text:style-name="T48"> </text:span><text:span text:style-name="T49">pessoa_juridica</text:span><text:span text:style-name="T48">(</text:span><text:span text:style-name="T49">cnpj</text:span><text:span text:style-name="T48">) </text:span><text:span text:style-name="T47">WHERE</text:span><text:span text:style-name="T48"> </text:span><text:span text:style-name="T49">cnpj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7">IF</text:span><text:span text:style-name="T48"> </text:span><text:span text:style-name="T47">NOT</text:span><text:span text:style-name="T48"> </text:span><text:span text:style-name="T47">EXISTS</text:span><text:span text:style-name="T48"> </text:span><text:span text:style-name="T49">idx_pj_inscricao_estadual</text:span></text:p>
      <text:p text:style-name="P7" loext:marker-style-name="T46"><text:span text:style-name="T48"><text:s text:c="4"/></text:span><text:span text:style-name="T47">ON</text:span><text:span text:style-name="T48"> </text:span><text:span text:style-name="T49">pessoa</text:span><text:span text:style-name="T48">.</text:span><text:span text:style-name="T49">pessoa_juridica</text:span><text:span text:style-name="T48">(</text:span><text:span text:style-name="T49">inscricao_estadual</text:span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7">IF</text:span><text:span text:style-name="T48"> </text:span><text:span text:style-name="T47">NOT</text:span><text:span text:style-name="T48"> </text:span><text:span text:style-name="T47">EXISTS</text:span><text:span text:style-name="T48"> </text:span><text:span text:style-name="T49">idx_pj_inscricao_municipal</text:span></text:p>
      <text:p text:style-name="P7" loext:marker-style-name="T46"><text:span text:style-name="T48"><text:s text:c="4"/></text:span><text:span text:style-name="T47">ON</text:span><text:span text:style-name="T48"> </text:span><text:span text:style-name="T49">pessoa</text:span><text:span text:style-name="T48">.</text:span><text:span text:style-name="T49">pessoa_juridica</text:span><text:span text:style-name="T48">(</text:span><text:span text:style-name="T49">inscricao_municipal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PESSOA GRUPO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grup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descrica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nome_resumido_sigla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TRIGGERS DE INATIVACAO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inativar_pf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IF</text:span><text:span text:style-name="T48"> </text:span><text:span text:style-name="T47">NEW</text:span><text:span text:style-name="T48">.</text:span><text:span text:style-name="T49">local_falecimento_nome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/text:p>
      <text:p text:style-name="P7" loext:marker-style-name="T46"><text:span text:style-name="T48"><text:s text:c="7"/></text:span><text:span text:style-name="T47">OR</text:span><text:span text:style-name="T48"> </text:span><text:span text:style-name="T47">NEW</text:span><text:span text:style-name="T48">.</text:span><text:span text:style-name="T49">id_local_falecimento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UPDATE</text:span><text:span text:style-name="T48"> </text:span><text:span text:style-name="T49">pessoa</text:span><text:span text:style-name="T48"> </text:span><text:span text:style-name="T47">SET</text:span><text:span text:style-name="T48"> </text:span><text:span text:style-name="T49">status</text:span><text:span text:style-name="T48"> = </text:span><text:span text:style-name="T57">'inativo'</text:span><text:span text:style-name="T48"> </text:span><text:span text:style-name="T47">WHERE</text:span><text:span text:style-name="T48"> </text:span><text:span text:style-name="T49">id</text:span><text:span text:style-name="T48"> = </text:span><text:span text:style-name="T47">NEW</text:span><text:span text:style-name="T48">.</text:span><text:span text:style-name="T49">id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pf_inativo</text:span></text:p>
      <text:p text:style-name="P7" loext:marker-style-name="T46"><text:span text:style-name="T47">AFTER</text:span><text:span text:style-name="T48"> </text:span><text:span text:style-name="T47">INSERT</text:span><text:span text:style-name="T48"> </text:span><text:span text:style-name="T47">OR</text:span><text:span text:style-name="T48"> </text:span><text:span text:style-name="T47">UPDATE</text:span><text:span text:style-name="T48"> </text:span><text:span text:style-name="T47">ON</text:span><text:span text:style-name="T48"> </text:span><text:span text:style-name="T49">pessoa_fisica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text:span text:style-name="T48"> </text:span><text:span text:style-name="T47">EXECUTE</text:span><text:span text:style-name="T48"> </text:span><text:span text:style-name="T47">FUNCTION</text:span><text:span text:style-name="T48"> </text:span><text:span text:style-name="T49">trg_inativar_pf</text:span><text:span text:style-name="T48">(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inativar_pj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IF</text:span><text:span text:style-name="T48"> </text:span><text:span text:style-name="T47">NEW</text:span><text:span text:style-name="T48">.</text:span><text:span text:style-name="T49">local_sede_nome</text:span><text:span text:style-name="T48"> </text:span><text:span text:style-name="T47">IS</text:span><text:span text:style-name="T48"> </text:span><text:span text:style-name="T47">NULL</text:span><text:span text:style-name="T48"> </text:span><text:span text:style-name="T47">AND</text:span><text:span text:style-name="T48"> </text:span><text:span text:style-name="T47">NEW</text:span><text:span text:style-name="T48">.</text:span><text:span text:style-name="T49">id_local_sede</text:span><text:span text:style-name="T48"> </text:span><text:span text:style-name="T47">IS</text:span><text:span text:style-name="T48"> </text:span><text:span text:style-name="T47">NULL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IF</text:span><text:span text:style-name="T48"> </text:span><text:span text:style-name="T47">EXISTS</text:span><text:span text:style-name="T48"> (</text:span></text:p>
      <text:p text:style-name="P7" loext:marker-style-name="T46"><text:span text:style-name="T48"><text:s text:c="8"/></text:span><text:span text:style-name="T47">SELECT</text:span><text:span text:style-name="T48"> </text:span><text:span text:style-name="T56">1</text:span><text:span text:style-name="T48"> </text:span><text:span text:style-name="T47">FROM</text:span><text:span text:style-name="T48"> </text:span><text:span text:style-name="T49">pessoa</text:span><text:span text:style-name="T48"> </text:span><text:span text:style-name="T49">p</text:span><text:span text:style-name="T48"> </text:span><text:span text:style-name="T47">WHERE</text:span><text:span text:style-name="T48"> </text:span><text:span text:style-name="T49">p</text:span><text:span text:style-name="T48">.</text:span><text:span text:style-name="T49">id</text:span><text:span text:style-name="T48"> = </text:span><text:span text:style-name="T47">NEW</text:span><text:span text:style-name="T48">.</text:span><text:span text:style-name="T49">id</text:span><text:span text:style-name="T48"> </text:span><text:span text:style-name="T47">AND</text:span><text:span text:style-name="T48"> </text:span><text:span text:style-name="T49">p</text:span><text:span text:style-name="T48">.</text:span><text:span text:style-name="T49">data_termino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/text:p>
      <text:p text:style-name="P7" loext:marker-style-name="T46"><text:span text:style-name="T48"><text:s text:c="4"/>) </text:span><text:span text:style-name="T47">THEN</text:span></text:p>
      <text:p text:style-name="P7" loext:marker-style-name="T46"><text:span text:style-name="T48"><text:s text:c="8"/></text:span><text:span text:style-name="T47">UPDATE</text:span><text:span text:style-name="T48"> </text:span><text:span text:style-name="T49">pessoa</text:span><text:span text:style-name="T48"> </text:span><text:span text:style-name="T47">SET</text:span><text:span text:style-name="T48"> </text:span><text:span text:style-name="T49">status</text:span><text:span text:style-name="T48"> = </text:span><text:span text:style-name="T57">'inativo'</text:span><text:span text:style-name="T48"> </text:span><text:span text:style-name="T47">WHERE</text:span><text:span text:style-name="T48"> </text:span><text:span text:style-name="T49">id</text:span><text:span text:style-name="T48"> = </text:span><text:span text:style-name="T47">NEW</text:span><text:span text:style-name="T48">.</text:span><text:span text:style-name="T49">id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oft-page-break/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pj_inativo</text:span></text:p>
      <text:p text:style-name="P7" loext:marker-style-name="T46"><text:span text:style-name="T47">AFTER</text:span><text:span text:style-name="T48"> </text:span><text:span text:style-name="T47">INSERT</text:span><text:span text:style-name="T48"> </text:span><text:span text:style-name="T47">OR</text:span><text:span text:style-name="T48"> </text:span><text:span text:style-name="T47">UPDATE</text:span><text:span text:style-name="T48"> </text:span><text:span text:style-name="T47">ON</text:span><text:span text:style-name="T48"> </text:span><text:span text:style-name="T49">pessoa_juridica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text:span text:style-name="T48"> </text:span><text:span text:style-name="T47">EXECUTE</text:span><text:span text:style-name="T48"> </text:span><text:span text:style-name="T47">FUNCTION</text:span><text:span text:style-name="T48"> </text:span><text:span text:style-name="T49">trg_inativar_pj</text:span><text:span text:style-name="T48">(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inativar_grupo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IF</text:span><text:span text:style-name="T48"> </text:span><text:span text:style-name="T47">NEW</text:span><text:span text:style-name="T48">.</text:span><text:span text:style-name="T49">data_termino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UPDATE</text:span><text:span text:style-name="T48"> </text:span><text:span text:style-name="T49">pessoa</text:span><text:span text:style-name="T48"> </text:span><text:span text:style-name="T47">SET</text:span><text:span text:style-name="T48"> </text:span><text:span text:style-name="T49">status</text:span><text:span text:style-name="T48"> = </text:span><text:span text:style-name="T57">'inativo'</text:span><text:span text:style-name="T48"> </text:span><text:span text:style-name="T47">WHERE</text:span><text:span text:style-name="T48"> </text:span><text:span text:style-name="T49">id</text:span><text:span text:style-name="T48"> = </text:span><text:span text:style-name="T47">NEW</text:span><text:span text:style-name="T48">.</text:span><text:span text:style-name="T49">id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grupo_inativo</text:span></text:p>
      <text:p text:style-name="P7" loext:marker-style-name="T46"><text:span text:style-name="T47">AFTER</text:span><text:span text:style-name="T48"> </text:span><text:span text:style-name="T47">INSERT</text:span><text:span text:style-name="T48"> </text:span><text:span text:style-name="T47">OR</text:span><text:span text:style-name="T48"> </text:span><text:span text:style-name="T47">UPDATE</text:span><text:span text:style-name="T48"> </text:span><text:span text:style-name="T47">ON</text:span><text:span text:style-name="T48"> </text:span><text:span text:style-name="T49">pessoa_grupo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text:span text:style-name="T48"> </text:span><text:span text:style-name="T47">EXECUTE</text:span><text:span text:style-name="T48"> </text:span><text:span text:style-name="T47">FUNCTION</text:span><text:span text:style-name="T48"> </text:span><text:span text:style-name="T49">trg_inativar_grupo</text:span><text:span text:style-name="T48">(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VALIDACAO PAI/MAE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validar_pais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DECLARE</text:span><text:span text:style-name="T48"> </text:span><text:span text:style-name="T49">sexo_mae</text:span><text:span text:style-name="T48"> </text:span><text:span text:style-name="T49">sexo_enum</text:span><text:span text:style-name="T50">;</text:span></text:p>
      <text:p text:style-name="P7" loext:marker-style-name="T46"><text:span text:style-name="T47">DECLARE</text:span><text:span text:style-name="T48"> </text:span><text:span text:style-name="T49">sexo_pai</text:span><text:span text:style-name="T48"> </text:span><text:span text:style-name="T49">sexo_enum</text:span><text:span text:style-name="T50">;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IF</text:span><text:span text:style-name="T48"> </text:span><text:span text:style-name="T47">NEW</text:span><text:span text:style-name="T48">.</text:span><text:span text:style-name="T49">id_pessoa_mae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SELECT</text:span><text:span text:style-name="T48"> </text:span><text:span text:style-name="T49">sexo</text:span><text:span text:style-name="T48"> </text:span><text:span text:style-name="T47">INTO</text:span><text:span text:style-name="T48"> </text:span><text:span text:style-name="T49">sexo_mae</text:span><text:span text:style-name="T48"> </text:span><text:span text:style-name="T47">FROM</text:span><text:span text:style-name="T48"> </text:span><text:span text:style-name="T49">pessoa_fisica</text:span><text:span text:style-name="T48"> </text:span><text:span text:style-name="T47">WHERE</text:span><text:span text:style-name="T48"> </text:span><text:span text:style-name="T49">id</text:span><text:span text:style-name="T48"> = </text:span><text:span text:style-name="T47">NEW</text:span><text:span text:style-name="T48">.</text:span><text:span text:style-name="T49">id_pessoa_mae</text:span><text:span text:style-name="T50">;</text:span></text:p>
      <text:p text:style-name="P7" loext:marker-style-name="T46"><text:span text:style-name="T48"><text:s text:c="8"/></text:span><text:span text:style-name="T47">IF</text:span><text:span text:style-name="T48"> </text:span><text:span text:style-name="T49">sexo_mae</text:span><text:span text:style-name="T48"> &lt;&gt; </text:span><text:span text:style-name="T57">'feminino'</text:span><text:span text:style-name="T48"> </text:span><text:span text:style-name="T47">THEN</text:span></text:p>
      <text:p text:style-name="P7" loext:marker-style-name="T46"><text:span text:style-name="T48"><text:s text:c="12"/></text:span><text:span text:style-name="T49">RAISE</text:span><text:span text:style-name="T48"> </text:span><text:span text:style-name="T47">EXCEPTION</text:span><text:span text:style-name="T48"> </text:span><text:span text:style-name="T57">'Mãe inválida'</text:span><text:span text:style-name="T50">;</text:span></text:p>
      <text:p text:style-name="P7" loext:marker-style-name="T46"><text:span text:style-name="T48"><text:s text:c="8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8" loext:marker-style-name="T46"/>
      <text:p text:style-name="P7" loext:marker-style-name="T46"><text:span text:style-name="T48"><text:s text:c="4"/></text:span><text:span text:style-name="T47">IF</text:span><text:span text:style-name="T48"> </text:span><text:span text:style-name="T47">NEW</text:span><text:span text:style-name="T48">.</text:span><text:span text:style-name="T49">id_pessoa_pai</text:span><text:span text:style-name="T48"> </text:span><text:span text:style-name="T47">IS</text:span><text:span text:style-name="T48"> </text:span><text:span text:style-name="T47">NOT</text:span><text:span text:style-name="T48"> </text:span><text:span text:style-name="T47">NULL</text:span><text:span text:style-name="T48"> </text:span><text:span text:style-name="T47">THEN</text:span></text:p>
      <text:p text:style-name="P7" loext:marker-style-name="T46"><text:span text:style-name="T48"><text:s text:c="8"/></text:span><text:span text:style-name="T47">SELECT</text:span><text:span text:style-name="T48"> </text:span><text:span text:style-name="T49">sexo</text:span><text:span text:style-name="T48"> </text:span><text:span text:style-name="T47">INTO</text:span><text:span text:style-name="T48"> </text:span><text:span text:style-name="T49">sexo_pai</text:span><text:span text:style-name="T48"> </text:span><text:span text:style-name="T47">FROM</text:span><text:span text:style-name="T48"> </text:span><text:span text:style-name="T49">pessoa_fisica</text:span><text:span text:style-name="T48"> </text:span><text:span text:style-name="T47">WHERE</text:span><text:span text:style-name="T48"> </text:span><text:span text:style-name="T49">id</text:span><text:span text:style-name="T48"> = </text:span><text:span text:style-name="T47">NEW</text:span><text:span text:style-name="T48">.</text:span><text:span text:style-name="T49">id_pessoa_pai</text:span><text:span text:style-name="T50">;</text:span></text:p>
      <text:p text:style-name="P7" loext:marker-style-name="T46"><text:span text:style-name="T48"><text:s text:c="8"/></text:span><text:span text:style-name="T47">IF</text:span><text:span text:style-name="T48"> </text:span><text:span text:style-name="T49">sexo_pai</text:span><text:span text:style-name="T48"> &lt;&gt; </text:span><text:span text:style-name="T57">'masculino'</text:span><text:span text:style-name="T48"> </text:span><text:span text:style-name="T47">THEN</text:span></text:p>
      <text:p text:style-name="P7" loext:marker-style-name="T46"><text:span text:style-name="T48"><text:s text:c="12"/></text:span><text:span text:style-name="T49">RAISE</text:span><text:span text:style-name="T48"> </text:span><text:span text:style-name="T47">EXCEPTION</text:span><text:span text:style-name="T48"> </text:span><text:span text:style-name="T57">'Pai inválido'</text:span><text:span text:style-name="T50">;</text:span></text:p>
      <text:p text:style-name="P7" loext:marker-style-name="T46"><text:span text:style-name="T48"><text:s text:c="8"/></text:span><text:span text:style-name="T47">END</text:span><text:span text:style-name="T48"> </text:span><text:span text:style-name="T47">IF</text:span><text:span text:style-name="T50">;</text:span></text:p>
      <text:p text:style-name="P7" loext:marker-style-name="T46"><text:span text:style-name="T48"><text:s text:c="4"/></text:span><text:span text:style-name="T47">END</text:span><text:span text:style-name="T48"> </text:span><text:span text:style-name="T47">IF</text:span><text:span text:style-name="T50">;</text:span></text:p>
      <text:p text:style-name="P8" loext:marker-style-name="T46"/>
      <text:p text:style-name="P7" loext:marker-style-name="T46"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validar_pais</text:span></text:p>
      <text:p text:style-name="P7" loext:marker-style-name="T46"><text:span text:style-name="T47">BEFORE</text:span><text:span text:style-name="T48"> </text:span><text:span text:style-name="T47">INSERT</text:span><text:span text:style-name="T48"> </text:span><text:span text:style-name="T47">OR</text:span><text:span text:style-name="T48"> </text:span><text:span text:style-name="T47">UPDATE</text:span><text:span text:style-name="T48"> </text:span><text:span text:style-name="T47">ON</text:span><text:span text:style-name="T48"> </text:span><text:span text:style-name="T49">pessoa_fisica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text:span text:style-name="T48"> </text:span><text:span text:style-name="T47">EXECUTE</text:span><text:span text:style-name="T48"> </text:span><text:span text:style-name="T47">FUNCTION</text:span><text:span text:style-name="T48"> </text:span><text:span text:style-name="T49">trg_validar_pais</text:span><text:span text:style-name="T48">(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CONTATO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contat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tipo</text:span><text:span text:style-name="T48"> </text:span><text:span text:style-name="T49">tipo_contato_enum</text:span><text:span text:style-name="T48"> </text:span><text:span text:style-name="T47">NOT</text:span><text:span text:style-name="T48"> </text:span><text:span text:style-name="T47">NULL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oft-page-break/><text:span text:style-name="T47">CREATE</text:span><text:span text:style-name="T48"> </text:span><text:span text:style-name="T47">TABLE</text:span><text:span text:style-name="T48"> </text:span><text:span text:style-name="T49">pessoa_contat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pessoa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id_contat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classificacao</text:span><text:span text:style-name="T48"> </text:span><text:span text:style-name="T49">classificacao_contato_enum</text:span><text:span text:style-name="T48">,</text:span></text:p>
      <text:p text:style-name="P7" loext:marker-style-name="T46"><text:span text:style-name="T48"><text:s text:c="4"/></text:span><text:span text:style-name="T49">prioridade</text:span><text:span text:style-name="T48"> </text:span><text:span text:style-name="T47">INTEGER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contato</text:span><text:span text:style-name="T48">) </text:span><text:span text:style-name="T47">REFERENCES</text:span><text:span text:style-name="T48"> </text:span><text:span text:style-name="T49">contat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c_lookup</text:span><text:span text:style-name="T48"> </text:span><text:span text:style-name="T47">ON</text:span><text:span text:style-name="T48"> </text:span><text:span text:style-name="T49">pessoa_contato</text:span><text:span text:style-name="T48">(</text:span><text:span text:style-name="T49">id_pessoa</text:span><text:span text:style-name="T48">, </text:span><text:span text:style-name="T49">prioridade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TELEFONE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contato_telefone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numero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numero_normalizado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contat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tel_norm</text:span><text:span text:style-name="T48"> </text:span><text:span text:style-name="T47">ON</text:span><text:span text:style-name="T48"> </text:span><text:span text:style-name="T49">contato_telefone</text:span><text:span text:style-name="T48">(</text:span><text:span text:style-name="T49">numero_normalizado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EMAIL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contato_email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email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email_normalizado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contat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email_norm</text:span><text:span text:style-name="T48"> </text:span><text:span text:style-name="T47">ON</text:span><text:span text:style-name="T48"> </text:span><text:span text:style-name="T49">contato_email</text:span><text:span text:style-name="T48">(</text:span><text:span text:style-name="T49">email_normalizado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ENDERECO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contato_enderec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cep</text:span><text:span text:style-name="T48"> </text:span><text:span text:style-name="T47">VARCHAR</text:span><text:span text:style-name="T48">(</text:span><text:span text:style-name="T56">10</text:span><text:span text:style-name="T48">),</text:span></text:p>
      <text:p text:style-name="P7" loext:marker-style-name="T46"><text:span text:style-name="T48"><text:s text:c="4"/></text:span><text:span text:style-name="T49">logradour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numer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complement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bairro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referencia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local</text:span><text:span text:style-name="T48"> </text:span><text:span text:style-name="T47">BIGIN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localizacao</text:span><text:span text:style-name="T48"> </text:span><text:span text:style-name="T49">public</text:span><text:span text:style-name="T48">.</text:span><text:span text:style-name="T49">geometry</text:span><text:span text:style-name="T48">(</text:span><text:span text:style-name="T49">Point</text:span><text:span text:style-name="T48">, </text:span><text:span text:style-name="T56">4326</text:span><text:span text:style-name="T48">),</text:span></text:p>
      <text:p text:style-name="P7" loext:marker-style-name="T46"><text:span text:style-name="T48"><text:s text:c="4"/></text:span><text:span text:style-name="T49">area</text:span><text:span text:style-name="T48"> </text:span><text:span text:style-name="T49">public</text:span><text:span text:style-name="T48">.</text:span><text:span text:style-name="T49">geometry</text:span><text:span text:style-name="T48">(</text:span><text:span text:style-name="T49">MultiPolygon</text:span><text:span text:style-name="T48">, </text:span><text:span text:style-name="T56">4326</text:span><text:span text:style-name="T48">),</text:span></text:p>
      <text:p text:style-name="P8" loext:marker-style-name="T46"/>
      <text:p text:style-name="P7" loext:marker-style-name="T46"><text:span text:style-name="T48"><text:s text:c="4"/></text:span><text:span text:style-name="T49">hash_endereco</text:span><text:span text:style-name="T48"> </text:span><text:span text:style-name="T49">BYTEA</text:span><text:span text:style-name="T48">,</text:span></text:p>
      <text:p text:style-name="P8" loext:marker-style-name="T46"><text:soft-page-break/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contato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local</text:span><text:span text:style-name="T48">) </text:span><text:span text:style-name="T47">REFERENCES</text:span><text:span text:style-name="T48"> </text:span><text:span text:style-name="T47">local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HASH ENDERECO</text:span><text:span text:style-name="T43"/></text:p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normalizar_texto</text:span><text:span text:style-name="T48">(</text:span><text:span text:style-name="T49">t</text:span><text:span text:style-name="T48"> </text:span><text:span text:style-name="T49">TEXT</text:span><text:span text:style-name="T48">)</text:span></text:p>
      <text:p text:style-name="P7" loext:marker-style-name="T46"><text:span text:style-name="T47">RETURNS</text:span><text:span text:style-name="T48"> </text:span><text:span text:style-name="T49">TEXT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RETURN</text:span><text:span text:style-name="T48"> </text:span><text:span text:style-name="T55">lower</text:span><text:span text:style-name="T48">(</text:span><text:span text:style-name="T55">trim</text:span><text:span text:style-name="T48">(</text:span><text:span text:style-name="T47">coalesce</text:span><text:span text:style-name="T48">(</text:span><text:span text:style-name="T49">t</text:span><text:span text:style-name="T48">,</text:span><text:span text:style-name="T57">''</text:span><text:span text:style-name="T48">)))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48"> </text:span><text:span text:style-name="T49">IMMUTABLE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FUNCTION</text:span><text:span text:style-name="T48"> </text:span><text:span text:style-name="T49">trg_hash_endereco</text:span><text:span text:style-name="T48">()</text:span></text:p>
      <text:p text:style-name="P7" loext:marker-style-name="T46"><text:span text:style-name="T47">RETURNS</text:span><text:span text:style-name="T48"> </text:span><text:span text:style-name="T47">TRIGGER</text:span><text:span text:style-name="T48"> </text:span><text:span text:style-name="T47">AS</text:span><text:span text:style-name="T48"> $$</text:span></text:p>
      <text:p text:style-name="P7" loext:marker-style-name="T46"><text:span text:style-name="T47">BEGIN</text:span><text:span text:style-name="T47"/></text:p>
      <text:p text:style-name="P7" loext:marker-style-name="T46"><text:span text:style-name="T48"><text:s text:c="4"/></text:span><text:span text:style-name="T47">NEW</text:span><text:span text:style-name="T48">.</text:span><text:span text:style-name="T49">hash_endereco</text:span><text:span text:style-name="T48"> :=</text:span></text:p>
      <text:p text:style-name="P7" loext:marker-style-name="T46"><text:span text:style-name="T48"><text:s text:c="8"/></text:span><text:span text:style-name="T49">digest</text:span><text:span text:style-name="T48">(</text:span></text:p>
      <text:p text:style-name="P7" loext:marker-style-name="T46"><text:span text:style-name="T48"><text:s text:c="12"/></text:span><text:span text:style-name="T49">normalizar_texto</text:span><text:span text:style-name="T48">(</text:span><text:span text:style-name="T47">NEW</text:span><text:span text:style-name="T48">.</text:span><text:span text:style-name="T49">cep</text:span><text:span text:style-name="T48">) ||</text:span></text:p>
      <text:p text:style-name="P7" loext:marker-style-name="T46"><text:span text:style-name="T48"><text:s text:c="12"/></text:span><text:span text:style-name="T49">normalizar_texto</text:span><text:span text:style-name="T48">(</text:span><text:span text:style-name="T47">NEW</text:span><text:span text:style-name="T48">.</text:span><text:span text:style-name="T49">logradouro</text:span><text:span text:style-name="T48">) ||</text:span></text:p>
      <text:p text:style-name="P7" loext:marker-style-name="T46"><text:span text:style-name="T48"><text:s text:c="12"/></text:span><text:span text:style-name="T49">normalizar_texto</text:span><text:span text:style-name="T48">(</text:span><text:span text:style-name="T47">NEW</text:span><text:span text:style-name="T48">.</text:span><text:span text:style-name="T49">numero</text:span><text:span text:style-name="T48">) ||</text:span></text:p>
      <text:p text:style-name="P7" loext:marker-style-name="T46"><text:span text:style-name="T48"><text:s text:c="12"/></text:span><text:span text:style-name="T49">normalizar_texto</text:span><text:span text:style-name="T48">(</text:span><text:span text:style-name="T47">NEW</text:span><text:span text:style-name="T48">.</text:span><text:span text:style-name="T49">complemento</text:span><text:span text:style-name="T48">) ||</text:span></text:p>
      <text:p text:style-name="P7" loext:marker-style-name="T46"><text:span text:style-name="T48"><text:s text:c="12"/></text:span><text:span text:style-name="T49">normalizar_texto</text:span><text:span text:style-name="T48">(</text:span><text:span text:style-name="T47">NEW</text:span><text:span text:style-name="T48">.</text:span><text:span text:style-name="T49">bairro</text:span><text:span text:style-name="T48">) ||</text:span></text:p>
      <text:p text:style-name="P7" loext:marker-style-name="T46"><text:span text:style-name="T48"><text:s text:c="12"/></text:span><text:span text:style-name="T47">coalesce</text:span><text:span text:style-name="T48">(</text:span><text:span text:style-name="T47">NEW</text:span><text:span text:style-name="T48">.</text:span><text:span text:style-name="T49">id_local</text:span><text:span text:style-name="T48">::</text:span><text:span text:style-name="T49">text</text:span><text:span text:style-name="T48">,</text:span><text:span text:style-name="T57">''</text:span><text:span text:style-name="T48">),</text:span></text:p>
      <text:p text:style-name="P7" loext:marker-style-name="T46"><text:span text:style-name="T48"><text:s text:c="12"/></text:span><text:span text:style-name="T57">'sha256'</text:span></text:p>
      <text:p text:style-name="P7" loext:marker-style-name="T46"><text:span text:style-name="T48"><text:s text:c="8"/>)</text:span><text:span text:style-name="T50">;</text:span></text:p>
      <text:p text:style-name="P7" loext:marker-style-name="T46"><text:span text:style-name="T48"><text:s text:c="4"/></text:span><text:span text:style-name="T47">RETURN</text:span><text:span text:style-name="T48"> </text:span><text:span text:style-name="T47">NEW</text:span><text:span text:style-name="T50">;</text:span></text:p>
      <text:p text:style-name="P7" loext:marker-style-name="T46"><text:span text:style-name="T47">END</text:span><text:span text:style-name="T50">;</text:span></text:p>
      <text:p text:style-name="P7" loext:marker-style-name="T46"><text:span text:style-name="T48">$$ </text:span><text:span text:style-name="T47">LANGUAGE</text:span><text:span text:style-name="T48"> </text:span><text:span text:style-name="T49">plpgsq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RIGGER</text:span><text:span text:style-name="T48"> </text:span><text:span text:style-name="T49">trg_hash_endereco</text:span></text:p>
      <text:p text:style-name="P7" loext:marker-style-name="T46"><text:span text:style-name="T47">BEFORE</text:span><text:span text:style-name="T48"> </text:span><text:span text:style-name="T47">INSERT</text:span><text:span text:style-name="T48"> </text:span><text:span text:style-name="T47">OR</text:span><text:span text:style-name="T48"> </text:span><text:span text:style-name="T47">UPDATE</text:span><text:span text:style-name="T48"> </text:span><text:span text:style-name="T47">ON</text:span><text:span text:style-name="T48"> </text:span><text:span text:style-name="T49">contato_endereco</text:span></text:p>
      <text:p text:style-name="P7" loext:marker-style-name="T46"><text:span text:style-name="T47">FOR</text:span><text:span text:style-name="T48"> </text:span><text:span text:style-name="T47">EACH</text:span><text:span text:style-name="T48"> </text:span><text:span text:style-name="T47">ROW</text:span><text:span text:style-name="T48"> </text:span><text:span text:style-name="T47">EXECUTE</text:span><text:span text:style-name="T48"> </text:span><text:span text:style-name="T47">FUNCTION</text:span><text:span text:style-name="T48"> </text:span><text:span text:style-name="T49">trg_hash_endereco</text:span><text:span text:style-name="T48">(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endereco_hash</text:span><text:span text:style-name="T48"> </text:span><text:span text:style-name="T47">ON</text:span><text:span text:style-name="T48"> </text:span><text:span text:style-name="T49">contato_endereco</text:span><text:span text:style-name="T48">(</text:span><text:span text:style-name="T49">hash_endereco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CONTATO PESSOA RELACIONAD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contato_pessoa_relacionada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pessoa_relacionada</text:span><text:span text:style-name="T48"> </text:span><text:span text:style-name="T47">BIGINT</text:span><text:span text:style-name="T48">,</text:span></text:p>
      <text:p text:style-name="P7" loext:marker-style-name="T46"><text:span text:style-name="T48"><text:s text:c="4"/></text:span><text:span text:style-name="T49">nome</text:span><text:span text:style-name="T48"> </text:span><text:span text:style-name="T49">TEXT</text:span><text:span text:style-name="T48">,</text:span></text:p>
      <text:p text:style-name="P7" loext:marker-style-name="T46"><text:span text:style-name="T48"><text:s text:c="4"/></text:span><text:span text:style-name="T49">descricao</text:span><text:span text:style-name="T48"> </text:span><text:span text:style-name="T49">TEXT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</text:span><text:span text:style-name="T48">) </text:span><text:span text:style-name="T47">REFERENCES</text:span><text:span text:style-name="T48"> </text:span><text:span text:style-name="T49">contato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_relacionada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GRUPOS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grupo_membros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id_grup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id_pessoa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papel</text:span><text:span text:style-name="T48"> </text:span><text:span text:style-name="T49">papel_grupo_enum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descricao_funcao</text:span><text:span text:style-name="T48"> </text:span><text:span text:style-name="T47">VARCHAR</text:span><text:span text:style-name="T48">(</text:span><text:span text:style-name="T56">255</text:span><text:span text:style-name="T48">),</text:span></text:p>
      <text:p text:style-name="P7" loext:marker-style-name="T46"><text:span text:style-name="T48"><text:s text:c="4"/></text:span><text:span text:style-name="T49">data_entrada</text:span><text:span text:style-name="T48"> </text:span><text:span text:style-name="T49">TIMESTAMPTZ</text:span><text:span text:style-name="T48"> </text:span><text:span text:style-name="T47">DEFAULT</text:span><text:span text:style-name="T48"> </text:span><text:span text:style-name="T49">now</text:span><text:span text:style-name="T48">(),</text:span></text:p>
      <text:p text:style-name="P7" loext:marker-style-name="T46"><text:span text:style-name="T48"><text:s text:c="4"/></text:span><text:span text:style-name="T49">data_saida</text:span><text:span text:style-name="T48"> </text:span><text:span text:style-name="T49">TIMESTAMPTZ</text:span><text:span text:style-name="T48">,</text:span></text:p>
      <text:p text:style-name="P8" loext:marker-style-name="T46"/>
      <text:p text:style-name="P7" loext:marker-style-name="T46"><text:soft-page-break/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grupo</text:span><text:span text:style-name="T48">) </text:span><text:span text:style-name="T47">REFERENCES</text:span><text:span text:style-name="T48"> </text:span><text:span text:style-name="T49">pessoa_grupo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pg_membro_ativo</text:span></text:p>
      <text:p text:style-name="P7" loext:marker-style-name="T46"><text:span text:style-name="T47">ON</text:span><text:span text:style-name="T48"> </text:span><text:span text:style-name="T49">pessoa</text:span><text:span text:style-name="T48">.</text:span><text:span text:style-name="T49">pessoa_grupo_membros</text:span><text:span text:style-name="T48">(</text:span><text:span text:style-name="T49">id_pessoa</text:span><text:span text:style-name="T48">, </text:span><text:span text:style-name="T49">id_grupo</text:span><text:span text:style-name="T48">, </text:span><text:span text:style-name="T49">papel</text:span><text:span text:style-name="T48">)</text:span></text:p>
      <text:p text:style-name="P7" loext:marker-style-name="T46"><text:span text:style-name="T47">WHERE</text:span><text:span text:style-name="T48"> </text:span><text:span text:style-name="T49">data_saida</text:span><text:span text:style-name="T48"> </text:span><text:span text:style-name="T47">IS</text:span><text:span text:style-name="T48"> </text:span><text:span text:style-name="T47">NUL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grupo_hierarquia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id_grupo_pai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id_grupo_filh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nome_pai_para_filho</text:span><text:span text:style-name="T48"> </text:span><text:span text:style-name="T47">VARCHAR</text:span><text:span text:style-name="T48">(</text:span><text:span text:style-name="T56">255</text:span><text:span text:style-name="T48">),</text:span></text:p>
      <text:p text:style-name="P7" loext:marker-style-name="T46"><text:span text:style-name="T48"><text:s text:c="4"/></text:span><text:span text:style-name="T49">nome_filho_para_pai</text:span><text:span text:style-name="T48"> </text:span><text:span text:style-name="T47">VARCHAR</text:span><text:span text:style-name="T48">(</text:span><text:span text:style-name="T56">255</text:span><text:span text:style-name="T48">)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grupo_pai</text:span><text:span text:style-name="T48">) </text:span><text:span text:style-name="T47">REFERENCES</text:span><text:span text:style-name="T48"> </text:span><text:span text:style-name="T49">pessoa_grupo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grupo_filho</text:span><text:span text:style-name="T48">) </text:span><text:span text:style-name="T47">REFERENCES</text:span><text:span text:style-name="T48"> </text:span><text:span text:style-name="T49">pessoa_grup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RELACIONAMENTOS (GRAFO)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relacao_tip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nome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relacao_tipo_nome</text:span><text:span text:style-name="T48"> </text:span><text:span text:style-name="T47">ON</text:span><text:span text:style-name="T48"> </text:span><text:span text:style-name="T49">relacao_tipo</text:span><text:span text:style-name="T48">(</text:span><text:span text:style-name="T49">nome</text:span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relaca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id_relacao_tip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relacao_tipo</text:span><text:span text:style-name="T48">) </text:span><text:span text:style-name="T47">REFERENCES</text:span><text:span text:style-name="T48"> </text:span><text:span text:style-name="T49">relacao_tip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relacao_tipo_funca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7" loext:marker-style-name="T46"><text:span text:style-name="T48"><text:s text:c="4"/></text:span><text:span text:style-name="T49">id_relacao_tip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nome</text:span><text:span text:style-name="T48"> </text:span><text:span text:style-name="T49">TEX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sexo</text:span><text:span text:style-name="T48"> </text:span><text:span text:style-name="T49">sexo_enum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relacao_tipo</text:span><text:span text:style-name="T48">) </text:span><text:span text:style-name="T47">REFERENCES</text:span><text:span text:style-name="T48"> </text:span><text:span text:style-name="T49">relacao_tip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relacao_tipo_funcao</text:span></text:p>
      <text:p text:style-name="P7" loext:marker-style-name="T46"><text:span text:style-name="T47">ON</text:span><text:span text:style-name="T48"> </text:span><text:span text:style-name="T49">relacao_tipo_funcao</text:span><text:span text:style-name="T48">(</text:span><text:span text:style-name="T49">id_relacao_tipo</text:span><text:span text:style-name="T48">, </text:span><text:span text:style-name="T49">nome</text:span><text:span text:style-name="T48">)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pessoa_relacionamento</text:span><text:span text:style-name="T48"> (</text:span></text:p>
      <text:p text:style-name="P7" loext:marker-style-name="T46"><text:span text:style-name="T48"><text:s text:c="4"/></text:span><text:span text:style-name="T49">id</text:span><text:span text:style-name="T48"> </text:span><text:span text:style-name="T47">BIGINT</text:span><text:span text:style-name="T48"> </text:span><text:span text:style-name="T47">GENERATED</text:span><text:span text:style-name="T48"> </text:span><text:span text:style-name="T47">BY</text:span><text:span text:style-name="T48"> </text:span><text:span text:style-name="T47">DEFAULT</text:span><text:span text:style-name="T48"> </text:span><text:span text:style-name="T47">AS</text:span><text:span text:style-name="T48"> </text:span><text:span text:style-name="T47">IDENTITY</text:span><text:span text:style-name="T48"> </text:span><text:span text:style-name="T47">PRIMARY</text:span><text:span text:style-name="T48"> </text:span><text:span text:style-name="T47">KEY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id_relaca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id_pessoa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s text:c="4"/></text:span><text:span text:style-name="T49">id_relacao_tipo_funcao</text:span><text:span text:style-name="T48"> </text:span><text:span text:style-name="T47">BIGINT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data_inicio</text:span><text:span text:style-name="T48"> </text:span><text:span text:style-name="T49">TIMESTAMPTZ</text:span><text:span text:style-name="T48"> </text:span><text:span text:style-name="T47">DEFAULT</text:span><text:span text:style-name="T48"> </text:span><text:span text:style-name="T49">now</text:span><text:span text:style-name="T48">(),</text:span></text:p>
      <text:p text:style-name="P7" loext:marker-style-name="T46"><text:span text:style-name="T48"><text:s text:c="4"/></text:span><text:span text:style-name="T49">data_fim</text:span><text:span text:style-name="T48"> </text:span><text:span text:style-name="T49">TIMESTAMPTZ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relacao</text:span><text:span text:style-name="T48">) </text:span><text:span text:style-name="T47">REFERENCES</text:span><text:span text:style-name="T48"> </text:span><text:span text:style-name="T49">relacao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pessoa</text:span><text:span text:style-name="T48">) </text:span><text:span text:style-name="T47">REFERENCES</text:span><text:span text:style-name="T48"> </text:span><text:span text:style-name="T49">pessoa</text:span><text:span text:style-name="T48">(</text:span><text:span text:style-name="T49">id</text:span><text:span text:style-name="T48">),</text:span></text:p>
      <text:p text:style-name="P7" loext:marker-style-name="T46"><text:span text:style-name="T48"><text:s text:c="4"/></text:span><text:span text:style-name="T47">FOREIGN</text:span><text:span text:style-name="T48"> </text:span><text:span text:style-name="T47">KEY</text:span><text:span text:style-name="T48"> (</text:span><text:span text:style-name="T49">id_relacao_tipo_funcao</text:span><text:span text:style-name="T48">) </text:span><text:span text:style-name="T47">REFERENCES</text:span><text:span text:style-name="T48"> </text:span><text:span text:style-name="T49">relacao_tipo_funca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oft-page-break/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relacao_pessoa_funcao_ativa</text:span></text:p>
      <text:p text:style-name="P7" loext:marker-style-name="T46"><text:span text:style-name="T47">ON</text:span><text:span text:style-name="T48"> </text:span><text:span text:style-name="T49">pessoa_relacionamento</text:span><text:span text:style-name="T48">(</text:span><text:span text:style-name="T49">id_relacao</text:span><text:span text:style-name="T48">, </text:span><text:span text:style-name="T49">id_pessoa</text:span><text:span text:style-name="T48">, </text:span><text:span text:style-name="T49">id_relacao_tipo_funcao</text:span><text:span text:style-name="T48">)</text:span></text:p>
      <text:p text:style-name="P7" loext:marker-style-name="T46"><text:span text:style-name="T47">WHERE</text:span><text:span text:style-name="T48"> </text:span><text:span text:style-name="T49">data_fim</text:span><text:span text:style-name="T48"> </text:span><text:span text:style-name="T47">IS</text:span><text:span text:style-name="T48"> </text:span><text:span text:style-name="T47">NUL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r_relacao</text:span><text:span text:style-name="T48"> </text:span><text:span text:style-name="T47">ON</text:span><text:span text:style-name="T48"> </text:span><text:span text:style-name="T49">pessoa_relacionamento</text:span><text:span text:style-name="T48">(</text:span><text:span text:style-name="T49">id_relacao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r_pessoa</text:span><text:span text:style-name="T48"> </text:span><text:span text:style-name="T47">ON</text:span><text:span text:style-name="T48"> </text:span><text:span text:style-name="T49">pessoa_relacionamento</text:span><text:span text:style-name="T48">(</text:span><text:span text:style-name="T49">id_pessoa</text:span><text:span text:style-name="T48">)</text:span><text:span text:style-name="T50">;</text:span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3">-- VIEWS (HIERARQUIA)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VIEW</text:span><text:span text:style-name="T48"> </text:span><text:span text:style-name="T49">pessoa</text:span><text:span text:style-name="T48">.</text:span><text:span text:style-name="T49">vw_grupo_hierarquia_desc</text:span><text:span text:style-name="T48"> </text:span><text:span text:style-name="T47">AS</text:span></text:p>
      <text:p text:style-name="P7" loext:marker-style-name="T46"><text:span text:style-name="T47">WITH</text:span><text:span text:style-name="T48"> </text:span><text:span text:style-name="T47">RECURSIVE</text:span><text:span text:style-name="T48"> </text:span><text:span text:style-name="T49">arvore</text:span><text:span text:style-name="T48"> </text:span><text:span text:style-name="T47">AS</text:span><text:span text:style-name="T48"> (</text:span></text:p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56">1</text:span><text:span text:style-name="T48"> </text:span><text:span text:style-name="T47">AS</text:span><text:span text:style-name="T48"> </text:span><text:span text:style-name="T49">nivel</text:span><text:span text:style-name="T48">,</text:span></text:p>
      <text:p text:style-name="P7" loext:marker-style-name="T46"><text:span text:style-name="T48"><text:s text:c="8"/></text:span><text:span text:style-name="T47">ARRAY</text:span><text:span text:style-name="T48">[</text:span><text:span text:style-name="T49">h</text:span><text:span text:style-name="T48">.</text:span><text:span text:style-name="T49">id_grupo_pai</text:span><text:span text:style-name="T48">, </text:span><text:span text:style-name="T49">h</text:span><text:span text:style-name="T48">.</text:span><text:span text:style-name="T49">id_grupo_filho</text:span><text:span text:style-name="T48">] </text:span><text:span text:style-name="T47">AS</text:span><text:span text:style-name="T48"> </text:span><text:span text:style-name="T49">caminho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8" loext:marker-style-name="T46"/>
      <text:p text:style-name="P7" loext:marker-style-name="T46"><text:span text:style-name="T48"><text:s text:c="4"/></text:span><text:span text:style-name="T47">UNION</text:span><text:span text:style-name="T48"> </text:span><text:span text:style-name="T47">ALL</text:span></text:p>
      <text:p text:style-name="P8" loext:marker-style-name="T46"/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a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49">a</text:span><text:span text:style-name="T48">.</text:span><text:span text:style-name="T49">nivel</text:span><text:span text:style-name="T48"> + </text:span><text:span text:style-name="T56">1</text:span><text:span text:style-name="T48">,</text:span></text:p>
      <text:p text:style-name="P7" loext:marker-style-name="T46"><text:span text:style-name="T48"><text:s text:c="8"/></text:span><text:span text:style-name="T49">a</text:span><text:span text:style-name="T48">.</text:span><text:span text:style-name="T49">caminho</text:span><text:span text:style-name="T48"> || </text:span><text:span text:style-name="T49">h</text:span><text:span text:style-name="T48">.</text:span><text:span text:style-name="T49">id_grupo_filho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arvore</text:span><text:span text:style-name="T48"> </text:span><text:span text:style-name="T49">a</text:span></text:p>
      <text:p text:style-name="P7" loext:marker-style-name="T46"><text:span text:style-name="T48"><text:s text:c="8"/></text:span><text:span text:style-name="T47">ON</text:span><text:span text:style-name="T48"> </text:span><text:span text:style-name="T49">a</text:span><text:span text:style-name="T48">.</text:span><text:span text:style-name="T49">id_grupo_filho</text:span><text:span text:style-name="T48"> = </text:span><text:span text:style-name="T49">h</text:span><text:span text:style-name="T48">.</text:span><text:span text:style-name="T49">id_grupo_pai</text:span></text:p>
      <text:p text:style-name="P7" loext:marker-style-name="T46"><text:span text:style-name="T48">)</text:span><text:span text:style-name="T48"/></text:p>
      <text:p text:style-name="P7" loext:marker-style-name="T46"><text:span text:style-name="T47">SELECT</text:span><text:span text:style-name="T48"> * </text:span><text:span text:style-name="T47">FROM</text:span><text:span text:style-name="T48"> </text:span><text:span text:style-name="T49">arvore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VIEW</text:span><text:span text:style-name="T48"> </text:span><text:span text:style-name="T49">pessoa</text:span><text:span text:style-name="T48">.</text:span><text:span text:style-name="T49">vw_grupo_hierarquia_asc</text:span><text:span text:style-name="T48"> </text:span><text:span text:style-name="T47">AS</text:span></text:p>
      <text:p text:style-name="P7" loext:marker-style-name="T46"><text:span text:style-name="T47">WITH</text:span><text:span text:style-name="T48"> </text:span><text:span text:style-name="T47">RECURSIVE</text:span><text:span text:style-name="T48"> </text:span><text:span text:style-name="T49">arvore</text:span><text:span text:style-name="T48"> </text:span><text:span text:style-name="T47">AS</text:span><text:span text:style-name="T48"> (</text:span></text:p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56">1</text:span><text:span text:style-name="T48"> </text:span><text:span text:style-name="T47">AS</text:span><text:span text:style-name="T48"> </text:span><text:span text:style-name="T49">nivel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8" loext:marker-style-name="T46"/>
      <text:p text:style-name="P7" loext:marker-style-name="T46"><text:span text:style-name="T48"><text:s text:c="4"/></text:span><text:span text:style-name="T47">UNION</text:span><text:span text:style-name="T48"> </text:span><text:span text:style-name="T47">ALL</text:span></text:p>
      <text:p text:style-name="P8" loext:marker-style-name="T46"/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a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49">a</text:span><text:span text:style-name="T48">.</text:span><text:span text:style-name="T49">nivel</text:span><text:span text:style-name="T48"> + </text:span><text:span text:style-name="T56">1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arvore</text:span><text:span text:style-name="T48"> </text:span><text:span text:style-name="T49">a</text:span></text:p>
      <text:p text:style-name="P7" loext:marker-style-name="T46"><text:span text:style-name="T48"><text:s text:c="8"/></text:span><text:span text:style-name="T47">ON</text:span><text:span text:style-name="T48"> </text:span><text:span text:style-name="T49">h</text:span><text:span text:style-name="T48">.</text:span><text:span text:style-name="T49">id_grupo_filho</text:span><text:span text:style-name="T48"> = </text:span><text:span text:style-name="T49">a</text:span><text:span text:style-name="T48">.</text:span><text:span text:style-name="T49">id_grupo_pai</text:span></text:p>
      <text:p text:style-name="P7" loext:marker-style-name="T46"><text:span text:style-name="T48">)</text:span><text:span text:style-name="T48"/></text:p>
      <text:p text:style-name="P7" loext:marker-style-name="T46"><text:span text:style-name="T47">SELECT</text:span><text:span text:style-name="T48"> * </text:span><text:span text:style-name="T47">FROM</text:span><text:span text:style-name="T48"> </text:span><text:span text:style-name="T49">arvore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VIEW</text:span><text:span text:style-name="T48"> </text:span><text:span text:style-name="T49">vw_grupo_membros_ativos</text:span><text:span text:style-name="T48"> </text:span><text:span text:style-name="T47">AS</text:span></text:p>
      <text:p text:style-name="P7" loext:marker-style-name="T46"><text:span text:style-name="T47">SELECT</text:span><text:span text:style-name="T48"> *</text:span></text:p>
      <text:p text:style-name="P7" loext:marker-style-name="T46"><text:span text:style-name="T47">FROM</text:span><text:span text:style-name="T48"> </text:span><text:span text:style-name="T49">pessoa_grupo_membros</text:span></text:p>
      <text:p text:style-name="P7" loext:marker-style-name="T46"><text:span text:style-name="T47">WHERE</text:span><text:span text:style-name="T48"> </text:span><text:span text:style-name="T49">data_saida</text:span><text:span text:style-name="T48"> </text:span><text:span text:style-name="T47">IS</text:span><text:span text:style-name="T48"> </text:span><text:span text:style-name="T47">NULL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47">VIEW</text:span><text:span text:style-name="T48"> </text:span><text:span text:style-name="T49">pessoa</text:span><text:span text:style-name="T48">.</text:span><text:span text:style-name="T49">vw_grupo_membros_hierarquia</text:span><text:span text:style-name="T48"> </text:span><text:span text:style-name="T47">AS</text:span></text:p>
      <text:p text:style-name="P7" loext:marker-style-name="T46"><text:span text:style-name="T47">WITH</text:span><text:span text:style-name="T48"> </text:span><text:span text:style-name="T47">RECURSIVE</text:span><text:span text:style-name="T48"> </text:span><text:span text:style-name="T49">arvore</text:span><text:span text:style-name="T48"> </text:span><text:span text:style-name="T47">AS</text:span><text:span text:style-name="T48"> (</text:span></text:p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g</text:span><text:span text:style-name="T48">.</text:span><text:span text:style-name="T49">id</text:span><text:span text:style-name="T48"> </text:span><text:span text:style-name="T47">AS</text:span><text:span text:style-name="T48"> </text:span><text:span text:style-name="T49">id_grupo_raiz</text:span><text:span text:style-name="T48">,</text:span></text:p>
      <text:p text:style-name="P7" loext:marker-style-name="T46"><text:span text:style-name="T48"><text:s text:c="8"/></text:span><text:span text:style-name="T49">g</text:span><text:span text:style-name="T48">.</text:span><text:span text:style-name="T49">id</text:span><text:span text:style-name="T48"> </text:span><text:span text:style-name="T47">AS</text:span><text:span text:style-name="T48"> </text:span><text:span text:style-name="T49">id_grupo</text:span></text:p>
      <text:p text:style-name="P7" loext:marker-style-name="T46"><text:soft-page-break/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</text:span><text:span text:style-name="T48"> </text:span><text:span text:style-name="T49">g</text:span></text:p>
      <text:p text:style-name="P8" loext:marker-style-name="T46"/>
      <text:p text:style-name="P7" loext:marker-style-name="T46"><text:span text:style-name="T48"><text:s text:c="4"/></text:span><text:span text:style-name="T47">UNION</text:span><text:span text:style-name="T48"> </text:span><text:span text:style-name="T47">ALL</text:span></text:p>
      <text:p text:style-name="P8" loext:marker-style-name="T46"/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53">a</text:span><text:span text:style-name="T48">.</text:span><text:span text:style-name="T54">id_grupo_raiz</text:span><text:span text:style-name="T48">,</text:span></text:p>
      <text:p text:style-name="P7" loext:marker-style-name="T46"><text:span text:style-name="T48"><text:s text:c="8"/></text:span><text:span text:style-name="T53">h</text:span><text:span text:style-name="T48">.</text:span><text:span text:style-name="T54">id_grupo_filho</text:span></text:p>
      <text:p text:style-name="P7" loext:marker-style-name="T46"><text:span text:style-name="T48"><text:s text:c="4"/></text:span><text:span text:style-name="T47">FROM</text:span><text:span text:style-name="T48"> </text:span><text:span text:style-name="T52">pessoa</text:span><text:span text:style-name="T48">.</text:span><text:span text:style-name="T52">pessoa_grupo_hierarquia</text:span><text:span text:style-name="T48"> </text:span><text:span text:style-name="T53">h</text:span></text:p>
      <text:p text:style-name="P7" loext:marker-style-name="T46"><text:span text:style-name="T48"><text:s text:c="4"/></text:span><text:span text:style-name="T47">JOIN</text:span><text:span text:style-name="T48"> </text:span><text:span text:style-name="T52">arvore</text:span><text:span text:style-name="T48"> </text:span><text:span text:style-name="T53">a</text:span><text:span text:style-name="T48"> </text:span><text:span text:style-name="T47">ON</text:span><text:span text:style-name="T48"> </text:span><text:span text:style-name="T53">a</text:span><text:span text:style-name="T48">.</text:span><text:span text:style-name="T54">id_grupo</text:span><text:span text:style-name="T48"> = </text:span><text:span text:style-name="T53">h</text:span><text:span text:style-name="T48">.</text:span><text:span text:style-name="T54">id_grupo_pai</text:span></text:p>
      <text:p text:style-name="P7" loext:marker-style-name="T46"><text:span text:style-name="T48">)</text:span><text:span text:style-name="T48"/></text:p>
      <text:p text:style-name="P7" loext:marker-style-name="T46"><text:span text:style-name="T47">SELECT</text:span><text:span text:style-name="T47"/></text:p>
      <text:p text:style-name="P7" loext:marker-style-name="T46"><text:span text:style-name="T48"><text:s text:c="4"/></text:span><text:span text:style-name="T49">a</text:span><text:span text:style-name="T48">.</text:span><text:span text:style-name="T49">id_grupo_raiz</text:span><text:span text:style-name="T48"> </text:span><text:span text:style-name="T47">AS</text:span><text:span text:style-name="T48"> </text:span><text:span text:style-name="T49">id_grupo</text:span><text:span text:style-name="T48">,</text:span></text:p>
      <text:p text:style-name="P7" loext:marker-style-name="T46"><text:span text:style-name="T48"><text:s text:c="4"/></text:span><text:span text:style-name="T49">gm</text:span><text:span text:style-name="T48">.</text:span><text:span text:style-name="T49">id_pessoa</text:span><text:span text:style-name="T48">,</text:span></text:p>
      <text:p text:style-name="P7" loext:marker-style-name="T46"><text:span text:style-name="T48"><text:s text:c="4"/></text:span><text:span text:style-name="T49">gm</text:span><text:span text:style-name="T48">.</text:span><text:span text:style-name="T49">papel</text:span><text:span text:style-name="T48">,</text:span></text:p>
      <text:p text:style-name="P7" loext:marker-style-name="T46"><text:span text:style-name="T48"><text:s text:c="4"/></text:span><text:span text:style-name="T49">gm</text:span><text:span text:style-name="T48">.</text:span><text:span text:style-name="T49">descricao_funcao</text:span></text:p>
      <text:p text:style-name="P7" loext:marker-style-name="T46"><text:span text:style-name="T47">FROM</text:span><text:span text:style-name="T48"> </text:span><text:span text:style-name="T49">arvore</text:span><text:span text:style-name="T48"> </text:span><text:span text:style-name="T49">a</text:span></text:p>
      <text:p text:style-name="P7" loext:marker-style-name="T46"><text:span text:style-name="T47">JOIN</text:span><text:span text:style-name="T48"> </text:span><text:span text:style-name="T49">pessoa</text:span><text:span text:style-name="T48">.</text:span><text:span text:style-name="T49">pessoa_grupo_membros</text:span><text:span text:style-name="T48"> </text:span><text:span text:style-name="T49">gm</text:span></text:p>
      <text:p text:style-name="P7" loext:marker-style-name="T46"><text:span text:style-name="T48"><text:s text:c="4"/></text:span><text:span text:style-name="T47">ON</text:span><text:span text:style-name="T48"> </text:span><text:span text:style-name="T49">gm</text:span><text:span text:style-name="T48">.</text:span><text:span text:style-name="T49">id_grupo</text:span><text:span text:style-name="T48"> = </text:span><text:span text:style-name="T49">a</text:span><text:span text:style-name="T48">.</text:span><text:span text:style-name="T49">id_grupo</text:span></text:p>
      <text:p text:style-name="P7" loext:marker-style-name="T46"><text:span text:style-name="T47">WHERE</text:span><text:span text:style-name="T48"> </text:span><text:span text:style-name="T49">gm</text:span><text:span text:style-name="T48">.</text:span><text:span text:style-name="T49">data_saida</text:span><text:span text:style-name="T48"> </text:span><text:span text:style-name="T47">IS</text:span><text:span text:style-name="T48"> </text:span><text:span text:style-name="T47">NULL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52">VIEW</text:span><text:span text:style-name="T48"> </text:span><text:span text:style-name="T54">pessoa</text:span><text:span text:style-name="T48">.</text:span><text:span text:style-name="T49">vw_grupo_hierarquia_nomeada</text:span><text:span text:style-name="T48"> </text:span><text:span text:style-name="T47">AS</text:span></text:p>
      <text:p text:style-name="P7" loext:marker-style-name="T46"><text:span text:style-name="T47">SELECT</text:span><text:span text:style-name="T47"/></text:p>
      <text:p text:style-name="P7" loext:marker-style-name="T46"><text:span text:style-name="T48"><text:s text:c="4"/></text:span><text:span text:style-name="T49">h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4"/></text:span><text:span text:style-name="T54">p1</text:span><text:span text:style-name="T48">.</text:span><text:span text:style-name="T49">nome</text:span><text:span text:style-name="T48"> </text:span><text:span text:style-name="T47">AS</text:span><text:span text:style-name="T48"> </text:span><text:span text:style-name="T49">nome_grupo_pai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4"/></text:span><text:span text:style-name="T49">p2</text:span><text:span text:style-name="T48">.</text:span><text:span text:style-name="T49">nome</text:span><text:span text:style-name="T48"> </text:span><text:span text:style-name="T47">AS</text:span><text:span text:style-name="T48"> </text:span><text:span text:style-name="T49">nome_grupo_filho</text:span><text:span text:style-name="T48">,</text:span></text:p>
      <text:p text:style-name="P8" loext:marker-style-name="T46"/>
      <text:p text:style-name="P7" loext:marker-style-name="T46"><text:span text:style-name="T48"><text:s text:c="4"/></text:span><text:span text:style-name="T49">h</text:span><text:span text:style-name="T48">.</text:span><text:span text:style-name="T49">nome_pai_para_filho</text:span><text:span text:style-name="T48">,</text:span></text:p>
      <text:p text:style-name="P7" loext:marker-style-name="T46"><text:span text:style-name="T48"><text:s text:c="4"/></text:span><text:span text:style-name="T49">h</text:span><text:span text:style-name="T48">.</text:span><text:span text:style-name="T49">nome_filho_para_pai</text:span></text:p>
      <text:p text:style-name="P7" loext:marker-style-name="T46"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7" loext:marker-style-name="T46"><text:span text:style-name="T47">JOIN</text:span><text:span text:style-name="T48"> </text:span><text:span text:style-name="T49">pessoa</text:span><text:span text:style-name="T48">.</text:span><text:span text:style-name="T49">pessoa</text:span><text:span text:style-name="T48"> </text:span><text:span text:style-name="T49">p1</text:span><text:span text:style-name="T48"> </text:span><text:span text:style-name="T47">ON</text:span><text:span text:style-name="T48"> </text:span><text:span text:style-name="T49">p1</text:span><text:span text:style-name="T48">.</text:span><text:span text:style-name="T49">id</text:span><text:span text:style-name="T48"> = </text:span><text:span text:style-name="T49">h</text:span><text:span text:style-name="T48">.</text:span><text:span text:style-name="T49">id_grupo_pai</text:span></text:p>
      <text:p text:style-name="P7" loext:marker-style-name="T46"><text:span text:style-name="T47">JOIN</text:span><text:span text:style-name="T48"> </text:span><text:span text:style-name="T49">pessoa</text:span><text:span text:style-name="T48">.</text:span><text:span text:style-name="T49">pessoa</text:span><text:span text:style-name="T48"> </text:span><text:span text:style-name="T49">p2</text:span><text:span text:style-name="T48"> </text:span><text:span text:style-name="T47">ON</text:span><text:span text:style-name="T48"> </text:span><text:span text:style-name="T49">p2</text:span><text:span text:style-name="T48">.</text:span><text:span text:style-name="T49">id</text:span><text:span text:style-name="T48"> = </text:span><text:span text:style-name="T49">h</text:span><text:span text:style-name="T48">.</text:span><text:span text:style-name="T49">id_grupo_filho</text:span><text:span text:style-name="T50">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OR</text:span><text:span text:style-name="T48"> </text:span><text:span text:style-name="T49">REPLACE</text:span><text:span text:style-name="T48"> </text:span><text:span text:style-name="T52">VIEW</text:span><text:span text:style-name="T48"> </text:span><text:span text:style-name="T54">pessoa</text:span><text:span text:style-name="T48">.</text:span><text:span text:style-name="T49">vw_grupo_caminho</text:span><text:span text:style-name="T48"> </text:span><text:span text:style-name="T47">AS</text:span></text:p>
      <text:p text:style-name="P7" loext:marker-style-name="T46"><text:span text:style-name="T47">WITH</text:span><text:span text:style-name="T48"> </text:span><text:span text:style-name="T47">RECURSIVE</text:span><text:span text:style-name="T48"> </text:span><text:span text:style-name="T49">arvore</text:span><text:span text:style-name="T48"> </text:span><text:span text:style-name="T47">AS</text:span><text:span text:style-name="T48"> (</text:span></text:p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49">p1</text:span><text:span text:style-name="T48">.</text:span><text:span text:style-name="T49">nome</text:span><text:span text:style-name="T48">::</text:span><text:span text:style-name="T49">TEXT</text:span><text:span text:style-name="T48"> || </text:span><text:span text:style-name="T57">' &gt; '</text:span><text:span text:style-name="T48"> || </text:span><text:span text:style-name="T49">p2</text:span><text:span text:style-name="T48">.</text:span><text:span text:style-name="T49">nome</text:span><text:span text:style-name="T48">::</text:span><text:span text:style-name="T49">TEXT</text:span><text:span text:style-name="T48"> </text:span><text:span text:style-name="T47">AS</text:span><text:span text:style-name="T48"> </text:span><text:span text:style-name="T49">caminho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pessoa</text:span><text:span text:style-name="T48">.</text:span><text:span text:style-name="T49">pessoa</text:span><text:span text:style-name="T48"> </text:span><text:span text:style-name="T49">p1</text:span><text:span text:style-name="T48"> </text:span><text:span text:style-name="T47">ON</text:span><text:span text:style-name="T48"> </text:span><text:span text:style-name="T49">p1</text:span><text:span text:style-name="T48">.</text:span><text:span text:style-name="T49">id</text:span><text:span text:style-name="T48"> = </text:span><text:span text:style-name="T49">h</text:span><text:span text:style-name="T48">.</text:span><text:span text:style-name="T49">id_grupo_pai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pessoa</text:span><text:span text:style-name="T48">.</text:span><text:span text:style-name="T49">pessoa</text:span><text:span text:style-name="T48"> </text:span><text:span text:style-name="T49">p2</text:span><text:span text:style-name="T48"> </text:span><text:span text:style-name="T47">ON</text:span><text:span text:style-name="T48"> </text:span><text:span text:style-name="T49">p2</text:span><text:span text:style-name="T48">.</text:span><text:span text:style-name="T49">id</text:span><text:span text:style-name="T48"> = </text:span><text:span text:style-name="T49">h</text:span><text:span text:style-name="T48">.</text:span><text:span text:style-name="T49">id_grupo_filho</text:span></text:p>
      <text:p text:style-name="P8" loext:marker-style-name="T46"/>
      <text:p text:style-name="P7" loext:marker-style-name="T46"><text:span text:style-name="T48"><text:s text:c="4"/></text:span><text:span text:style-name="T47">UNION</text:span><text:span text:style-name="T48"> </text:span><text:span text:style-name="T47">ALL</text:span></text:p>
      <text:p text:style-name="P8" loext:marker-style-name="T46"/>
      <text:p text:style-name="P7" loext:marker-style-name="T46"><text:span text:style-name="T48"><text:s text:c="4"/></text:span><text:span text:style-name="T47">SELECT</text:span></text:p>
      <text:p text:style-name="P7" loext:marker-style-name="T46"><text:span text:style-name="T48"><text:s text:c="8"/></text:span><text:span text:style-name="T49">a</text:span><text:span text:style-name="T48">.</text:span><text:span text:style-name="T49">id_grupo_pai</text:span><text:span text:style-name="T48">,</text:span></text:p>
      <text:p text:style-name="P7" loext:marker-style-name="T46"><text:span text:style-name="T48"><text:s text:c="8"/></text:span><text:span text:style-name="T49">h</text:span><text:span text:style-name="T48">.</text:span><text:span text:style-name="T49">id_grupo_filho</text:span><text:span text:style-name="T48">,</text:span></text:p>
      <text:p text:style-name="P7" loext:marker-style-name="T46"><text:span text:style-name="T48"><text:s text:c="8"/></text:span><text:span text:style-name="T49">a</text:span><text:span text:style-name="T48">.</text:span><text:span text:style-name="T49">caminho</text:span><text:span text:style-name="T48"> || </text:span><text:span text:style-name="T57">' &gt; '</text:span><text:span text:style-name="T48"> || </text:span><text:span text:style-name="T49">p</text:span><text:span text:style-name="T48">.</text:span><text:span text:style-name="T49">nome</text:span></text:p>
      <text:p text:style-name="P7" loext:marker-style-name="T46"><text:span text:style-name="T48"><text:s text:c="4"/></text:span><text:span text:style-name="T47">FROM</text:span><text:span text:style-name="T48"> </text:span><text:span text:style-name="T49">pessoa</text:span><text:span text:style-name="T48">.</text:span><text:span text:style-name="T49">pessoa_grupo_hierarquia</text:span><text:span text:style-name="T48"> </text:span><text:span text:style-name="T49">h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arvore</text:span><text:span text:style-name="T48"> </text:span><text:span text:style-name="T49">a</text:span><text:span text:style-name="T48"> </text:span><text:span text:style-name="T47">ON</text:span><text:span text:style-name="T48"> </text:span><text:span text:style-name="T49">a</text:span><text:span text:style-name="T48">.</text:span><text:span text:style-name="T49">id_grupo_filho</text:span><text:span text:style-name="T48"> = </text:span><text:span text:style-name="T49">h</text:span><text:span text:style-name="T48">.</text:span><text:span text:style-name="T49">id_grupo_pai</text:span></text:p>
      <text:p text:style-name="P7" loext:marker-style-name="T46"><text:span text:style-name="T48"><text:s text:c="4"/></text:span><text:span text:style-name="T47">JOIN</text:span><text:span text:style-name="T48"> </text:span><text:span text:style-name="T49">pessoa</text:span><text:span text:style-name="T48">.</text:span><text:span text:style-name="T49">pessoa</text:span><text:span text:style-name="T48"> </text:span><text:span text:style-name="T49">p</text:span><text:span text:style-name="T48"> </text:span><text:span text:style-name="T47">ON</text:span><text:span text:style-name="T48"> </text:span><text:span text:style-name="T49">p</text:span><text:span text:style-name="T48">.</text:span><text:span text:style-name="T49">id</text:span><text:span text:style-name="T48"> = </text:span><text:span text:style-name="T49">h</text:span><text:span text:style-name="T48">.</text:span><text:span text:style-name="T49">id_grupo_filho</text:span></text:p>
      <text:p text:style-name="P7" loext:marker-style-name="T46"><text:span text:style-name="T48">)</text:span><text:span text:style-name="T48"/></text:p>
      <text:p text:style-name="P7" loext:marker-style-name="T46"><text:span text:style-name="T47">SELECT</text:span><text:span text:style-name="T48"> * </text:span><text:span text:style-name="T47">FROM</text:span><text:span text:style-name="T48"> </text:span><text:span text:style-name="T49">arvore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SCHEMA</text:span><text:span text:style-name="T48"> </text:span><text:span text:style-name="T49">pessoa</text:span><text:span text:style-name="T48"> </text:span><text:span text:style-name="T47">TO</text:span><text:span text:style-name="T48"> </text:span><text:span text:style-name="T49">backend</text:span><text:span text:style-name="T50">;</text:span></text:p>
      <text:h text:style-name="Heading_20_3" text:outline-level="3"><text:soft-page-break/>4.3 Resumo Técnico e Diretrizes do Schema</text:h>
      <text:list text:style-name="L5">
        <text:list-item>
          <text:p text:style-name="P17"><text:span text:style-name="Strong_20_Emphasis">Subtipagem e Chaves Canônicas:</text:span> A tabela raiz <text:span text:style-name="Source_20_Text">pessoa</text:span> detém o status e a auditoria básica. As tabelas <text:span text:style-name="Source_20_Text">pessoa_fisica</text:span> e <text:span text:style-name="Source_20_Text">pessoa_juridica</text:span> usam a mesma PK (chave estrangeira para a raiz) e definem índices únicos fortes para <text:span text:style-name="Source_20_Text">cpf</text:span> e <text:span text:style-name="Source_20_Text">cnpj</text:span>, barrando absolutamente a duplicidade na camada de banco. </text:p>
        </text:list-item>
        <text:list-item>
          <text:p text:style-name="P17"><text:span text:style-name="Strong_20_Emphasis">Tipagem Restrita:</text:span> O schema faz uso intensivo de Custom Types (ENUMs do PostgreSQL) como <text:span text:style-name="Source_20_Text">sexo_enum</text:span>, <text:span text:style-name="Source_20_Text">tipo_pessoa_enum</text:span>, <text:span text:style-name="Source_20_Text">status_enum</text:span>, injetando restrições de validação nativas e rápidas. </text:p>
        </text:list-item>
        <text:list-item>
          <text:p text:style-name="P17"><text:span text:style-name="Strong_20_Emphasis">Auditoria Baseada em Triggers:</text:span> Em vez de depender do Java para popular os dados de trilha e de status inativo em todas as ramificações, o schema utiliza funções nativas do PL/pgSQL (como <text:span text:style-name="Source_20_Text">trg_set_auditoria</text:span> e <text:span text:style-name="Source_20_Text">trg_inativar_pf</text:span>) engatilhadas (Triggers) em operações de <text:span text:style-name="Source_20_Text">INSERT</text:span> ou <text:span text:style-name="Source_20_Text">UPDATE</text:span>, blindando a integridade independente da camada de software. </text:p>
        </text:list-item>
        <text:list-item>
          <text:p text:style-name="P17"><text:span text:style-name="Strong_20_Emphasis">Normalização Geográfica e de Contato:</text:span> Contatos (telefone, email, endereço) e locais são desvinculados diretamente da pessoa. Eles nascem em tabelas mestre (ex: <text:span text:style-name="Source_20_Text">contato_endereco</text:span> usando função de <text:span text:style-name="Source_20_Text">hash_endereco</text:span> para deduplicação) e são pivotados pela tabela associativa <text:span text:style-name="Source_20_Text">pessoa_contato</text:span>, permitindo que múltiplas pessoas compartilhem o mesmo endereço físico sem repetição de strings. </text:p>
        </text:list-item>
        <text:list-item>
          <text:p text:style-name="P16"><text:span text:style-name="Strong_20_Emphasis">Hierarquia e Views (ReBAC Foundation):</text:span> Grupos suportam relações estruturadas com a tabela <text:span text:style-name="Source_20_Text">pessoa_grupo_hierarquia</text:span>. Para facilitar a vida dos desenvolvedores na extração de caminhos e níveis hierárquicos, o schema expõe diversas <text:span text:style-name="Emphasis">Views Recursivas</text:span> (como <text:span text:style-name="Source_20_Text">vw_grupo_caminho</text:span>, <text:span text:style-name="Source_20_Text">vw_grupo_hierarquia_asc</text:span>, e <text:span text:style-name="Source_20_Text">vw_grupo_membros_ativos</text:span>), transformando grafos complexos em consultas planas simples de serem consumidas. </text:p>
        </text:list-item>
      </text:list>
      <text:p text:style-name="Horizontal_20_Line"/>
      <text:h text:style-name="P4" text:outline-level="2">5. O Schema: <text:span text:style-name="T42">seguranca</text:span></text:h>
      <text:h text:style-name="P5" text:outline-level="3">5.1 Introdução e Descrição Técnica</text:h>
      <text:p text:style-name="P21"><text:span text:style-name="T17">O schema </text:span><text:span text:style-name="Source_20_Text"><text:span text:style-name="T13">seguranca</text:span></text:span><text:span text:style-name="T11"> </text:span><text:span text:style-name="T17">materializa a Arquitetura de Identidade Segura em Três Camadas. Ele hospeda a tabela </text:span><text:span text:style-name="Source_20_Text"><text:span text:style-name="T13">identidade_acesso</text:span></text:span><text:span text:style-name="T17">, responsável por traduzir o </text:span><text:span text:style-name="Source_20_Text"><text:span text:style-name="T13">sub</text:span></text:span><text:span text:style-name="T11"> </text:span><text:span text:style-name="T17">do Keycloak para o CPF da pessoa. Também engloba todo o Motor Interno de Políticas (tabelas de exceções e relacionamentos), as chaves de dispositivos para o modelo Antifraude e os metadados de consentimento da LGPD.</text:span></text:p>
      <text:h text:style-name="P5" text:outline-level="3">5.2 Definição Física do Banco (DDL)</text:h>
      <text:p text:style-name="P7" loext:marker-style-name="T46"><text:span text:style-name="T43">-- DROP SCHEMA seguranca;</text:span></text:p>
      <text:p text:style-name="P8" loext:marker-style-name="T46"/>
      <text:p text:style-name="P7" loext:marker-style-name="T46"><text:span text:style-name="T47">CREATE</text:span><text:span text:style-name="T48"> </text:span><text:span text:style-name="T47">SCHEMA</text:span><text:span text:style-name="T48"> </text:span><text:span text:style-name="T47">IF</text:span><text:span text:style-name="T48"> </text:span><text:span text:style-name="T47">NOT</text:span><text:span text:style-name="T48"> </text:span><text:span text:style-name="T47">EXISTS</text:span><text:span text:style-name="T48"> </text:span><text:span text:style-name="T49">seguranca</text:span><text:span text:style-name="T50">;</text:span></text:p>
      <text:p text:style-name="P7" loext:marker-style-name="T46"><text:span text:style-name="T47">SET</text:span><text:span text:style-name="T48"> </text:span><text:span text:style-name="T49">search_path</text:span><text:span text:style-name="T48"> </text:span><text:span text:style-name="T47">TO</text:span><text:span text:style-name="T48"> </text:span><text:span text:style-name="T49">seguranca</text:span><text:span text:style-name="T50">;</text:span></text:p>
      <text:p text:style-name="P7" loext:marker-style-name="T46"><text:span text:style-name="T43">-- seguranca.consentiment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consentiment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consentimento</text:span><text:span text:style-name="T48"> (</text:span></text:p>
      <text:p text:style-name="P7" loext:marker-style-name="T46"><text:soft-page-break/><text:span text:style-name="T48"><text:tab/></text:span><text:span text:style-name="T54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55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tipo_consentimento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ATIVO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consentimento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consentiment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consentimento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seguranca.dispositiv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dispositiv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dispositivo</text:span><text:span text:style-name="T48"> (</text:span></text:p>
      <text:p text:style-name="P7" loext:marker-style-name="T46"><text:span text:style-name="T48"><text:tab/></text:span><text:span text:style-name="T54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55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identificador_dispositivo</text:span><text:span text:style-name="T48"> </text:span><text:span text:style-name="T47">varchar</text:span><text:span text:style-name="T48">(</text:span><text:span text:style-name="T56">128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nivel_confianca</text:span><text:span text:style-name="T48"> </text:span><text:span text:style-name="T47">varchar</text:span><text:span text:style-name="T48">(</text:span><text:span text:style-name="T56">16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plataforma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dispositivo_identificador_dispositivo_key_1</text:span><text:span text:style-name="T48"> </text:span><text:span text:style-name="T47">UNIQUE</text:span><text:span text:style-name="T48"> (</text:span><text:span text:style-name="T54">identificador_dispositivo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dispositivo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dispositiv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dispositivo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seguranca.excecao_permissao_usuari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excecao_permissao_usuari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excecao_permissao_usuario</text:span><text:span text:style-name="T48"> (</text:span></text:p>
      <text:p text:style-name="P7" loext:marker-style-name="T46"><text:span text:style-name="T48"><text:tab/></text:span><text:span text:style-name="T54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55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recurso</text:span><text:span text:style-name="T48"> </text:span><text:span text:style-name="T47">varchar</text:span><text:span text:style-name="T48">(</text:span><text:span text:style-name="T56">128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escopo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ondicao_json</text:span><text:span text:style-name="T48"> </text:span><text:span text:style-name="T49">jsonb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oft-page-break/><text:span text:style-name="T48"><text:tab/></text:span><text:span text:style-name="T47">CONSTRAINT</text:span><text:span text:style-name="T48"> </text:span><text:span text:style-name="T49">excecao_permissao_usuario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ermissao_org_usuario_1</text:span><text:span text:style-name="T48"> </text:span><text:span text:style-name="T47">ON</text:span><text:span text:style-name="T48"> </text:span><text:span text:style-name="T49">seguranca</text:span><text:span text:style-name="T48">.</text:span><text:span text:style-name="T49">excecao_permissao_usuario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usuario_id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excecao_permissao_usuari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excecao_permissao_usuario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seguranca.log_auditoria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log_auditoria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log_auditoria</text:span><text:span text:style-name="T48"> (</text:span></text:p>
      <text:p text:style-name="P7" loext:marker-style-name="T46"><text:span text:style-name="T48"><text:tab/></text:span><text:span text:style-name="T54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55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organizacao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cao</text:span><text:span text:style-name="T48"> </text:span><text:span text:style-name="T47">varchar</text:span><text:span text:style-name="T48">(</text:span><text:span text:style-name="T56">128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tipo_entidade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entidade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decisao</text:span><text:span text:style-name="T48"> </text:span><text:span text:style-name="T47">varchar</text:span><text:span text:style-name="T48">(</text:span><text:span text:style-name="T56">16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metadados</text:span><text:span text:style-name="T48"> </text:span><text:span text:style-name="T49">jsonb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log_auditoria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auditoria_org_tempo_1</text:span><text:span text:style-name="T48"> </text:span><text:span text:style-name="T47">ON</text:span><text:span text:style-name="T48"> </text:span><text:span text:style-name="T49">seguranca</text:span><text:span text:style-name="T48">.</text:span><text:span text:style-name="T49">log_auditoria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criado_em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seguranca</text:span><text:span text:style-name="T48">.</text:span><text:span text:style-name="T52">log_auditoria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log_auditoria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seguranca.perfil_biometric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perfil_biometric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perfil_biometrico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modelo_biometrico</text:span><text:span text:style-name="T48"> </text:span><text:span text:style-name="T49">bytea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versao_modelo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perfil_biometrico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perfil_biometric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perfil_biometrico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7" loext:marker-style-name="T46"><text:soft-page-break/><text:span text:style-name="T43">-- seguranca.relacionament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seguranca.relacionament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relacionamento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sujeit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bjet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tipo_relacionamento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inicio_validade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fim_validade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relacionamento_pkey_1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relacionamento_org_objeto_1</text:span><text:span text:style-name="T48"> </text:span><text:span text:style-name="T47">ON</text:span><text:span text:style-name="T48"> </text:span><text:span text:style-name="T49">seguranca</text:span><text:span text:style-name="T48">.</text:span><text:span text:style-name="T49">relacionamento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objeto_id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relacionamento_org_sujeito_1</text:span><text:span text:style-name="T48"> </text:span><text:span text:style-name="T47">ON</text:span><text:span text:style-name="T48"> </text:span><text:span text:style-name="T49">seguranca</text:span><text:span text:style-name="T48">.</text:span><text:span text:style-name="T49">relacionamento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sujeito_id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relacionament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seguranca</text:span><text:span text:style-name="T48">.</text:span><text:span text:style-name="T49">relacionamento</text:span><text:span text:style-name="T48"> </text:span><text:span text:style-name="T47">TO</text:span><text:span text:style-name="T48"> </text:span><text:span text:style-name="T49">postgres</text:span><text:span text:style-name="T50">;</text:span></text:p>
      <text:p text:style-name="P8" loext:marker-style-name="T46"/>
      <text:p text:style-name="P8" loext:marker-style-name="T46"/>
      <text:p text:style-name="P8" loext:marker-style-name="T46"/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SCHEMA</text:span><text:span text:style-name="T48"> </text:span><text:span text:style-name="T49">seguranca</text:span><text:span text:style-name="T48"> </text:span><text:span text:style-name="T47">TO</text:span><text:span text:style-name="T48"> </text:span><text:span text:style-name="T49">backend</text:span><text:span text:style-name="T50">;</text:span></text:p>
      <text:h text:style-name="P5" text:outline-level="3"><text:span text:style-name="T42">5</text:span>.3 Resumo Técnico e Diretrizes do Schema</text:h>
      <text:list text:style-name="L6">
        <text:list-item>
          <text:p text:style-name="P19"><text:span text:style-name="Strong_20_Emphasis">Autorização Dinâmica (ABAC/PBAC):</text:span> Este schema detém tabelas vitais para a política de Zero Trust e autorização independente do Keycloak, abrigando as tabelas <text:span text:style-name="Source_20_Text">excecao_permissao_usuario</text:span> e <text:span text:style-name="Source_20_Text">relacionamento</text:span>. Elas servem de espinha dorsal para um Motor de Políticas Dinâmico (Policy Decision Point customizado), registrando quem pode fazer o quê através de colunas robustas (<text:span text:style-name="Source_20_Text">condicao_json</text:span> e <text:span text:style-name="Source_20_Text">tipo_relacionamento</text:span>). </text:p>
        </text:list-item>
        <text:list-item>
          <text:p text:style-name="P20"><text:span text:style-name="Strong_20_Emphasis">Controle de Consentimento e Dispositivo:</text:span> Com a LGPD em mente, tabelas como <text:span text:style-name="Source_20_Text">consentimento</text:span> foram colocadas explicitamente para atestar juridicamente a permissão do tratamento de informações biométricas do usuário em prol da organização alvo. A tabela <text:span text:style-name="Source_20_Text">dispositivo</text:span> orquestra a vinculação e a confiança entre o equipamento de uso e a validação do token (mitigação de hardware). </text:p>
        </text:list-item>
      </text:list>
      <text:h text:style-name="P4" text:outline-level="2"><text:soft-page-break/><text:span text:style-name="T42">6</text:span>. O Schema: <text:span text:style-name="T42">f</text:span>olha_Ponto</text:h>
      <text:h text:style-name="P5" text:outline-level="3"><text:span text:style-name="T42">6</text:span>.1 Introdução e Descrição Técnica</text:h>
      <text:p text:style-name="P21"><text:span text:style-name="T17">O schema </text:span><text:span text:style-name="Source_20_Text"><text:span text:style-name="T13">folha_ponto</text:span></text:span><text:span text:style-name="T11"> </text:span><text:span text:style-name="T17">concentra as fronteiras lógicas do negócio focado estritamente na gestão temporal. Diferente dos schemas anteriores, este módulo é 100% desenhado para o modelo multi-tenant. A esmagadora maioria das tabelas possui o pilar </text:span><text:span text:style-name="Source_20_Text"><text:span text:style-name="T13">organizacao_id</text:span></text:span><text:span text:style-name="T17">. Com a migração da arquitetura antifraude e de autorização para o schema de segurança, o </text:span><text:span text:style-name="Source_20_Text"><text:span text:style-name="T13">folha_ponto</text:span></text:span><text:span text:style-name="T11"> </text:span><text:span text:style-name="T17">ficou extremamente enxuto e escalável, focando na orquestração de Organizações, Unidades (Geofences), Convites, Vínculos Organizacionais (Roles Básicas) e a gravação crua e imutável do Registro de Presença.</text:span></text:p>
      <text:h text:style-name="P5" text:outline-level="3"><text:span text:style-name="T42">6</text:span>.2 Definição Física do Banco (DDL)</text:h>
      <text:p text:style-name="P7" loext:marker-style-name="T46"><text:span text:style-name="Source_20_Text"><text:span text:style-name="T44">-- =========================================</text:span></text:span></text:p>
      <text:p text:style-name="P7" loext:marker-style-name="T46"><text:span text:style-name="T43">-- SCHEMA</text:span><text:span text:style-name="T43"/></text:p>
      <text:p text:style-name="P7" loext:marker-style-name="T46"><text:span text:style-name="T43">-- =========================================</text:span><text:span text:style-name="T43"/></text:p>
      <text:p text:style-name="P7" loext:marker-style-name="T46"><text:span text:style-name="T47">CREATE</text:span><text:span text:style-name="T48"> </text:span><text:span text:style-name="T47">SCHEMA</text:span><text:span text:style-name="T48"> </text:span><text:span text:style-name="T47">IF</text:span><text:span text:style-name="T48"> </text:span><text:span text:style-name="T47">NOT</text:span><text:span text:style-name="T48"> </text:span><text:span text:style-name="T47">EXISTS</text:span><text:span text:style-name="T48"> </text:span><text:span text:style-name="T49">folha_ponto</text:span><text:span text:style-name="T50">;</text:span></text:p>
      <text:p text:style-name="P7" loext:marker-style-name="T46"><text:span text:style-name="T47">SET</text:span><text:span text:style-name="T48"> </text:span><text:span text:style-name="T49">search_path</text:span><text:span text:style-name="T48"> </text:span><text:span text:style-name="T47">TO</text:span><text:span text:style-name="T48"> </text:span><text:span text:style-name="T49">folha_ponto</text:span><text:span text:style-name="T50">;</text:span></text:p>
      <text:p text:style-name="P8" loext:marker-style-name="T46"/>
      <text:p text:style-name="P7" loext:marker-style-name="T46"><text:span text:style-name="T43">-- folha_ponto.organizaca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organizaca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organizacao</text:span><text:span text:style-name="T48"> (</text:span></text:p>
      <text:p text:style-name="P7" loext:marker-style-name="T46"><text:span text:style-name="T48"><text:tab/></text:span><text:span text:style-name="T54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55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nome</text:span><text:span text:style-name="T48"> </text:span><text:span text:style-name="T47">varchar</text:span><text:span text:style-name="T48">(</text:span><text:span text:style-name="T56">255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ATIVO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organizacao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org_criado_por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organizacao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criado_por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organizaca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organizacao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unidade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unidade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unidade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nome</text:span><text:span text:style-name="T48"> </text:span><text:span text:style-name="T47">varchar</text:span><text:span text:style-name="T48">(</text:span><text:span text:style-name="T56">255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tipo_geometria</text:span><text:span text:style-name="T48"> </text:span><text:span text:style-name="T47">varchar</text:span><text:span text:style-name="T48">(</text:span><text:span text:style-name="T56">16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entro_geo_lat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entro_geo_lng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aio_geo_metros</text:span><text:span text:style-name="T48"> </text:span><text:span text:style-name="T49">int4</text:span><text:span text:style-name="T48"> </text:span><text:span text:style-name="T47">NULL</text:span><text:span text:style-name="T48">,</text:span></text:p>
      <text:p text:style-name="P7" loext:marker-style-name="T46"><text:soft-page-break/><text:span text:style-name="T48"><text:tab/></text:span><text:span text:style-name="T49">poligono_geo</text:span><text:span text:style-name="T48"> </text:span><text:span text:style-name="T49">jsonb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unidade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unidade_organizacao_id_fkey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organizacao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organizaca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unidade_org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unidade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unidade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unidade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vinculo_usuario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vinculo_usuario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vinculo_usuario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apel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ata_inicio</text:span><text:span text:style-name="T48"> </text:span><text:span text:style-name="T47">timestamp</text:span><text:span text:style-name="T48"> </text:span><text:span text:style-name="T47">DEFAULT</text:span><text:span text:style-name="T48"> </text:span><text:span text:style-name="T49">CURRENT_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ata_fi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ATIVO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vinculo_usuario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vinculo_usuario_organizacao_id_fkey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organizacao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organizacao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vinculo_usuario_org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vinculo_usuario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usuario_id</text:span><text:span text:style-name="T48">, </text:span><text:span text:style-name="T49">organizacao_id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vinculo_usuario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vinculo_usuario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alocacao_unidade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alocacao_unidade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vinculo_usuari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nidade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apel_operacional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ATIVO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ata_inicio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oft-page-break/><text:span text:style-name="T48"><text:tab/></text:span><text:span text:style-name="T49">data_fi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alocacao_unidade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chk_alocacao_papel</text:span><text:span text:style-name="T48"> </text:span><text:span text:style-name="T47">CHECK</text:span><text:span text:style-name="T48"> (((</text:span><text:span text:style-name="T49">papel_operacional</text:span><text:span text:style-name="T48">)::</text:span><text:span text:style-name="T49">text</text:span><text:span text:style-name="T48"> = </text:span><text:span text:style-name="T47">ANY</text:span><text:span text:style-name="T48"> ((</text:span><text:span text:style-name="T47">ARRAY</text:span><text:span text:style-name="T48">[</text:span><text:span text:style-name="T57">'PARTICIPANTE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MANAGER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GESTOR_TITULAR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GESTOR_SUBSTITUTO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ASSISTENTE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OWNER'</text:span><text:span text:style-name="T48">::</text:span><text:span text:style-name="T47">character</text:span><text:span text:style-name="T48"> </text:span><text:span text:style-name="T47">varying</text:span><text:span text:style-name="T48">])::</text:span><text:span text:style-name="T49">text</text:span><text:span text:style-name="T48">[]))),</text:span></text:p>
      <text:p text:style-name="P7" loext:marker-style-name="T46"><text:span text:style-name="T48"><text:tab/></text:span><text:span text:style-name="T47">CONSTRAINT</text:span><text:span text:style-name="T48"> </text:span><text:span text:style-name="T49">chk_alocacao_status</text:span><text:span text:style-name="T48"> </text:span><text:span text:style-name="T47">CHECK</text:span><text:span text:style-name="T48"> (((</text:span><text:span text:style-name="T49">status</text:span><text:span text:style-name="T48">)::</text:span><text:span text:style-name="T49">text</text:span><text:span text:style-name="T48"> = </text:span><text:span text:style-name="T47">ANY</text:span><text:span text:style-name="T48"> ((</text:span><text:span text:style-name="T47">ARRAY</text:span><text:span text:style-name="T48">[</text:span><text:span text:style-name="T57">'ATIVO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SUSPENSO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ENCERRADO'</text:span><text:span text:style-name="T48">::</text:span><text:span text:style-name="T47">character</text:span><text:span text:style-name="T48"> </text:span><text:span text:style-name="T47">varying</text:span><text:span text:style-name="T48">])::</text:span><text:span text:style-name="T49">text</text:span><text:span text:style-name="T48">[]))),</text:span></text:p>
      <text:p text:style-name="P7" loext:marker-style-name="T46"><text:span text:style-name="T48"><text:tab/></text:span><text:span text:style-name="T47">CONSTRAINT</text:span><text:span text:style-name="T48"> </text:span><text:span text:style-name="T49">fk_alocacao_unidade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unidade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unidade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fk_alocacao_vinculo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vinculo_usuario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vinculo_usuario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alocacao_vinculo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alocacao_unidade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vinculo_usuario_id</text:span><text:span text:style-name="T48">, </text:span><text:span text:style-name="T49">status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convite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convite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convite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nidade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apel_esperado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PARTICIPANTE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odigo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ata_expiracao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sado</text:span><text:span text:style-name="T48"> </text:span><text:span text:style-name="T49">bool</text:span><text:span text:style-name="T48"> </text:span><text:span text:style-name="T47">DEFAULT</text:span><text:span text:style-name="T48"> </text:span><text:span text:style-name="T47">false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chk_convite_papel</text:span><text:span text:style-name="T48"> </text:span><text:span text:style-name="T47">CHECK</text:span><text:span text:style-name="T48"> (((</text:span><text:span text:style-name="T49">papel_esperado</text:span><text:span text:style-name="T48">)::</text:span><text:span text:style-name="T49">text</text:span><text:span text:style-name="T48"> = </text:span><text:span text:style-name="T47">ANY</text:span><text:span text:style-name="T48"> ((</text:span><text:span text:style-name="T47">ARRAY</text:span><text:span text:style-name="T48">[</text:span><text:span text:style-name="T57">'PARTICIPANTE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MANAGER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GESTOR_TITULAR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GESTOR_SUBSTITUTO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ASSISTENTE'</text:span><text:span text:style-name="T48">::</text:span><text:span text:style-name="T47">character</text:span><text:span text:style-name="T48"> </text:span><text:span text:style-name="T47">varying</text:span><text:span text:style-name="T48">, </text:span><text:span text:style-name="T57">'OWNER'</text:span><text:span text:style-name="T48">::</text:span><text:span text:style-name="T47">character</text:span><text:span text:style-name="T48"> </text:span><text:span text:style-name="T47">varying</text:span><text:span text:style-name="T48">])::</text:span><text:span text:style-name="T49">text</text:span><text:span text:style-name="T48">[]))),</text:span></text:p>
      <text:p text:style-name="P7" loext:marker-style-name="T46"><text:span text:style-name="T48"><text:tab/></text:span><text:span text:style-name="T47">CONSTRAINT</text:span><text:span text:style-name="T48"> </text:span><text:span text:style-name="T49">convite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convite_organizacao_id_fkey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organizacao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organizacao</text:span><text:span text:style-name="T48">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fk_convite_unidade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unidade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unidade</text:span><text:span text:style-name="T48">(</text:span><text:span text:style-name="T49">id</text:span><text:span text:style-name="T48">) </text:span><text:span text:style-name="T47">ON</text:span><text:span text:style-name="T48"> </text:span><text:span text:style-name="T47">DELETE</text:span><text:span text:style-name="T48"> </text:span><text:span text:style-name="T47">CASCADE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UNIQUE</text:span><text:span text:style-name="T48"> </text:span><text:span text:style-name="T47">INDEX</text:span><text:span text:style-name="T48"> </text:span><text:span text:style-name="T49">uq_convite_codigo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convite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codigo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convite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oft-page-break/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convite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registro_presenca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registro_presenca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registro_presenca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DEFAULT</text:span><text:span text:style-name="T48"> </text:span><text:span text:style-name="T49">gen_random_uuid</text:span><text:span text:style-name="T48">(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organizacao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nidade_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latitude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longitude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recisao_gps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ferencia_biometrica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ontuacao_biometrica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biometria_valida</text:span><text:span text:style-name="T48"> </text:span><text:span text:style-name="T49">bool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ispositivo_id</text:span><text:span text:style-name="T48"> </text:span><text:span text:style-name="T47">varchar</text:span><text:span text:style-name="T48">(</text:span><text:span text:style-name="T56">128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modo_registro</text:span><text:span text:style-name="T48"> </text:span><text:span text:style-name="T47">varchar</text:span><text:span text:style-name="T48">(</text:span><text:span text:style-name="T56">16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usuario_intermedi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pontuacao_risco</text:span><text:span text:style-name="T48"> </text:span><text:span text:style-name="T49">floa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indicadores_risco</text:span><text:span text:style-name="T48"> </text:span><text:span text:style-name="T49">jsonb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status_tecnico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RECEBIDO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status_administrativo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DEFAULT</text:span><text:span text:style-name="T48"> </text:span><text:span text:style-name="T57">'PENDENTE'</text:span><text:span text:style-name="T48">::</text:span><text:span text:style-name="T47">character</text:span><text:span text:style-name="T48"> </text:span><text:span text:style-name="T47">varying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aptur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cebido_no_servidor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registro_presenca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registro_presenca_organizacao_id_fkey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organizacao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organizacao</text:span><text:span text:style-name="T48">(</text:span><text:span text:style-name="T49">id</text:span><text:span text:style-name="T48">),</text:span></text:p>
      <text:p text:style-name="P7" loext:marker-style-name="T46"><text:span text:style-name="T48"><text:tab/></text:span><text:span text:style-name="T47">CONSTRAINT</text:span><text:span text:style-name="T48"> </text:span><text:span text:style-name="T49">registro_presenca_unidade_id_fkey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49">unidade_id</text:span><text:span text:style-name="T48">) </text:span><text:span text:style-name="T47">REFERENCES</text:span><text:span text:style-name="T48"> </text:span><text:span text:style-name="T49">folha_ponto</text:span><text:span text:style-name="T48">.</text:span><text:span text:style-name="T49">unidade</text:span><text:span text:style-name="T48">(</text:span><text:span text:style-name="T49">id</text:span><text:span text:style-name="T48">)</text:span></text:p>
      <text:p text:style-name="P7" loext:marker-style-name="T46"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resenca_org_tempo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registro_presenca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recebido_no_servidor_em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resenca_org_usuario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registro_presenca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organizacao_id</text:span><text:span text:style-name="T48">, </text:span><text:span text:style-name="T49">usuario_id</text:span><text:span text:style-name="T48">)</text:span><text:span text:style-name="T50">;</text:span></text:p>
      <text:p text:style-name="P7" loext:marker-style-name="T46"><text:span text:style-name="T47">CREATE</text:span><text:span text:style-name="T48"> </text:span><text:span text:style-name="T47">INDEX</text:span><text:span text:style-name="T48"> </text:span><text:span text:style-name="T49">idx_presenca_unidade_tempo</text:span><text:span text:style-name="T48"> </text:span><text:span text:style-name="T47">ON</text:span><text:span text:style-name="T48"> </text:span><text:span text:style-name="T49">folha_ponto</text:span><text:span text:style-name="T48">.</text:span><text:span text:style-name="T49">registro_presenca</text:span><text:span text:style-name="T48"> </text:span><text:span text:style-name="T47">USING</text:span><text:span text:style-name="T48"> </text:span><text:span text:style-name="T49">btree</text:span><text:span text:style-name="T48"> (</text:span><text:span text:style-name="T49">unidade_id</text:span><text:span text:style-name="T48">, </text:span><text:span text:style-name="T49">recebido_no_servidor_em</text:span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registro_presenca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registro_presenca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alocacao_unidade_aud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alocacao_unidade_aud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_aud</text:span><text:span text:style-name="T48"> (</text:span></text:p>
      <text:p text:style-name="P7" loext:marker-style-name="T46"><text:span text:style-name="T48"><text:tab/></text:span><text:span text:style-name="T49">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v</text:span><text:span text:style-name="T48"> </text:span><text:span text:style-name="T49">int8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vtype</text:span><text:span text:style-name="T48"> </text:span><text:span text:style-name="T49">int2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vinculo_usuario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oft-page-break/><text:span text:style-name="T48"><text:tab/></text:span><text:span text:style-name="T49">unidade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papel_operacional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data_inicio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data_fi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cri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49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v_end</text:span><text:span text:style-name="T48"> </text:span><text:span text:style-name="T49">in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9">revend_tstmp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alocacao_unidade_aud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49">id</text:span><text:span text:style-name="T48">, </text:span><text:span text:style-name="T49">rev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_aud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alocacao_unidade_aud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vinculo_usuario_aud definition</text:span><text:span text:style-name="T43"/></text:p>
      <text:p text:style-name="P8" loext:marker-style-name="T46"/>
      <text:p text:style-name="P7" loext:marker-style-name="T46"><text:span text:style-name="T43">-- Drop table</text:span><text:span text:style-name="T43"/></text:p>
      <text:p text:style-name="P8" loext:marker-style-name="T46"/>
      <text:p text:style-name="P7" loext:marker-style-name="T46"><text:span text:style-name="T43">-- DROP TABLE folha_ponto.vinculo_usuario_aud;</text:span><text:span text:style-name="T43"/></text:p>
      <text:p text:style-name="P8" loext:marker-style-name="T46"/>
      <text:p text:style-name="P7" loext:marker-style-name="T46"><text:span text:style-name="T47">CREATE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vinculo_usuario_aud</text:span><text:span text:style-name="T48"> (</text:span></text:p>
      <text:p text:style-name="P7" loext:marker-style-name="T46"><text:span text:style-name="T48"><text:tab/></text:span><text:span text:style-name="T54">id</text:span><text:span text:style-name="T48"> </text:span><text:span text:style-name="T49">uuid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rev</text:span><text:span text:style-name="T48"> </text:span><text:span text:style-name="T49">int8</text:span><text:span text:style-name="T48"> </text:span><text:span text:style-name="T47">NOT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revtype</text:span><text:span text:style-name="T48"> </text:span><text:span text:style-name="T49">int2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organizacao_id</text:span><text:span text:style-name="T48"> </text:span><text:span text:style-name="T49">uuid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usuario_id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papel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status</text:span><text:span text:style-name="T48"> </text:span><text:span text:style-name="T47">varchar</text:span><text:span text:style-name="T48">(</text:span><text:span text:style-name="T56">32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data_inicio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data_fi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cri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cri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por</text:span><text:span text:style-name="T48"> </text:span><text:span text:style-name="T47">varchar</text:span><text:span text:style-name="T48">(</text:span><text:span text:style-name="T56">64</text:span><text:span text:style-name="T48">) </text:span><text:span text:style-name="T47">NULL</text:span><text:span text:style-name="T48">,</text:span></text:p>
      <text:p text:style-name="P7" loext:marker-style-name="T46"><text:span text:style-name="T48"><text:tab/></text:span><text:span text:style-name="T54">atualizado_em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rev_end</text:span><text:span text:style-name="T48"> </text:span><text:span text:style-name="T49">int8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54">revend_tstmp</text:span><text:span text:style-name="T48"> </text:span><text:span text:style-name="T47">timestamp</text:span><text:span text:style-name="T48"> </text:span><text:span text:style-name="T47">NULL</text:span><text:span text:style-name="T48">,</text:span></text:p>
      <text:p text:style-name="P7" loext:marker-style-name="T46"><text:span text:style-name="T48"><text:tab/></text:span><text:span text:style-name="T47">CONSTRAINT</text:span><text:span text:style-name="T48"> </text:span><text:span text:style-name="T49">vinculo_usuario_aud_pkey</text:span><text:span text:style-name="T48"> </text:span><text:span text:style-name="T47">PRIMARY</text:span><text:span text:style-name="T48"> </text:span><text:span text:style-name="T47">KEY</text:span><text:span text:style-name="T48"> (</text:span><text:span text:style-name="T54">id</text:span><text:span text:style-name="T48">, </text:span><text:span text:style-name="T54">rev</text:span><text:span text:style-name="T48">)</text:span></text:p>
      <text:p text:style-name="P7" loext:marker-style-name="T46"><text:span text:style-name="T48">)</text:span><text:span text:style-name="T50">;</text:span></text:p>
      <text:p text:style-name="P8" loext:marker-style-name="T46"/>
      <text:p text:style-name="P7" loext:marker-style-name="T46"><text:span text:style-name="T43">-- Permission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vinculo_usuario_aud</text:span><text:span text:style-name="T48"> </text:span><text:span text:style-name="T49">OWNER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7" loext:marker-style-name="T46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TABLE</text:span><text:span text:style-name="T48"> </text:span><text:span text:style-name="T49">folha_ponto</text:span><text:span text:style-name="T48">.</text:span><text:span text:style-name="T49">vinculo_usuario_aud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alocacao_unidade_aud foreign key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alocacao_unidade_aud</text:span><text:span text:style-name="T48"> </text:span><text:span text:style-name="T47">ADD</text:span><text:span text:style-name="T48"> </text:span><text:span text:style-name="T47">CONSTRAINT</text:span><text:span text:style-name="T48"> </text:span><text:span text:style-name="T49">fk_alocacao_unidade_aud_rev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54">rev</text:span><text:span text:style-name="T48">) </text:span><text:span text:style-name="T47">REFERENCES</text:span><text:span text:style-name="T48"> </text:span><text:span text:style-name="T52">auditoria</text:span><text:span text:style-name="T48">.</text:span><text:span text:style-name="T52">revinfo</text:span><text:span text:style-name="T48">(</text:span><text:span text:style-name="T54">id</text:span><text:span text:style-name="T48">)</text:span><text:span text:style-name="T50">;</text:span></text:p>
      <text:p text:style-name="P8" loext:marker-style-name="T46"/>
      <text:p text:style-name="P8" loext:marker-style-name="T46"/>
      <text:p text:style-name="P7" loext:marker-style-name="T46"><text:span text:style-name="T43">-- folha_ponto.vinculo_usuario_aud foreign keys</text:span><text:span text:style-name="T43"/></text:p>
      <text:p text:style-name="P8" loext:marker-style-name="T46"/>
      <text:p text:style-name="P7" loext:marker-style-name="T46"><text:span text:style-name="T47">ALTER</text:span><text:span text:style-name="T48"> </text:span><text:span text:style-name="T47">TABLE</text:span><text:span text:style-name="T48"> </text:span><text:span text:style-name="T52">folha_ponto</text:span><text:span text:style-name="T48">.</text:span><text:span text:style-name="T52">vinculo_usuario_aud</text:span><text:span text:style-name="T48"> </text:span><text:span text:style-name="T47">ADD</text:span><text:span text:style-name="T48"> </text:span><text:span text:style-name="T47">CONSTRAINT</text:span><text:span text:style-name="T48"> </text:span><text:span text:style-name="T49">fk_vinculo_usuario_aud_rev</text:span><text:span text:style-name="T48"> </text:span><text:span text:style-name="T47">FOREIGN</text:span><text:span text:style-name="T48"> </text:span><text:span text:style-name="T47">KEY</text:span><text:span text:style-name="T48"> (</text:span><text:span text:style-name="T54">rev</text:span><text:span text:style-name="T48">) </text:span><text:span text:style-name="T47">REFERENCES</text:span><text:span text:style-name="T48"> </text:span><text:span text:style-name="T52">auditoria</text:span><text:span text:style-name="T48">.</text:span><text:span text:style-name="T52">revinfo</text:span><text:span text:style-name="T48">(</text:span><text:span text:style-name="T54">id</text:span><text:span text:style-name="T48">)</text:span><text:span text:style-name="T50">;</text:span></text:p>
      <text:p text:style-name="P8" loext:marker-style-name="T46"/>
      <text:p text:style-name="P8" loext:marker-style-name="T46"><text:soft-page-break/></text:p>
      <text:p text:style-name="P7" loext:marker-style-name="T46"><text:span text:style-name="T43">-- Permissions</text:span><text:span text:style-name="T43"/></text:p>
      <text:p text:style-name="P8" loext:marker-style-name="T46"/>
      <text:p text:style-name="Standard"><text:span text:style-name="T47">GRANT</text:span><text:span text:style-name="T48"> </text:span><text:span text:style-name="T47">ALL</text:span><text:span text:style-name="T48"> </text:span><text:span text:style-name="T47">ON</text:span><text:span text:style-name="T48"> </text:span><text:span text:style-name="T47">SCHEMA</text:span><text:span text:style-name="T48"> </text:span><text:span text:style-name="T49">folha_ponto</text:span><text:span text:style-name="T48"> </text:span><text:span text:style-name="T47">TO</text:span><text:span text:style-name="T48"> </text:span><text:span text:style-name="T49">backend</text:span><text:span text:style-name="T50">;</text:span></text:p>
      <text:p text:style-name="Standard"><text:span text:style-name="Source_20_Text"><text:span text:style-name="T51"/></text:span></text:p>
      <text:h text:style-name="Heading_20_3" text:outline-level="3"><text:span text:style-name="T42">6</text:span>.3 Resumo Técnico e Diretrizes do Schema</text:h>
      <text:list text:continue-numbering="true" text:style-name="L6">
        <text:list-item>
          <text:p text:style-name="P18"><text:span text:style-name="Strong_20_Emphasis">Isolamento de Locatário (Tenant):</text:span> Tabelas cruciais como <text:span text:style-name="Source_20_Text">organizacao</text:span>, <text:span text:style-name="Source_20_Text">unidade</text:span>, <text:span text:style-name="Source_20_Text">vinculo_usuario</text:span>, <text:span text:style-name="Source_20_Text">convite</text:span> e <text:span text:style-name="Source_20_Text">registro_presenca</text:span> carregam consigo índices compostos e amarrações com a tabela raiz de organizações, garantindo que queries possam ser particionadas ou filtradas isolando cada cliente Enterprise. </text:p>
        </text:list-item>
        <text:list-item>
          <text:p text:style-name="P19"><text:span text:style-name="Strong_20_Emphasis">Registro de Eventos Imutáveis:</text:span> <text:span text:style-name="T17">A tabela </text:span><text:span text:style-name="Source_20_Text"><text:span text:style-name="T13">registro_presenca</text:span></text:span><text:span text:style-name="T11"> </text:span><text:span text:style-name="T17">concretiza a tese do Comando Único. Ela prevê colunas físicas tanto para o momento real do clique no celular (</text:span><text:span text:style-name="Source_20_Text"><text:span text:style-name="T13">capturado_em</text:span></text:span><text:span text:style-name="T17">), quanto o Timestamp Seguro blindado do próprio servidor (</text:span><text:span text:style-name="Source_20_Text"><text:span text:style-name="T13">recebido_no_servidor_em</text:span></text:span><text:span text:style-name="T17">). Classifica o dado de tempo de forma inalterável.</text:span></text:p>
        </text:list-item>
        <text:list-item>
          <text:p text:style-name="P19"><text:span text:style-name="Strong_20_Emphasis"><text:span text:style-name="T14">Auditoria de Histórico (Padrão Envers):</text:span></text:span><text:span text:style-name="T17"> O schema </text:span><text:span text:style-name="Source_20_Text"><text:span text:style-name="T17">folha_ponto</text:span></text:span><text:span text:style-name="T17"> implementa o rastreamento integral (snapshots temporais) das tabelas mais sensíveis de permissões (</text:span><text:span text:style-name="Source_20_Text"><text:span text:style-name="T17">alocacao_unidade_aud</text:span></text:span><text:span text:style-name="T17"> e </text:span><text:span text:style-name="Source_20_Text"><text:span text:style-name="T17">vinculo_usuario_aud</text:span></text:span><text:span text:style-name="T17">), atrelando cada modificação a uma tabela de revisão (</text:span><text:span text:style-name="Source_20_Text"><text:span text:style-name="T17">revinfo</text:span></text:span><text:span text:style-name="T17">). Isso cria uma "máquina do tempo" perfeita para o organograma da organização. 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4:28:24.741431721</meta:creation-date>
    <dc:date>2026-05-08T18:30:34.822459167</dc:date>
    <meta:editing-duration>PT56M28S</meta:editing-duration>
    <meta:editing-cycles>9</meta:editing-cycles>
    <meta:generator>LibreOffice/24.2.7.2$Linux_X86_64 LibreOffice_project/420$Build-2</meta:generator>
    <meta:print-date>2026-05-08T18:25:03.168571327</meta:print-date>
    <meta:printed-by>Arquivos PDF</meta:printed-by>
    <meta:document-statistic meta:table-count="0" meta:image-count="0" meta:object-count="0" meta:page-count="22" meta:paragraph-count="863" meta:word-count="4381" meta:character-count="38422" meta:non-whitespace-character-count="33449"/>
  </office:meta>
</office:document-meta>
</file>