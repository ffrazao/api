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895cm"/>
    </style:style>
    <style:style style:name="Tabela1.B" style:family="table-column">
      <style:table-column-properties style:column-width="2.76cm"/>
    </style:style>
    <style:style style:name="Tabela1.C" style:family="table-column">
      <style:table-column-properties style:column-width="10.345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3.381cm" table:align="left"/>
    </style:style>
    <style:style style:name="Tabela2.A" style:family="table-column">
      <style:table-column-properties style:column-width="4.023cm"/>
    </style:style>
    <style:style style:name="Tabela2.B" style:family="table-column">
      <style:table-column-properties style:column-width="1.785cm"/>
    </style:style>
    <style:style style:name="Tabela2.C" style:family="table-column">
      <style:table-column-properties style:column-width="7.572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paragraph-rsid="000d4a94"/>
    </style:style>
    <style:style style:name="P5" style:family="paragraph" style:parent-style-name="Text_20_body">
      <style:text-properties style:use-window-font-color="true" loext:opacity="0%" style:font-name="Liberation Serif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cm" fo:margin-bottom="0cm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cm" fo:margin-bottom="0cm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cm" fo:margin-bottom="0cm" style:contextual-spacing="false"/>
    </style:style>
    <style:style style:name="T1" style:family="text">
      <style:text-properties officeooo:rsid="000e95ce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font-size="12pt" fo:letter-spacing="normal" fo:font-style="normal" fo:font-weight="normal"/>
    </style:style>
    <style:style style:name="T5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/>
    </style:style>
    <style:style style:name="T6" style:family="text">
      <style:text-properties fo:font-variant="normal" fo:text-transform="none" style:use-window-font-color="true" loext:opacity="0%" style:font-name="Liberation Serif" fo:letter-spacing="normal"/>
    </style:style>
    <style:style style:name="T7" style:family="text">
      <style:text-properties fo:font-variant="normal" fo:text-transform="none" style:use-window-font-color="true" loext:opacity="0%" style:font-name="Liberation Serif" fo:letter-spacing="normal" fo:font-style="normal" fo:font-weight="normal"/>
    </style:style>
    <style:style style:name="T8" style:family="text">
      <style:text-properties fo:font-size="12pt" fo:letter-spacing="normal" fo:font-style="italic" fo:font-weight="normal"/>
    </style:style>
    <style:style style:name="T9" style:family="text">
      <style:text-properties officeooo:rsid="000e9d2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FC-0006</text:h>
      <text:h text:style-name="Heading_20_1" text:outline-level="1">Arquitetura de Autorização Granular e Controle de Acesso Dinâmico</text:h>
      <text:p text:style-name="P4"><text:span text:style-name="Strong_20_Emphasis">Status:</text:span> Aprovado e Atualizado (v1.2) </text:p>
      <text:p text:style-name="P4"><text:span text:style-name="Strong_20_Emphasis">Autor:</text:span> Equipe de Arquitetura </text:p>
      <text:p text:style-name="P4"><text:span text:style-name="Strong_20_Emphasis">Data:</text:span> 07/05/2026 </text:p>
      <text:p text:style-name="P4"><text:span text:style-name="Strong_20_Emphasis">Depende de:</text:span> RFC-0001, RFC-0002, RFC-0005, Arquitetura de Identidade e Acesso Segura</text:p>
      <text:p text:style-name="Horizontal_20_Line"/>
      <text:h text:style-name="Heading_20_2" text:outline-level="2">1. Objetivo</text:h>
      <text:p text:style-name="Text_20_body">Definir a arquitetura de autorização <text:span text:style-name="Strong_20_Emphasis">extremamente granular</text:span>, permitindo:</text:p>
      <text:list text:style-name="L1">
        <text:list-item>
          <text:p text:style-name="P7">Controle por <text:span text:style-name="Strong_20_Emphasis">endpoint + método HTTP</text:span>. </text:p>
        </text:list-item>
        <text:list-item>
          <text:p text:style-name="P7">Controle por <text:span text:style-name="Strong_20_Emphasis">atributos do recurso (field-level security)</text:span>. </text:p>
        </text:list-item>
        <text:list-item>
          <text:p text:style-name="P7">Controle por <text:span text:style-name="Strong_20_Emphasis">usuário individual (ABAC / PBAC)</text:span>. </text:p>
        </text:list-item>
        <text:list-item>
          <text:p text:style-name="P7">Governança centralizada e auditável. </text:p>
        </text:list-item>
        <text:list-item>
          <text:p text:style-name="P6">Total autonomia de domínio (isolamento estrito do Keycloak e proteção de dados LGPD). </text:p>
        </text:list-item>
      </text:list>
      <text:p text:style-name="Text_20_body">Este RFC complementa o modelo híbrido RBAC+ABAC (RFC-0002), introduzindo o Motor Interno de Políticas (Policy Decision Point - PDP) gerido inteiramente pela aplicação e apoiado pelo banco de dados PostgreSQL.</text:p>
      <text:p text:style-name="Horizontal_20_Line"/>
      <text:h text:style-name="Heading_20_2" text:outline-level="2">2. Problema</text:h>
      <text:p text:style-name="Text_20_body">O modelo tradicional baseado apenas em roles genéricas do Provedor de Identidade (Keycloak):</text:p>
      <text:list text:style-name="L2">
        <text:list-item>
          <text:p text:style-name="P9">Causa inchaço do token JWT com dados sensíveis de permissões organizacionais. </text:p>
        </text:list-item>
        <text:list-item>
          <text:p text:style-name="P9">Não permite variações finas por usuário dentro de contextos multi-tenant. </text:p>
        </text:list-item>
        <text:list-item>
          <text:p text:style-name="P9">Não controla campos específicos na resposta da API. </text:p>
        </text:list-item>
        <text:list-item>
          <text:p text:style-name="P8">Não diferencia permissões por contexto físico e temporal (horário, geolocalização da unidade). </text:p>
        </text:list-item>
      </text:list>
      <text:p text:style-name="Text_20_body">Para o sistema de controle de presença e jornada, é necessário:</text:p>
      <text:list text:style-name="L3">
        <text:list-item>
          <text:p text:style-name="P11">Restringir a visualização de dados e aprovações estritamente pela fronteira do locatário (<text:span text:style-name="Source_20_Text">organizacao_id</text:span>) e da lotação (<text:span text:style-name="Source_20_Text">unidade_id</text:span>). </text:p>
        </text:list-item>
        <text:list-item>
          <text:p text:style-name="P11">Permitir exceções individuais. </text:p>
        </text:list-item>
        <text:list-item>
          <text:p text:style-name="P10">Filtrar os campos da resposta dinamicamente (ex: ocultar o CPF se o requisitante não possuir o perfil adequado). </text:p>
        </text:list-item>
      </text:list>
      <text:p text:style-name="Horizontal_20_Line"/>
      <text:h text:style-name="Heading_20_2" text:outline-level="2"><text:soft-page-break/>3. Requisitos</text:h>
      <text:h text:style-name="Heading_20_3" text:outline-level="3">3.1 Funcionais</text:h>
      <text:list text:style-name="L4">
        <text:list-item>
          <text:p text:style-name="P13">Autorização por endpoint, método HTTP, atributos do recurso, usuário e unidade. </text:p>
        </text:list-item>
        <text:list-item>
          <text:p text:style-name="P13">Suporte a políticas contextuais (horário oficial, geolocalização e biometria). </text:p>
        </text:list-item>
        <text:list-item>
          <text:p text:style-name="P13">Resposta parcialmente filtrada baseada no perfil. </text:p>
        </text:list-item>
        <text:list-item>
          <text:p text:style-name="P12">Auditoria completa e imutável de decisões críticas. </text:p>
        </text:list-item>
      </text:list>
      <text:h text:style-name="Heading_20_3" text:outline-level="3">3.2 Não Funcionais</text:h>
      <text:list text:style-name="L5">
        <text:list-item>
          <text:p text:style-name="P15">Baixa latência (&lt; 20ms por decisão de segurança). </text:p>
        </text:list-item>
        <text:list-item>
          <text:p text:style-name="P15">Cache distribuído para avaliação de políticas locais. </text:p>
        </text:list-item>
        <text:list-item>
          <text:p text:style-name="P15">Alta auditabilidade (Log estruturado). </text:p>
        </text:list-item>
        <text:list-item>
          <text:p text:style-name="P14"><text:span text:style-name="Strong_20_Emphasis">Conformidade LGPD:</text:span> As regras granulares devem usar a estratégia de <text:span text:style-name="Emphasis">Fetch On-Demand</text:span> e evitar <text:span text:style-name="Emphasis">Payloads</text:span> ricos no JWT. </text:p>
        </text:list-item>
      </text:list>
      <text:p text:style-name="Horizontal_20_Line"/>
      <text:h text:style-name="Heading_20_2" text:outline-level="2">4. Modelo de Autorização Proposto</text:h>
      <text:h text:style-name="Heading_20_3" text:outline-level="3">4.1 Camadas de Controle</text:h>
      <text:p text:style-name="Text_20_body">A arquitetura formaliza a remoção de acoplamento do Keycloak para autorização. Toda a decisão ocorre de forma tardia no backend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Camada</text:p>
          </table:table-cell>
          <table:table-cell table:style-name="Tabela1.A1" office:value-type="string">
            <text:p text:style-name="P3">Tipo</text:p>
          </table:table-cell>
          <table:table-cell table:style-name="Tabela1.A1" office:value-type="string">
            <text:p text:style-name="P3">Componente Técnico Responsável</text:p>
          </table:table-cell>
        </table:table-row>
        <table:table-row>
          <table:table-cell table:style-name="Tabela1.A1" office:value-type="string">
            <text:p text:style-name="P2">Autenticação e IAM</text:p>
          </table:table-cell>
          <table:table-cell table:style-name="Tabela1.A1" office:value-type="string">
            <text:p text:style-name="P2">OIDC</text:p>
          </table:table-cell>
          <table:table-cell table:style-name="Tabela1.A1" office:value-type="string">
            <text:p text:style-name="P2"><text:span text:style-name="Strong_20_Emphasis">Keycloak</text:span> (Autentica a credencial técnica).</text:p>
          </table:table-cell>
        </table:table-row>
        <table:table-row>
          <table:table-cell table:style-name="Tabela1.A1" office:value-type="string">
            <text:p text:style-name="P2">Autorização Organizacional</text:p>
          </table:table-cell>
          <table:table-cell table:style-name="Tabela1.A1" office:value-type="string">
            <text:p text:style-name="P2">RBAC</text:p>
          </table:table-cell>
          <table:table-cell table:style-name="Tabela1.A1" office:value-type="string">
            <text:p text:style-name="P2">Tabela <text:span text:style-name="Source_20_Text">folha_ponto.vinculo_usuario</text:span> (PostgreSQL).</text:p>
          </table:table-cell>
        </table:table-row>
        <table:table-row>
          <table:table-cell table:style-name="Tabela1.A1" office:value-type="string">
            <text:p text:style-name="P2">Autorização Granular</text:p>
          </table:table-cell>
          <table:table-cell table:style-name="Tabela1.A1" office:value-type="string">
            <text:p text:style-name="P2">ABAC / PBAC</text:p>
          </table:table-cell>
          <table:table-cell table:style-name="Tabela1.A1" office:value-type="string">
            <text:p text:style-name="P2"><text:span text:style-name="Strong_20_Emphasis">PDP Customizado</text:span> consumindo a tabela <text:span text:style-name="Source_20_Text">seguranca.excecao_permissao_usuario</text:span>.</text:p>
          </table:table-cell>
        </table:table-row>
        <table:table-row>
          <table:table-cell table:style-name="Tabela1.A1" office:value-type="string">
            <text:p text:style-name="P2">Proteção de Atributos</text:p>
          </table:table-cell>
          <table:table-cell table:style-name="Tabela1.A1" office:value-type="string">
            <text:p text:style-name="P2">Field-level filtering</text:p>
          </table:table-cell>
          <table:table-cell table:style-name="Tabela1.A1" office:value-type="string">
            <text:p text:style-name="P2">Middleware interno / Serializadores JSON (Jackson Filters).</text:p>
          </table:table-cell>
        </table:table-row>
      </table:table>
      <text:p text:style-name="Horizontal_20_Line"/>
      <text:h text:style-name="Heading_20_2" text:outline-level="2">5. Modelo Híbrido</text:h>
      <text:h text:style-name="Heading_20_3" text:outline-level="3">5.1 RBAC (Base Organizacional)</text:h>
      <text:p text:style-name="Text_20_body">Roles consolidadas são armazenadas estritamente na tabela <text:span text:style-name="Strong_20_Emphasis"><text:span text:style-name="Source_20_Text">folha_ponto.vinculo_usuario</text:span></text:span>, definindo permissões amplas e amarradas a um <text:span text:style-name="Source_20_Text">organizacao_id</text:span> e a um <text:span text:style-name="Source_20_Text">usuario_id</text:span> (Identidade Canônica):</text:p>
      <text:list text:style-name="L6">
        <text:list-item>
          <text:p text:style-name="P17">OWNER </text:p>
        </text:list-item>
        <text:list-item>
          <text:p text:style-name="P17">ADMIN </text:p>
        </text:list-item>
        <text:list-item>
          <text:p text:style-name="P17">MANAGER </text:p>
        </text:list-item>
        <text:list-item>
          <text:p text:style-name="P16">PARTICIPANTE </text:p>
        </text:list-item>
      </text:list>
      <text:h text:style-name="Heading_20_3" text:outline-level="3"><text:soft-page-break/>5.2 ABAC (Atributos Dinâmicos)</text:h>
      <text:p text:style-name="Text_20_body">O Motor de Políticas avalia os atributos em tempo real (dados internos do domínio):</text:p>
      <text:list text:style-name="L7">
        <text:list-item>
          <text:p text:style-name="P19">Identidade do Usuário (CPF e Confiança Biométrica). </text:p>
        </text:list-item>
        <text:list-item>
          <text:p text:style-name="P19">Relacionamento espacial (Geofence da <text:span text:style-name="Source_20_Text">unidade</text:span>). </text:p>
        </text:list-item>
        <text:list-item>
          <text:p text:style-name="P18">Escopo Temporal (Horário do evento vs Horário do servidor). </text:p>
        </text:list-item>
      </text:list>
      <text:h text:style-name="Heading_20_3" text:outline-level="3">5.3 PBAC (Policy-Based Access Control)</text:h>
      <text:p text:style-name="Text_20_body">Políticas explícitas para exceções e casos extremos gravadas no banco de dados, utilizando a coluna <text:span text:style-name="Source_20_Text">condicao_json</text:span> da tabela de exceções:</text:p>
      <text:p text:style-name="Preformatted_20_Text"><text:span text:style-name="Source_20_Text">{</text:span></text:p>
      <text:p text:style-name="Preformatted_20_Text"><text:span text:style-name="Source_20_Text"><text:s text:c="2"/>"policy": "usuario_somente_sua_unidade",</text:span></text:p>
      <text:p text:style-name="Preformatted_20_Text"><text:span text:style-name="Source_20_Text"><text:s text:c="2"/>"effect": "permit",</text:span></text:p>
      <text:p text:style-name="Preformatted_20_Text"><text:span text:style-name="Source_20_Text"><text:s text:c="2"/>"condition": "usuario.unidade_id == recurso.unidade_id"</text:span></text:p>
      <text:p text:style-name="P1"><text:span text:style-name="Source_20_Text">}</text:span></text:p>
      <text:p text:style-name="Horizontal_20_Line"/>
      <text:h text:style-name="Heading_20_2" text:outline-level="2">6. Arquitetura Técnica (Integração Segura)</text:h>
      <text:p text:style-name="Text_20_body">A orquestração obedece à diretriz de Identidade Canônica em Três Camadas.</text:p>
      <text:h text:style-name="Heading_20_3" text:outline-level="3">6.1 O Fluxo de Decisão</text:h>
      <text:list text:style-name="L8">
        <text:list-item>
          <text:p text:style-name="P21"><text:span text:style-name="Strong_20_Emphasis">Interceptação:</text:span> O usuário interage com o Frontend, e a API recebe a requisição contendo o <text:span text:style-name="Emphasis">Lightweight Access Token</text:span> (com apenas a claim <text:span text:style-name="Source_20_Text">sub</text:span>). </text:p>
        </text:list-item>
        <text:list-item>
          <text:p text:style-name="P21"><text:span text:style-name="Strong_20_Emphasis">Conversão de Identidade:</text:span> O componente <text:span text:style-name="Source_20_Text">customJwtAuthenticationConverter</text:span> intercepta o JWT, extrai o <text:span text:style-name="Source_20_Text">sub</text:span>, e consulta a tabela <text:span text:style-name="T1">seguranca</text:span><text:span text:style-name="Source_20_Text">.identidade_acesso</text:span> para localizar o CPF da pessoa. </text:p>
        </text:list-item>
        <text:list-item>
          <text:p text:style-name="P21"><text:span text:style-name="Strong_20_Emphasis">Resolução de Papéis:</text:span> O conversor busca em<text:span text:style-name="Source_20_Text"> seguranca.vinculo_usuario</text:span> as <text:span text:style-name="Emphasis">Roles</text:span> locais daquele locatário. </text:p>
        </text:list-item>
        <text:list-item>
          <text:p text:style-name="P21"><text:span text:style-name="Strong_20_Emphasis">Contexto de Segurança:</text:span> Um <text:span text:style-name="Strong_20_Emphasis"><text:span text:style-name="Source_20_Text">BusinessPrincipalToken</text:span></text:span> (agora ciente do CPF real e dos papéis de negócio) é injetado no Spring SecurityContextHolder. </text:p>
        </text:list-item>
        <text:list-item>
          <text:p text:style-name="P21"><text:span text:style-name="Strong_20_Emphasis">Avaliação Granular:</text:span> O <text:span text:style-name="Emphasis">Policy Decision Point (PDP)</text:span> do Spring Boot é invocado (via anotações de método ou <text:span text:style-name="Emphasis">interceptor</text:span>). </text:p>
        </text:list-item>
        <text:list-item>
          <text:p text:style-name="P21"><text:span text:style-name="Strong_20_Emphasis">Consulta PBAC:</text:span> O PDP cruza as informações no cache ou busca regras exclusivas na tabela <text:span text:style-name="Source_20_Text"><text:span text:style-name="T9">seguranca</text:span></text:span><text:span text:style-name="Source_20_Text">.excecao_permissao_usuario</text:span>. </text:p>
        </text:list-item>
        <text:list-item>
          <text:p text:style-name="P20"><text:span text:style-name="Strong_20_Emphasis">Desfecho:</text:span> O PDP retorna PERMIT ou DENY para a requisição. </text:p>
        </text:list-item>
      </text:list>
      <text:p text:style-name="Horizontal_20_Line"/>
      <text:h text:style-name="Heading_20_2" text:outline-level="2">7. Uso do Motor de Autorização Interno (PDP Customizado)</text:h>
      <text:p text:style-name="Text_20_body">Ao invés de delegar avaliações complexas ao Authorization Services do Keycloak, a aplicação resolve suas permissões mapeando recursos contra o estado canônico do banco de dados local.</text:p>
      <text:h text:style-name="Heading_20_3" text:outline-level="3">7.1 Recursos Modelados</text:h>
      <text:p text:style-name="Text_20_body">Exemplo:</text:p>
      <text:list text:style-name="L9">
        <text:list-item>
          <text:p text:style-name="P23"><text:soft-page-break/><text:span text:style-name="Strong_20_Emphasis">Recurso:</text:span> <text:span text:style-name="Source_20_Text">/presencas</text:span> </text:p>
        </text:list-item>
        <text:list-item>
          <text:p text:style-name="P22"><text:span text:style-name="Strong_20_Emphasis">Escopos (Scopes):</text:span> <text:span text:style-name="Source_20_Text">view</text:span>, <text:span text:style-name="Source_20_Text">edit</text:span>, <text:span text:style-name="Source_20_Text">delete</text:span> (bloqueado para eventos imutáveis), <text:span text:style-name="Source_20_Text">approve</text:span> </text:p>
        </text:list-item>
      </text:list>
      <text:p text:style-name="Horizontal_20_Line"/>
      <text:h text:style-name="Heading_20_2" text:outline-level="2">8. Controle por Endpoint + Método</text:h>
      <text:p text:style-name="Text_20_body">Mapeamento interno da aplicação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">Endpoint</text:p>
          </table:table-cell>
          <table:table-cell table:style-name="Tabela2.A1" office:value-type="string">
            <text:p text:style-name="P3">Método</text:p>
          </table:table-cell>
          <table:table-cell table:style-name="Tabela2.A1" office:value-type="string">
            <text:p text:style-name="P3">Scope Mapeado no PDP</text:p>
          </table:table-cell>
        </table:table-row>
        <table:table-row>
          <table:table-cell table:style-name="Tabela2.A1" office:value-type="string">
            <text:p text:style-name="P2"><text:span text:style-name="Source_20_Text">/presencas</text:span></text:p>
          </table:table-cell>
          <table:table-cell table:style-name="Tabela2.A1" office:value-type="string">
            <text:p text:style-name="P2">GET</text:p>
          </table:table-cell>
          <table:table-cell table:style-name="Tabela2.A1" office:value-type="string">
            <text:p text:style-name="P2"><text:span text:style-name="Source_20_Text">view</text:span></text:p>
          </table:table-cell>
        </table:table-row>
        <table:table-row>
          <table:table-cell table:style-name="Tabela2.A1" office:value-type="string">
            <text:p text:style-name="P2"><text:span text:style-name="Source_20_Text">/presencas</text:span></text:p>
          </table:table-cell>
          <table:table-cell table:style-name="Tabela2.A1" office:value-type="string">
            <text:p text:style-name="P2">POST</text:p>
          </table:table-cell>
          <table:table-cell table:style-name="Tabela2.A1" office:value-type="string">
            <text:p text:style-name="P2"><text:span text:style-name="Source_20_Text">create</text:span></text:p>
          </table:table-cell>
        </table:table-row>
        <table:table-row>
          <table:table-cell table:style-name="Tabela2.A1" office:value-type="string">
            <text:p text:style-name="P2"><text:span text:style-name="Source_20_Text">/presencas/{id}</text:span></text:p>
          </table:table-cell>
          <table:table-cell table:style-name="Tabela2.A1" office:value-type="string">
            <text:p text:style-name="P2">PUT</text:p>
          </table:table-cell>
          <table:table-cell table:style-name="Tabela2.A1" office:value-type="string">
            <text:p text:style-name="P2"><text:span text:style-name="Source_20_Text">edit</text:span> (Apenas metadados administrativos)</text:p>
          </table:table-cell>
        </table:table-row>
        <table:table-row>
          <table:table-cell table:style-name="Tabela2.A1" office:value-type="string">
            <text:p text:style-name="P2"><text:span text:style-name="Source_20_Text">/presencas/{id}</text:span></text:p>
          </table:table-cell>
          <table:table-cell table:style-name="Tabela2.A1" office:value-type="string">
            <text:p text:style-name="P2">DELETE</text:p>
          </table:table-cell>
          <table:table-cell table:style-name="Tabela2.A1" office:value-type="string">
            <text:p text:style-name="P2"><text:span text:style-name="Source_20_Text">delete</text:span></text:p>
          </table:table-cell>
        </table:table-row>
      </table:table>
      <text:p text:style-name="Text_20_body">O Middleware Spring Security traduz e envelopa a requisição HTTP para o respectivo escopo de avaliação.</text:p>
      <text:p text:style-name="Horizontal_20_Line"/>
      <text:h text:style-name="Heading_20_2" text:outline-level="2">9. Controle por Campo (Field-Level Security)</text:h>
      <text:p text:style-name="Text_20_body">Após a decisão positiva de acesso (PERMIT), a aplicação pode ocultar dados sensíveis baseados na Role do <text:span text:style-name="Source_20_Text">BusinessPrincipalToken</text:span>.</text:p>
      <text:list text:style-name="L10">
        <text:list-item>
          <text:p text:style-name="P25">A política local aciona um filtro de resposta. </text:p>
        </text:list-item>
        <text:list-item>
          <text:p text:style-name="P24">O Jackson (Serializador JSON) restringe o payload final de entrega. </text:p>
        </text:list-item>
      </text:list>
      <text:p text:style-name="Text_20_body"><text:span text:style-name="Strong_20_Emphasis">Exemplo Prático:</text:span> Uma consulta de listagem retornará os hashes biométricos criptografados ou o endereço residencial <text:span text:style-name="Emphasis">somente</text:span> se o usuário que solicitou possuir a função atestada de AUDITOR ou OWNER. Para papéis inferiores, o backend emitirá o JSON suprimindo sumariamente essas colunas sensíveis.</text:p>
      <text:p text:style-name="Horizontal_20_Line"/>
      <text:h text:style-name="Heading_20_2" text:outline-level="2">10. Controle por Usuário Individual (Exceções e Overrides)</text:h>
      <text:p text:style-name="P5"><text:span text:style-name="T4">Para conceder privilégios temporários sem alterar a </text:span><text:span text:style-name="T8">Role</text:span><text:span text:style-name="T2"> </text:span><text:span text:style-name="T4">global do usuário (ex: um SERVIDOR que atua temporariamente como aprovador em um final de semana específico), o Motor de Políticas avalia fisicamente a tabela </text:span><text:span text:style-name="T3">seguranca.excecao_permissao_usuario</text:span><text:span text:style-name="T4">.</text:span></text:p>
      <text:p text:style-name="Preformatted_20_Text"><text:span text:style-name="Source_20_Text">SELECT * FROM </text:span><text:span text:style-name="Source_20_Text"><text:span text:style-name="T1">seguranca</text:span></text:span><text:span text:style-name="Source_20_Text">.excecao_permissao_usuario</text:span></text:p>
      <text:p text:style-name="Preformatted_20_Text"><text:span text:style-name="Source_20_Text">WHERE usuario_id = ?</text:span></text:p>
      <text:p text:style-name="Preformatted_20_Text"><text:span text:style-name="Source_20_Text"><text:s text:c="2"/>AND organizacao_id = ?</text:span></text:p>
      <text:p text:style-name="Preformatted_20_Text"><text:span text:style-name="Source_20_Text"><text:s text:c="2"/>AND recurso = '/presencas'</text:span></text:p>
      <text:p text:style-name="P1"><text:span text:style-name="Source_20_Text"><text:s text:c="2"/>AND escopo = 'approve';</text:span></text:p>
      <text:p text:style-name="Text_20_body">O uso desta tabela (que possui chave UUID e auditoria por locatário) garante a granularidade extrema e evita "gambiarras" através da criação de grupos descartáveis no Active Directory.</text:p>
      <text:p text:style-name="Horizontal_20_Line"/>
      <text:h text:style-name="Heading_20_2" text:outline-level="2"><text:soft-page-break/>11. Contextualização por Geolocalização e IP</text:h>
      <text:p text:style-name="Text_20_body">As condições armazenadas na coluna <text:span text:style-name="Source_20_Text">condicao_json</text:span> podem ser utilizadas pelo PDP para invocar validações geoespaciais em tempo real com o PostGIS:</text:p>
      <text:p text:style-name="Preformatted_20_Text"><text:span text:style-name="Source_20_Text">if (request.ip() in policy.allowedSubnets)</text:span></text:p>
      <text:p text:style-name="P1"><text:span text:style-name="Source_20_Text">if (businessPrincipal.currentLocation() within unidade.poligono_geo())</text:span></text:p>
      <text:p text:style-name="Text_20_body">Isso permite impor limites corporativos, como:</text:p>
      <text:list text:style-name="L11">
        <text:list-item>
          <text:p text:style-name="P26">Restringir aprovações de jornada a equipamentos que estejam conectados exclusivamente nas redes do órgão governamental. </text:p>
        </text:list-item>
      </text:list>
      <text:p text:style-name="Horizontal_20_Line"/>
      <text:h text:style-name="Heading_20_2" text:outline-level="2">12. Auditoria e Rastreabilidade</text:h>
      <text:p text:style-name="P5"><text:span text:style-name="T4">O paradigma de "Zero Trust" exige que toda e qualquer</text:span><text:span text:style-name="T2"> </text:span><text:span text:style-name="T4">barreira de acesso negada pelo PDP gere uma evidência irrevogável na tabela </text:span><text:span text:style-name="T3">seguranca.log_auditoria</text:span><text:span text:style-name="T4">, registrando:</text:span></text:p>
      <text:list text:style-name="L12">
        <text:list-item>
          <text:p text:style-name="P28"><text:span text:style-name="Source_20_Text">usuario_id</text:span> e <text:span text:style-name="Source_20_Text">organizacao_id</text:span> </text:p>
        </text:list-item>
        <text:list-item>
          <text:p text:style-name="P28"><text:span text:style-name="Source_20_Text">acao</text:span> (endpoint e método) </text:p>
        </text:list-item>
        <text:list-item>
          <text:p text:style-name="P28"><text:span text:style-name="Source_20_Text">entidade_id</text:span> (se aplicável) </text:p>
        </text:list-item>
        <text:list-item>
          <text:p text:style-name="P28"><text:span text:style-name="Source_20_Text">decisao</text:span> (DENY) </text:p>
        </text:list-item>
        <text:list-item>
          <text:p text:style-name="P28"><text:span text:style-name="Source_20_Text">metadados</text:span> (JSON com os detalhes da política rejeitada) </text:p>
        </text:list-item>
        <text:list-item>
          <text:p text:style-name="P27"><text:span text:style-name="Source_20_Text">criado_em</text:span> (Timestamp oficial do servidor) </text:p>
        </text:list-item>
      </text:list>
      <text:p text:style-name="Horizontal_20_Line"/>
      <text:h text:style-name="Heading_20_2" text:outline-level="2">13. Estratégia de Performance</text:h>
      <text:h text:style-name="Heading_20_3" text:outline-level="3">13.1 Cache Distribuído</text:h>
      <text:list text:style-name="L13">
        <text:list-item>
          <text:p text:style-name="P30">Como a conversão de Identidade (<text:span text:style-name="Source_20_Text">identidade_acesso</text:span>) e as regras da <text:span text:style-name="Source_20_Text">excecao_permissao_usuario</text:span> são lidas frequentemente pelo <text:span text:style-name="Source_20_Text">customJwtAuthenticationConverter</text:span>, o uso de Cache de 2º Nível (ex: Redis ou Caffeine) é obrigatório. </text:p>
        </text:list-item>
        <text:list-item>
          <text:p text:style-name="P30"><text:span text:style-name="Strong_20_Emphasis">Chave de Cache Estrutural:</text:span> <text:span text:style-name="Source_20_Text">hash(sub + org_id + resource + scope)</text:span> </text:p>
        </text:list-item>
        <text:list-item>
          <text:p text:style-name="P29"><text:span text:style-name="Strong_20_Emphasis">Vigência (TTL):</text:span> Curto (15 a 60 segundos), visando a garantia de que demissões e suspensões tenham a revogação efetivada quase em tempo real (Near Real-Time Revocation). </text:p>
        </text:list-item>
      </text:list>
      <text:p text:style-name="Horizontal_20_Line"/>
      <text:h text:style-name="Heading_20_2" text:outline-level="2">14. Modelo de Banco (Permissões Dinâmicas)</text:h>
      <text:p text:style-name="Text_20_body"><text:span text:style-name="T5">Conforme materializado nas DDLs da RFC-0005, o sustentáculo do PBAC reside no schema de controle </text:span><text:span text:style-name="T7">seguranca</text:span><text:span text:style-name="T5">, mantendo o isolamento lógico estrito através da sua </text:span><text:span text:style-name="Source_20_Text"><text:span text:style-name="T7">organizacao_id</text:span></text:span><text:span text:style-name="T5">. O armazenamento de lógicas condicionais complexas no tipo </text:span><text:span text:style-name="Source_20_Text"><text:span text:style-name="T7">jsonb</text:span></text:span><text:span text:style-name="T6"> </text:span><text:span text:style-name="T5">do PostgreSQL viabiliza que as regras de controle sejam estendidas sem a necessidade de reestruturação do banco ou alteração do </text:span><text:soft-page-break/><text:span text:style-name="T5">modelo relacional no Java.</text:span></text:p>
      <text:p text:style-name="Horizontal_20_Line"/>
      <text:h text:style-name="Heading_20_2" text:outline-level="2">15. Segurança (Lightweight Tokens e Fetch On-Demand)</text:h>
      <text:list text:style-name="L14">
        <text:list-item>
          <text:p text:style-name="P32"><text:span text:style-name="Strong_20_Emphasis">Fetch On-Demand:</text:span> Jamais delegar ou ler permissões complexas, roles organizacionais de negócio ou regras de exceção a partir das <text:span text:style-name="Emphasis">claims</text:span> de um JWT. O token será estritamente <text:span text:style-name="Emphasis">Lightweight</text:span>, cego para as regras de negócio. </text:p>
        </text:list-item>
        <text:list-item>
          <text:p text:style-name="P32"><text:span text:style-name="Strong_20_Emphasis">Proteção contra Adulteração:</text:span> Todo o contexto de segurança e PBAC se constrói dentro das memórias blindadas do Backend a partir da leitura confiável das tabelas da arquitetura relacional. </text:p>
        </text:list-item>
        <text:list-item>
          <text:p text:style-name="P31"><text:span text:style-name="Strong_20_Emphasis">Criptografia OIDC:</text:span> As garantias primárias de acesso iniciam-se com o Spring Boot inspecionando criptograficamente a validade matemática (RS256) das chaves assimétricas emitidas pelo Keycloak antes que a esteira de PBAC comece a atuar. </text:p>
        </text:list-item>
      </text:list>
      <text:p text:style-name="Horizontal_20_Line"/>
      <text:h text:style-name="Heading_20_2" text:outline-level="2">16. Conclusão</text:h>
      <text:p text:style-name="Text_20_body">A arquitetura proposta garante uma avaliação refinada por endpoint, método HTTP, nível de campo, usuário e contexto ambiental sem nenhuma dependência operacional de middlewares complexos de autorização alheios ao contexto do negócio.</text:p>
      <text:p text:style-name="Text_20_body">A centralização da Política Dinâmica de Acesso (PBAC) na tabela de Exceções do PostgreSQL permite uma fachada de API escalável, auditável de forma granular e inegociavelmente isolada conforme os padrões da LGP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08T18:41:30.530365105</dc:date>
    <meta:editing-duration>PT6M32S</meta:editing-duration>
    <meta:editing-cycles>3</meta:editing-cycles>
    <meta:generator>LibreOffice/24.2.7.2$Linux_X86_64 LibreOffice_project/420$Build-2</meta:generator>
    <meta:document-statistic meta:table-count="2" meta:image-count="0" meta:object-count="0" meta:page-count="6" meta:paragraph-count="147" meta:word-count="1352" meta:character-count="9438" meta:non-whitespace-character-count="8218"/>
  </office:meta>
</office:document-meta>
</file>