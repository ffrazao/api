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text-align="end" style:justify-single-word="false"/>
      <style:text-properties officeooo:paragraph-rsid="001c6b00"/>
    </style:style>
    <style:style style:name="P3" style:family="paragraph" style:parent-style-name="Preformatted_20_Text">
      <style:text-properties officeooo:paragraph-rsid="001e37c7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e37c7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e37c7"/>
    </style:style>
    <style:style style:name="T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style:use-window-font-color="true" loext:opacity="0%" style:font-name="Liberation Serif" fo:letter-spacing="normal"/>
    </style:style>
    <style:style style:name="T4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5" style:family="text">
      <style:text-properties style:use-window-font-color="true" loext:opacity="0%" style:font-name="Liberation Serif"/>
    </style:style>
    <style:style style:name="T6" style:family="text">
      <style:text-properties style:use-window-font-color="true" loext:opacity="0%" style:font-name="Liberation Serif" fo:font-size="12pt" fo:letter-spacing="normal" fo:font-style="italic" fo:font-weight="normal"/>
    </style:style>
    <style:style style:name="T7" style:family="text">
      <style:text-properties officeooo:rsid="001f20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FC-0004</text:h>
      <text:h text:style-name="Heading_20_1" text:outline-level="1">Estratégia de Evolução para Clientes Enterprise</text:h>
      <text:h text:style-name="Heading_20_2" text:outline-level="2">(Isolamento Forte, Compliance e Hardening)</text:h>
      <text:p text:style-name="P2"><text:span text:style-name="Strong_20_Emphasis">Status:</text:span> Aprovado e Atualizado (v1.1) </text:p>
      <text:p text:style-name="P2"><text:span text:style-name="Strong_20_Emphasis">Autor:</text:span> Equipe de Arquitetura </text:p>
      <text:p text:style-name="P2"><text:span text:style-name="Strong_20_Emphasis">Data:</text:span> 07/05/2026 </text:p>
      <text:p text:style-name="P2"><text:span text:style-name="Strong_20_Emphasis">Depende de:</text:span> RFC-0001, RFC-0002, RFC-0003, RFC-0005</text:p>
      <text:p text:style-name="Horizontal_20_Line"/>
      <text:h text:style-name="Heading_20_2" text:outline-level="2">1. Contexto</text:h>
      <text:p text:style-name="Text_20_body">O MVP (Tier 1) foi projetado com:</text:p>
      <text:list text:style-name="L1">
        <text:list-item>
          <text:p text:style-name="P7">Banco de dados único. </text:p>
        </text:list-item>
        <text:list-item>
          <text:p text:style-name="P7"><text:span text:style-name="Strong_20_Emphasis">Múltiplos Schemas Funcionais</text:span> (Domínio global <text:span text:style-name="Source_20_Text">pessoa</text:span> e domínio isolado <text:span text:style-name="Source_20_Text">folha_ponto</text:span>). </text:p>
        </text:list-item>
        <text:list-item>
          <text:p text:style-name="P7">Realm corporativo único no Keycloak. </text:p>
        </text:list-item>
        <text:list-item>
          <text:p text:style-name="P6">Isolamento lógico por <text:span text:style-name="Source_20_Text">organizacao_id</text:span>. </text:p>
        </text:list-item>
      </text:list>
      <text:p text:style-name="Text_20_body">Esse modelo é perfeitamente adequado para o <text:span text:style-name="Emphasis">early stage</text:span>, clientes pequenos/médios e cenários com governança unificada.</text:p>
      <text:p text:style-name="Text_20_body">Entretanto, clientes Enterprise (especialmente B2G, grandes secretarias e corporações) exigirão:</text:p>
      <text:list text:style-name="L2">
        <text:list-item>
          <text:p text:style-name="P9">Isolamento de infraestrutura mais forte (Single-Tenant). </text:p>
        </text:list-item>
        <text:list-item>
          <text:p text:style-name="P9">Garantias formais de compliance à LGPD. </text:p>
        </text:list-item>
        <text:list-item>
          <text:p text:style-name="P9">Governança e residência de dados (Data Sovereignty). </text:p>
        </text:list-item>
        <text:list-item>
          <text:p text:style-name="P9">SLAs dedicados. </text:p>
        </text:list-item>
        <text:list-item>
          <text:p text:style-name="P8">Hardening de segurança severo. </text:p>
        </text:list-item>
      </text:list>
      <text:p text:style-name="Text_20_body">Este RFC define a evolução arquitetural para atender a essas contas Enterprise <text:span text:style-name="Strong_20_Emphasis">sem quebrar a base de código e sem ferir os princípios de Identidade Canônica da plataforma</text:span>.</text:p>
      <text:p text:style-name="Horizontal_20_Line"/>
      <text:h text:style-name="Heading_20_2" text:outline-level="2">2. Objetivos</text:h>
      <text:list text:style-name="L3">
        <text:list-item>
          <text:p text:style-name="P11">Permitir múltiplos níveis de isolamento (Tier 1 a Tier 3) sem <text:span text:style-name="Emphasis">fork</text:span> do monolito. </text:p>
        </text:list-item>
        <text:list-item>
          <text:p text:style-name="P11">Atender aos requisitos regulatórios rigorosos de clientes corporativos e governamentais. </text:p>
        </text:list-item>
        <text:list-item>
          <text:p text:style-name="P11">Permitir customizações Enterprise preservando o uso estrito de <text:span text:style-name="Emphasis">Lightweight Tokens</text:span>. </text:p>
        </text:list-item>
        <text:list-item>
          <text:p text:style-name="P11">Manter o CPF como a única e imutável raiz de Identidade Canônica, não importando a <text:soft-page-break/>divisão de IdPs. </text:p>
        </text:list-item>
        <text:list-item>
          <text:p text:style-name="P10">Garantir escalabilidade horizontal e segregação de Storage. </text:p>
        </text:list-item>
      </text:list>
      <text:p text:style-name="Horizontal_20_Line"/>
      <text:h text:style-name="Heading_20_2" text:outline-level="2">3. Modelo de Segmentação de Clientes</text:h>
      <text:p text:style-name="Text_20_body">A arquitetura do sistema prevê três níveis topológicos de isolamento:</text:p>
      <text:h text:style-name="Heading_20_3" text:outline-level="3">3.1 Tier 1 — Shared (MVP - Atual)</text:h>
      <text:list text:style-name="L4">
        <text:list-item>
          <text:p text:style-name="P13">Banco compartilhado. </text:p>
        </text:list-item>
        <text:list-item>
          <text:p text:style-name="P13">Schemas funcionais padrão (<text:span text:style-name="Source_20_Text">pessoa</text:span> e <text:span text:style-name="Source_20_Text">folha_ponto</text:span>). </text:p>
        </text:list-item>
        <text:list-item>
          <text:p text:style-name="P13">Realm único no IAM. </text:p>
        </text:list-item>
        <text:list-item>
          <text:p text:style-name="P12">Isolamento lógico via <text:span text:style-name="Emphasis">query filtering</text:span> (<text:span text:style-name="Source_20_Text">organizacao_id</text:span>). </text:p>
        </text:list-item>
      </text:list>
      <text:h text:style-name="Heading_20_3" text:outline-level="3">3.2 Tier 2 — Isolamento Intermediário (Schema-per-Tenant)</text:h>
      <text:list text:style-name="L5">
        <text:list-item>
          <text:p text:style-name="P15">Banco compartilhado. </text:p>
        </text:list-item>
        <text:list-item>
          <text:p text:style-name="P15">Schema global <text:span text:style-name="Source_20_Text">pessoa</text:span> (unificado). </text:p>
        </text:list-item>
        <text:list-item>
          <text:p text:style-name="P15"><text:span text:style-name="Strong_20_Emphasis">N Schemas de Negócio:</text:span> Criação de um schema <text:span text:style-name="Source_20_Text">folha_ponto_{tenant}</text:span> dedicado para cada cliente Enterprise. </text:p>
        </text:list-item>
        <text:list-item>
          <text:p text:style-name="P14">Realm dedicado opcional no Keycloak. </text:p>
        </text:list-item>
      </text:list>
      <text:h text:style-name="Heading_20_3" text:outline-level="3">3.3 Tier 3 — Enterprise Dedicated (Sovereign)</text:h>
      <text:list text:style-name="L6">
        <text:list-item>
          <text:p text:style-name="P17">Banco de dados físico dedicado exclusivamente ao cliente. </text:p>
        </text:list-item>
        <text:list-item>
          <text:p text:style-name="P17">Infraestrutura de contêineres e redes (VPC) dedicada. </text:p>
        </text:list-item>
        <text:list-item>
          <text:p text:style-name="P17">Realm exclusivo ou IAM On-Premise do cliente. </text:p>
        </text:list-item>
        <text:list-item>
          <text:p text:style-name="P16">Criptografia KMS dedicada (BYOK - <text:span text:style-name="Emphasis">Bring Your Own Key</text:span>). </text:p>
        </text:list-item>
      </text:list>
      <text:p text:style-name="Horizontal_20_Line"/>
      <text:h text:style-name="Heading_20_2" text:outline-level="2">4. Evolução do Multi-Tenancy (Gestão de Schemas)</text:h>
      <text:p text:style-name="Text_20_body">A evolução do SaaS exige transições fluídas entre os Tiers de banco de dados:</text:p>
      <text:h text:style-name="Heading_20_3" text:outline-level="3">4.1 Fase 1 (MVP)</text:h>
      <text:p text:style-name="Preformatted_20_Text"><text:span text:style-name="Source_20_Text">1 Database Postgres</text:span></text:p>
      <text:p text:style-name="P3"><text:span text:style-name="Source_20_Text"><text:s text:c="2"/>├── Schema: pessoa (Global)</text:span></text:p>
      <text:p text:style-name="P3"><text:span text:style-name="Source_20_Text"><text:s text:c="2"/>├── Schema: </text:span><text:span text:style-name="Source_20_Text"><text:span text:style-name="T1">seguranca</text:span></text:span><text:span text:style-name="Source_20_Text"> (</text:span><text:span text:style-name="Source_20_Text"><text:span text:style-name="T1">Segurança do sistema</text:span></text:span><text:span text:style-name="Source_20_Text">)</text:span></text:p>
      <text:p text:style-name="P4"><text:span text:style-name="Source_20_Text"><text:s text:c="2"/>└── Schema: folha_ponto (Multi-tenant lógico via organizacao_id)</text:span></text:p>
      <text:h text:style-name="Heading_20_3" text:outline-level="3">4.2 Fase 2 — Schema por Tenant</text:h>
      <text:p text:style-name="Preformatted_20_Text"><text:span text:style-name="Source_20_Text">1 Database Postgres</text:span></text:p>
      <text:p text:style-name="Preformatted_20_Text"><text:span text:style-name="Source_20_Text"><text:s text:c="2"/>├── Schema: pessoa (Global - Identidade Canônica Centralizada)</text:span></text:p>
      <text:p text:style-name="Preformatted_20_Text"><text:span text:style-name="Source_20_Text"><text:s text:c="2"/>├── Schema: folha_ponto_orgaoA (Isolamento Estrutural)</text:span></text:p>
      <text:p text:style-name="P1"><text:span text:style-name="Source_20_Text"><text:s text:c="2"/>└── Schema: folha_ponto_orgaoB (Isolamento Estrutural)</text:span></text:p>
      <text:p text:style-name="Text_20_body"><text:span text:style-name="Strong_20_Emphasis">Benefícios:</text:span> Backup por tenant, <text:span text:style-name="Emphasis">Restore</text:span> pontual, Migração seletiva para infra dedicada. <text:span text:style-name="Strong_20_Emphasis">Requisito de Software:</text:span> Implementação de um <text:span text:style-name="Source_20_Text">TenantResolver</text:span> dinâmico no Hibernate/Spring Boot que <text:soft-page-break/>intercepte a rota e aponte para o Schema correto em tempo real.</text:p>
      <text:p text:style-name="Horizontal_20_Line"/>
      <text:h text:style-name="Heading_20_2" text:outline-level="2">5. Evolução do IAM e Resiliência da Identidade Canônica</text:h>
      <text:h text:style-name="Heading_20_3" text:outline-level="3">5.1 O Desafio do Realm por Cliente Enterprise</text:h>
      <text:p text:style-name="Text_20_body">Grandes clientes frequentemente exigem a gestão de seus próprios Realms no Keycloak para aplicar Branding próprio, gerir federações específicas de LDAP/SAML ou aplicar políticas de senha que divergem do padrão global da plataforma.</text:p>
      <text:h text:style-name="Heading_20_3" text:outline-level="3">5.2 A Resiliência da Tabela <text:span text:style-name="Source_20_Text">identidade_acesso</text:span></text:h>
      <text:p text:style-name="Text_20_body">Se o cliente migrar para o Tier 2 ou Tier 3 e exigir um Realm próprio, a nossa arquitetura continua estruturalmente blindada. O usuário do cliente autenticará no novo Realm dedicado e receberá um novo identificador técnico (<text:span text:style-name="Source_20_Text">sub</text:span> inédito). Ao tentar acessar a plataforma, o Spring Boot não o reconhecerá de imediato. A aplicação executará o protocolo padrão de <text:span text:style-name="Emphasis">Onboarding Obrigatório (Custom SPI + Action Tokens)</text:span>. O usuário fará a Validação 2x2 informando <text:span text:style-name="T5">o seu CPF e sua foto. </text:span><text:span text:style-name="T2">O usuário fará a Validação 2x2 informando o seu CPF e sua foto. O sistema, ao validar os dados no Datavalid/Serpro, atrelará pacificamente o "novo sub do Realm Enterprise" ao CPF já existente na tabela global </text:span><text:span text:style-name="T4">seguranca.identidade_acesso</text:span><text:span text:style-name="T2">. O histórico do servidor público permanece intacto, transcendendo as barreiras técnicas de IAM.</text:span></text:p>
      <text:p text:style-name="Horizontal_20_Line"/>
      <text:h text:style-name="Heading_20_2" text:outline-level="2">6. Compliance, LGPD e Governança</text:h>
      <text:h text:style-name="Heading_20_3" text:outline-level="3">6.1 Ciclo de Vida da Mídia e Expurgo Automatizado</text:h>
      <text:p text:style-name="P5"><text:span text:style-name="T2">É comum em contratos Enterprise e B2G que gestores exijam o armazenamento das fotos brutas de seus servidores para fins de "dossiê" ou auditoria visual. A plataforma estabelece a diretriz da minimização de dados da LGPD, rejeitando a retenção perpétua.</text:span><text:span text:style-name="T3"> </text:span><text:span text:style-name="T2">Independentemente de tratar-se do Tier 1 ou do Tier 3, a plataforma armazenará as fotografias faciais rasterizadas (</text:span><text:span text:style-name="Source_20_Text"><text:span text:style-name="T4">.jpg</text:span></text:span><text:span text:style-name="T3"> </text:span><text:span text:style-name="T2">/ </text:span><text:span text:style-name="Source_20_Text"><text:span text:style-name="T4">.png</text:span></text:span><text:span text:style-name="T2">) em um Storage isolado (S3) que atua exclusivamente como uma área de retenção efêmera para auditorias de curto prazo. O sistema extrai e grava o </text:span><text:span text:style-name="T6">Hash Biométrico</text:span><text:span text:style-name="T3"> </text:span><text:span text:style-name="T2">(vetor matemático) permanentemente no banco, enquanto a imagem original no S3 será sumariamente destruída (expurgo automatizado via </text:span><text:span text:style-name="T6">Scheduled Task</text:span><text:span text:style-name="T2">) assim que o prazo legal de retenção definido pela política do órgão expirar.</text:span></text:p>
      <text:h text:style-name="Heading_20_3" text:outline-level="3">6.2 Criptografia de Dados Sensíveis</text:h>
      <text:p text:style-name="Text_20_body">Os vetores matemáticos biométricos, os IPs nas tabelas de auditoria, e as geolocalizações precisas de dispositivos devem possuir Criptografia em Repouso (<text:span text:style-name="Emphasis">Column-Level Encryption</text:span> ou <text:span text:style-name="Emphasis">Transparent Data Encryption</text:span>), protegidos através de chaves KMS geridas pela plataforma (Tier 1/2) ou pelo cliente final (BYOK no Tier 3).</text:p>
      <text:h text:style-name="Heading_20_3" text:outline-level="3">6.3 Direito do Titular e Consentimento</text:h>
      <text:p text:style-name="Text_20_body">A infraestrutura (por meio da tabela <text:span text:style-name="Source_20_Text"><text:span text:style-name="T7">seguranca</text:span></text:span><text:span text:style-name="Source_20_Text">.consentimento</text:span>) assegurará autonomia na:</text:p>
      <text:list text:style-name="L7">
        <text:list-item>
          <text:p text:style-name="P19"><text:soft-page-break/>Revogação do consentimento de uso da biometria. </text:p>
        </text:list-item>
        <text:list-item>
          <text:p text:style-name="P19">Solicitação formal de exclusão lógica controlada. </text:p>
        </text:list-item>
        <text:list-item>
          <text:p text:style-name="P18">Exportação (dump) dos dados geográficos vinculados àquele CPF. </text:p>
        </text:list-item>
      </text:list>
      <text:p text:style-name="Horizontal_20_Line"/>
      <text:h text:style-name="Heading_20_2" text:outline-level="2">7. Hardening de Segurança Enterprise</text:h>
      <text:p text:style-name="Text_20_body">Para a migração de clientes à arquitetura de alto isolamento, devem-se implementar as seguintes camadas:</text:p>
      <text:list text:style-name="L8">
        <text:list-item>
          <text:p text:style-name="P21"><text:span text:style-name="Strong_20_Emphasis">Borda:</text:span> Web Application Firewall (WAF) com restrição rigorosa por geolocalização. </text:p>
        </text:list-item>
        <text:list-item>
          <text:p text:style-name="P21"><text:span text:style-name="Strong_20_Emphasis">Rede:</text:span> Rate Limiting por tenant no API Gateway (prevenção de ataque de exaustão ruidoso). </text:p>
        </text:list-item>
        <text:list-item>
          <text:p text:style-name="P20"><text:span text:style-name="Strong_20_Emphasis">Storage:</text:span> Isolamento de Storage de ativos estáticos utilizando <text:span text:style-name="Emphasis">Buckets S3 / Filer</text:span> segregados por tenant. </text:p>
        </text:list-item>
      </text:list>
      <text:p text:style-name="Horizontal_20_Line"/>
      <text:h text:style-name="Heading_20_2" text:outline-level="2">8. Observabilidade e Auditoria Avançada</text:h>
      <text:p text:style-name="Text_20_body">Operações Enterprise exigem transparência técnica total. O sistema deve suportar:</text:p>
      <text:list text:style-name="L9">
        <text:list-item>
          <text:p text:style-name="P23">A tag obrigatória do <text:span text:style-name="Source_20_Text">tenant_id</text:span> atrelada a cada linha de log da aplicação. </text:p>
        </text:list-item>
        <text:list-item>
          <text:p text:style-name="P23">Tracing distribuído (OpenTelemetry/Jaeger). </text:p>
        </text:list-item>
        <text:list-item>
          <text:p text:style-name="P22">Exportação de eventos imutáveis (registrados na tabela <text:span text:style-name="Source_20_Text"><text:span text:style-name="T7">seguranca</text:span></text:span><text:span text:style-name="Source_20_Text">.log_auditoria</text:span>) para o SIEM (Security Information and Event Management) do órgão cliente via <text:span text:style-name="Emphasis">Webhooks</text:span> seguros. </text:p>
        </text:list-item>
      </text:list>
      <text:p text:style-name="Horizontal_20_Line"/>
      <text:h text:style-name="Heading_20_2" text:outline-level="2">9. Customizações Enterprise e Blindagem de Tokens</text:h>
      <text:h text:style-name="Heading_20_3" text:outline-level="3">9.1 Customização sem <text:span text:style-name="Emphasis">Fork</text:span></text:h>
      <text:p text:style-name="Text_20_body">O core de domínio permanece único e fechado. Clientes que solicitarem regras específicas de antifraude ou jornada serão atendidos por configurações isoladas (ex: Tabela <text:span text:style-name="Source_20_Text">tenant_configuration</text:span>), controlando variáveis como <text:span text:style-name="Source_20_Text">feature_flags</text:span>, <text:span text:style-name="Source_20_Text">biometric_threshold</text:span> e <text:span text:style-name="Source_20_Text">geofence_policy</text:span>.</text:p>
      <text:h text:style-name="Heading_20_3" text:outline-level="3">9.2 A Blindagem de Lightweight Tokens (Diretriz Crítica)</text:h>
      <text:p text:style-name="Text_20_body">Mesmo perante pressões de integração de sistemas legados dos clientes Enterprise, <text:span text:style-name="Strong_20_Emphasis">sob nenhuma hipótese a arquitetura permitirá a injeção de dados sensíveis (PII, CPF, Endereços, Hashes Biométricos ou Permissões Complexas) dentro do </text:span><text:span text:style-name="Strong_20_Emphasis"><text:span text:style-name="Emphasis">payload</text:span></text:span><text:span text:style-name="Strong_20_Emphasis"> do Token JWT</text:span>. Os acessos permanecerão sob a restrição de <text:span text:style-name="Emphasis">Lightweight Access Tokens</text:span>. Todo enriquecimento de perfil ou validação granular (ABAC/PBAC) para esses clientes será resolvido internamente pelo banco de dados do Spring Boot através do modelo <text:span text:style-name="Emphasis">Fetch On-Demand</text:span>, prevenindo roubo de sessões e violação massiva da LGPD nos navegadores locais.</text:p>
      <text:p text:style-name="Horizontal_20_Line"/>
      <text:h text:style-name="Heading_20_2" text:outline-level="2"><text:soft-page-break/>10. Escalabilidade</text:h>
      <text:list text:style-name="L10">
        <text:list-item>
          <text:p text:style-name="P25"><text:span text:style-name="Strong_20_Emphasis">Aplicação:</text:span> Completamente <text:span text:style-name="Emphasis">Stateless</text:span>. Escalabilidade horizontal facilitada pelos tokens OIDC e pela engine interna baseada no banco. </text:p>
        </text:list-item>
        <text:list-item>
          <text:p text:style-name="P24"><text:span text:style-name="Strong_20_Emphasis">Banco de Dados:</text:span> Preparação nativa para instâncias de <text:span text:style-name="Emphasis">Read Replicas</text:span> voltadas à extração pesada de relatórios (ex: Folha de Ponto Mensal do órgão). </text:p>
        </text:list-item>
      </text:list>
      <text:p text:style-name="Horizontal_20_Line"/>
      <text:h text:style-name="Heading_20_2" text:outline-level="2">11. Decisão Estratégica e Roteiro</text:h>
      <text:p text:style-name="Text_20_body">A arquitetura do MVP atual no Spring Boot e PostgreSQL já deve nascer com os padrões corretos de injeção de dependência e isolamento.</text:p>
      <text:list text:style-name="L11">
        <text:list-item>
          <text:p text:style-name="P27">O acesso a dados no schema <text:span text:style-name="Source_20_Text">folha_ponto</text:span> já deve exigir nativamente a injeção condicional do <text:span text:style-name="Source_20_Text">organizacao_id</text:span>. </text:p>
        </text:list-item>
        <text:list-item>
          <text:p text:style-name="P26">A abstração das chamadas ao SeaweedFS (S3) já deve considerar o prefixo de pastas virtuais dinâmicas por locatário no <text:span text:style-name="Emphasis">Filer</text:span>. </text:p>
        </text:list-item>
      </text:list>
      <text:p text:style-name="Text_20_body">A decisão motriz desta RFC é: <text:span text:style-name="Strong_20_Emphasis">Preparar as abstrações lógicas no código (Domain-Driven Design e Ports &amp; Adapters) agora, para evitar migrações e refatorações traumáticas quando o primeiro contrato Enterprise ou Governamental exigir o seu banco de dados e bucket isolad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8:40:43.381587903</dc:date>
    <meta:editing-duration>PT6M1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95" meta:word-count="1254" meta:character-count="8519" meta:non-whitespace-character-count="7341"/>
  </office:meta>
</office:document-meta>
</file>