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text-align="end" style:justify-single-word="false"/>
      <style:text-properties officeooo:paragraph-rsid="000211e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officeooo:rsid="000310d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2</text:h>
      <text:h text:style-name="Heading_20_1" text:outline-level="1">Modelo de Autorização Evolutivo — RBAC + ABAC com Extensão para ReBAC</text:h>
      <text:p text:style-name="P2"><text:span text:style-name="Strong_20_Emphasis">Status:</text:span> Aprovado e Atualizado (v1.1) </text:p>
      <text:p text:style-name="P2"><text:span text:style-name="Strong_20_Emphasis">Autor:</text:span> Equipe de Arquitetura </text:p>
      <text:p text:style-name="P2"><text:span text:style-name="Strong_20_Emphasis">Data:</text:span> 07/05/2026 </text:p>
      <text:p text:style-name="P2"><text:span text:style-name="Strong_20_Emphasis">Depende de:</text:span> RFC-0001, RFC-0005, Arquitetura de Identidade e Acesso Segura</text:p>
      <text:p text:style-name="Horizontal_20_Line"/>
      <text:h text:style-name="Heading_20_2" text:outline-level="2">1. Contexto</text:h>
      <text:p text:style-name="Text_20_body">O sistema é multi-tenant, com usuários podendo pertencer a múltiplas organizações simultaneamente. A autorização não pode depender exclusivamente de papéis (roles) do provedor de identidade (Keycloak), e deve operar sob o paradigma de <text:span text:style-name="Emphasis">Zero Trust</text:span> (Confiança Zero), garantindo que a credencial técnica seja convertida em uma identidade canônica real antes de qualquer concessão de acesso.</text:p>
      <text:p text:style-name="Text_20_body"><text:span text:style-name="Strong_20_Emphasis">Objetivo:</text:span> Estabelecer um modelo de autorização:</text:p>
      <text:list text:style-name="L1">
        <text:list-item>
          <text:p text:style-name="P4">Desacoplado das regras de negócio do IdP. </text:p>
        </text:list-item>
        <text:list-item>
          <text:p text:style-name="P4">Multi-tenant aware. </text:p>
        </text:list-item>
        <text:list-item>
          <text:p text:style-name="P4">Protegido contra vazamento de dados sensíveis em Tokens (Lightweight Tokens). </text:p>
        </text:list-item>
        <text:list-item>
          <text:p text:style-name="P4">Evolutivo (RBAC → ABAC → ReBAC). </text:p>
        </text:list-item>
        <text:list-item>
          <text:p text:style-name="P3">Auditável e aderente à LGPD. </text:p>
        </text:list-item>
      </text:list>
      <text:p text:style-name="Horizontal_20_Line"/>
      <text:h text:style-name="Heading_20_2" text:outline-level="2">2. Princípios Arquiteturais</text:h>
      <text:list text:style-name="L2">
        <text:list-item>
          <text:p text:style-name="P6"><text:span text:style-name="Strong_20_Emphasis">Autenticação ≠ Autorização:</text:span> Keycloak autentica a conta técnica; o Backend Spring Boot resolve quem é a pessoa física e autoriza suas ações. </text:p>
        </text:list-item>
        <text:list-item>
          <text:p text:style-name="P6"><text:span text:style-name="Strong_20_Emphasis">Autorização resolvida no domínio:</text:span> Sempre contextual por organização (<text:span text:style-name="Source_20_Text">organizacao_id</text:span>). </text:p>
        </text:list-item>
        <text:list-item>
          <text:p text:style-name="P6"><text:span text:style-name="Strong_20_Emphasis">Negação por padrão (deny-by-default).</text:span> </text:p>
        </text:list-item>
        <text:list-item>
          <text:p text:style-name="P6"><text:span text:style-name="Strong_20_Emphasis">Fetch On-Demand:</text:span> Decisões baseadas em atributos (ABAC) nunca confiam no payload do JWT, mas sim em consultas em tempo real ao banco de dados. </text:p>
        </text:list-item>
        <text:list-item>
          <text:p text:style-name="P5"><text:span text:style-name="Strong_20_Emphasis">Log de decisão obrigatório:</text:span> Toda barreira de acesso gera rastro na trilha de auditoria. </text:p>
        </text:list-item>
      </text:list>
      <text:p text:style-name="Horizontal_20_Line"/>
      <text:h text:style-name="Heading_20_2" text:outline-level="2">3. Modelo Híbrido Proposto</text:h>
      <text:p text:style-name="Text_20_body">A arquitetura de autorização é composta por três camadas sobrepostas:</text:p>
      <text:list text:style-name="L3">
        <text:list-item>
          <text:p text:style-name="P8"><text:soft-page-break/><text:span text:style-name="Strong_20_Emphasis">Camada 1 — RBAC (base estrutural):</text:span> Define papéis organizacionais dentro do tenant. </text:p>
        </text:list-item>
        <text:list-item>
          <text:p text:style-name="P8"><text:span text:style-name="Strong_20_Emphasis">Camada 2 — ABAC (controle fino):</text:span> Define regras dinâmicas baseadas em atributos físicos, biométricos e temporais. </text:p>
        </text:list-item>
        <text:list-item>
          <text:p text:style-name="P7"><text:span text:style-name="Strong_20_Emphasis">Camada 3 — ReBAC (implementado):</text:span> Permite autorizações baseadas em relacionamentos hierárquicos e delegações através de grafos. </text:p>
        </text:list-item>
      </text:list>
      <text:p text:style-name="Horizontal_20_Line"/>
      <text:h text:style-name="Heading_20_2" text:outline-level="2">4. RBAC (Organizational Role-Based Access Control)</text:h>
      <text:h text:style-name="Heading_20_3" text:outline-level="3">4.1 Papéis Base no MVP</text:h>
      <text:list text:style-name="L4">
        <text:list-item>
          <text:p text:style-name="P10">OWNER </text:p>
        </text:list-item>
        <text:list-item>
          <text:p text:style-name="P10">ADMIN </text:p>
        </text:list-item>
        <text:list-item>
          <text:p text:style-name="P10">MANAGER </text:p>
        </text:list-item>
        <text:list-item>
          <text:p text:style-name="P10">PARTICIPANT </text:p>
        </text:list-item>
        <text:list-item>
          <text:p text:style-name="P9">AUDITOR (preparação futura) </text:p>
        </text:list-item>
      </text:list>
      <text:p text:style-name="Text_20_body">Os papéis são armazenados estritamente na tabela <text:span text:style-name="Strong_20_Emphasis"><text:span text:style-name="Source_20_Text">folha_ponto.vinculo_usuario</text:span></text:span>. <text:span text:style-name="Strong_20_Emphasis">Não devem residir no IdP (Keycloak)</text:span>.</text:p>
      <text:h text:style-name="Heading_20_3" text:outline-level="3">4.2 Escopo do Papel</text:h>
      <text:p text:style-name="Text_20_body">A Role é sempre contextual: <text:span text:style-name="Source_20_Text">(usuario_id, organizacao_id) → papel</text:span>. Nunca deve ser tratada de forma global (cross-tenant).</text:p>
      <text:p text:style-name="Horizontal_20_Line"/>
      <text:h text:style-name="Heading_20_2" text:outline-level="2">5. ABAC (Attribute-Based Access Control) e Lightweight Tokens</text:h>
      <text:p text:style-name="Text_20_body">A camada ABAC é vital para evitar a explosão de roles e suportar regras dinâmicas inerentes à biometria e presença.</text:p>
      <text:h text:style-name="Heading_20_3" text:outline-level="3">5.1 O Padrão Lightweight Token (Diretriz de Segurança)</text:h>
      <text:p text:style-name="Text_20_body">Para estrita conformidade com a LGPD, o Token JWT gerado pelo Keycloak será <text:span text:style-name="Strong_20_Emphasis">desprovido de qualquer dado sensível</text:span> (sem CPF, sem biometria, sem endereço e sem roles de negócio). Ele carrega apenas a claim <text:span text:style-name="Source_20_Text">sub</text:span> (Subject). <text:span text:style-name="Strong_20_Emphasis">Todos os atributos abaixo são extraídos em tempo real (Fetch On-Demand) através de queries otimizadas no PostgreSQL.</text:span></text:p>
      <text:h text:style-name="Heading_20_3" text:outline-level="3">5.2 Atributos Relevantes para a Policy Engine</text:h>
      <text:p text:style-name="Text_20_body"><text:span text:style-name="Strong_20_Emphasis">Subject (usuário avaliado no banco)</text:span></text:p>
      <text:list text:style-name="L5">
        <text:list-item>
          <text:p text:style-name="P12"><text:span text:style-name="Source_20_Text">papel</text:span> (via tabela <text:span text:style-name="Source_20_Text">folha_ponto.vinculo_usuario</text:span>) </text:p>
        </text:list-item>
        <text:list-item>
          <text:p text:style-name="P12"><text:span text:style-name="Source_20_Text">status</text:span> (ativo/suspenso via tabela <text:span text:style-name="Source_20_Text">folha_ponto.vinculo_usuario</text:span>) </text:p>
        </text:list-item>
        <text:list-item>
          <text:p text:style-name="P12">Existência de assinatura na <text:span text:style-name="Source_20_Text">folha_ponto.perfil_biometrico</text:span> </text:p>
        </text:list-item>
        <text:list-item>
          <text:p text:style-name="P11"><text:span text:style-name="Source_20_Text">nivel_confianca</text:span> (via tabela <text:span text:style-name="Source_20_Text">folha_ponto.dispositivo</text:span>) </text:p>
        </text:list-item>
      </text:list>
      <text:p text:style-name="Text_20_body"><text:span text:style-name="Strong_20_Emphasis">Resource (recurso/evento)</text:span></text:p>
      <text:list text:style-name="L6">
        <text:list-item>
          <text:p text:style-name="P14"><text:soft-page-break/><text:span text:style-name="Source_20_Text">organizacao_id</text:span> e <text:span text:style-name="Source_20_Text">unidade_id</text:span> </text:p>
        </text:list-item>
        <text:list-item>
          <text:p text:style-name="P13"><text:span text:style-name="Source_20_Text">status_tecnico</text:span> e <text:span text:style-name="Source_20_Text">status_administrativo</text:span> (via tabela <text:span text:style-name="Source_20_Text">folha_ponto.registro_presenca</text:span>) </text:p>
        </text:list-item>
      </text:list>
      <text:p text:style-name="Text_20_body"><text:span text:style-name="Strong_20_Emphasis">Environment (ambiente)</text:span></text:p>
      <text:list text:style-name="L7">
        <text:list-item>
          <text:p text:style-name="P16"><text:span text:style-name="Source_20_Text">recebido_no_servidor_em</text:span> (horário oficial blindado) </text:p>
        </text:list-item>
        <text:list-item>
          <text:p text:style-name="P16">IP address e localização geográfica (via PostGIS na tabela <text:span text:style-name="Source_20_Text">folha_ponto.unidade</text:span>) </text:p>
        </text:list-item>
        <text:list-item>
          <text:p text:style-name="P15"><text:span text:style-name="Source_20_Text">modo_registro</text:span> </text:p>
        </text:list-item>
      </text:list>
      <text:p text:style-name="Horizontal_20_Line"/>
      <text:h text:style-name="Heading_20_2" text:outline-level="2">6. Estrutura Técnica da Autorização (Spring Security)</text:h>
      <text:p text:style-name="Text_20_body">A ponte entre a Identidade Técnica e a Autorização de Negócio ocorre dentro do ecossistema do Spring Security.</text:p>
      <text:h text:style-name="Heading_20_3" text:outline-level="3">6.1 O Conversor de Identidade (<text:span text:style-name="Source_20_Text">customJwtAuthenticationConverter</text:span>)</text:h>
      <text:p text:style-name="Text_20_body">Antes de qualquer Controller ser atingido, o Spring Security intercepta a requisição e invoca um conversor customizado (<text:span text:style-name="Source_20_Text">customJwtAuthenticationConverter</text:span>). O papel deste componente é crítico:</text:p>
      <text:list text:style-name="L8">
        <text:list-item>
          <text:p text:style-name="P18">Extrai o <text:span text:style-name="Source_20_Text">sub</text:span> do JWT. </text:p>
        </text:list-item>
        <text:list-item>
          <text:p text:style-name="P18">Consulta a camada de dados de identidade para descobrir qual Pessoa Física (CPF) é a legítima dona daquele <text:span text:style-name="Source_20_Text">sub</text:span>. </text:p>
        </text:list-item>
        <text:list-item>
          <text:p text:style-name="P18">Busca na tabela <text:span text:style-name="Source_20_Text">folha_ponto.vinculo_usuario</text:span> as <text:span text:style-name="Emphasis">Roles</text:span> ativas para a organização alvo. </text:p>
        </text:list-item>
        <text:list-item>
          <text:p text:style-name="P17">Converte a abstração de credencial em um <text:span text:style-name="Strong_20_Emphasis"><text:span text:style-name="Source_20_Text">BusinessPrincipalToken</text:span></text:span>, enriquecido com o CPF e as <text:span text:style-name="Emphasis">GrantedAuthorities</text:span> exclusivas do banco local. </text:p>
        </text:list-item>
      </text:list>
      <text:h text:style-name="Heading_20_3" text:outline-level="3">6.2 Camada de Policy Engine Interna</text:h>
      <text:p text:style-name="Text_20_body">Com o <text:span text:style-name="Source_20_Text">BusinessPrincipalToken</text:span> injetado no contexto, o motor de políticas é acionado:</text:p>
      <text:p text:style-name="Text_20_body"><text:span text:style-name="Strong_20_Emphasis">Interface:</text:span></text:p>
      <text:p text:style-name="Preformatted_20_Text"><text:span text:style-name="Source_20_Text">AuthorizationService.evaluate(</text:span></text:p>
      <text:p text:style-name="Preformatted_20_Text"><text:span text:style-name="Source_20_Text"><text:s text:c="4"/>businessPrincipal,</text:span></text:p>
      <text:p text:style-name="Preformatted_20_Text"><text:span text:style-name="Source_20_Text"><text:s text:c="4"/>action,</text:span></text:p>
      <text:p text:style-name="Preformatted_20_Text"><text:span text:style-name="Source_20_Text"><text:s text:c="4"/>resource,</text:span></text:p>
      <text:p text:style-name="Preformatted_20_Text"><text:span text:style-name="Source_20_Text"><text:s text:c="4"/>environment</text:span></text:p>
      <text:p text:style-name="P1"><text:span text:style-name="Source_20_Text">) -&gt; Decision</text:span></text:p>
      <text:p text:style-name="Text_20_body"><text:span text:style-name="Strong_20_Emphasis">Decision:</text:span></text:p>
      <text:list text:style-name="L9">
        <text:list-item>
          <text:p text:style-name="P20">PERMIT </text:p>
        </text:list-item>
        <text:list-item>
          <text:p text:style-name="P20">DENY </text:p>
        </text:list-item>
        <text:list-item>
          <text:p text:style-name="P19">PERMIT_WITH_CONDITIONS </text:p>
        </text:list-item>
      </text:list>
      <text:p text:style-name="Horizontal_20_Line"/>
      <text:h text:style-name="Heading_20_2" text:outline-level="2"><text:soft-page-break/>7. Integração com Keycloak</text:h>
      <text:p text:style-name="Text_20_body">Uso <text:span text:style-name="Strong_20_Emphasis">restrito</text:span> a:</text:p>
      <text:list text:style-name="L10">
        <text:list-item>
          <text:p text:style-name="P22">Autenticação técnica e federação (AD/LDAP). </text:p>
        </text:list-item>
        <text:list-item>
          <text:p text:style-name="P22">Emissão de Lightweight Token OIDC. </text:p>
        </text:list-item>
        <text:list-item>
          <text:p text:style-name="P21">Identificação imutável da conta técnica (<text:span text:style-name="Source_20_Text">sub</text:span>). </text:p>
        </text:list-item>
      </text:list>
      <text:p text:style-name="Text_20_body"><text:span text:style-name="Strong_20_Emphasis">Não usar:</text:span></text:p>
      <text:list text:style-name="L11">
        <text:list-item>
          <text:p text:style-name="P24">Role organizacional embarcada no token. </text:p>
        </text:list-item>
        <text:list-item>
          <text:p text:style-name="P23">Tenant fixo no token. </text:p>
        </text:list-item>
      </text:list>
      <text:p text:style-name="Text_20_body"><text:span text:style-name="Strong_20_Emphasis">Motivação para evitar:</text:span></text:p>
      <text:list text:style-name="L12">
        <text:list-item>
          <text:p text:style-name="P26">Token inflation (estouro de limite de cabeçalho HTTP). </text:p>
        </text:list-item>
        <text:list-item>
          <text:p text:style-name="P26">Inconsistência organizacional (usuário acessando com token defasado). </text:p>
        </text:list-item>
        <text:list-item>
          <text:p text:style-name="P25">Espalhamento indevido de PII (Personally Identifiable Information) e quebra da LGPD. </text:p>
        </text:list-item>
      </text:list>
      <text:p text:style-name="Horizontal_20_Line"/>
      <text:h text:style-name="Heading_20_2" text:outline-level="2">8. Multi-Tenant Enforcement</text:h>
      <text:p text:style-name="Text_20_body">Toda policy deve validar obrigatoriamente a fronteira do tenant através da relação entre o recurso e o vínculo do usuário identificado no <text:span text:style-name="Source_20_Text">BusinessPrincipalToken</text:span>:</text:p>
      <text:p text:style-name="P1"><text:span text:style-name="Source_20_Text">recurso.organizacao_id == vinculo_usuario.organizacao_id</text:span></text:p>
      <text:p text:style-name="Text_20_body">Qualquer divergência relacional resultará em <text:span text:style-name="Strong_20_Emphasis">DENY</text:span> imediato (HTTP 403 Forbidden).</text:p>
      <text:p text:style-name="Horizontal_20_Line"/>
      <text:h text:style-name="Heading_20_2" text:outline-level="2">9. Auditoria de Decisão</text:h>
      <text:p text:style-name="Text_20_body">Toda decisão sensível deve gerar registro imutável na tabela <text:span text:style-name="Strong_20_Emphasis"><text:span text:style-name="Source_20_Text"><text:span text:style-name="T1">seguranca</text:span></text:span></text:span><text:span text:style-name="Strong_20_Emphasis"><text:span text:style-name="Source_20_Text">.log_auditoria</text:span></text:span>:</text:p>
      <text:list text:style-name="L13">
        <text:list-item>
          <text:p text:style-name="P28"><text:span text:style-name="Source_20_Text">usuario_id</text:span> </text:p>
        </text:list-item>
        <text:list-item>
          <text:p text:style-name="P28"><text:span text:style-name="Source_20_Text">organizacao_id</text:span> </text:p>
        </text:list-item>
        <text:list-item>
          <text:p text:style-name="P28"><text:span text:style-name="Source_20_Text">acao</text:span> (método/endpoint) </text:p>
        </text:list-item>
        <text:list-item>
          <text:p text:style-name="P28"><text:span text:style-name="Source_20_Text">entidade_id</text:span> (recurso) </text:p>
        </text:list-item>
        <text:list-item>
          <text:p text:style-name="P28"><text:span text:style-name="Source_20_Text">decisao</text:span> </text:p>
        </text:list-item>
        <text:list-item>
          <text:p text:style-name="P27"><text:span text:style-name="Source_20_Text">criado_em</text:span> (timestamp em UTC) </text:p>
        </text:list-item>
      </text:list>
      <text:p text:style-name="Horizontal_20_Line"/>
      <text:h text:style-name="Heading_20_2" text:outline-level="2">10. ReBAC (Relacionamentos Complexos)</text:h>
      <text:p text:style-name="Text_20_body">O modelo relacional suporta autorizações baseadas em grafos e vínculos diretos, contornando limitações clássicas do AD/LDAP.</text:p>
      <text:p text:style-name="Text_20_body"><text:span text:style-name="Strong_20_Emphasis">Cenários suportados:</text:span></text:p>
      <text:list text:style-name="L14">
        <text:list-item>
          <text:p text:style-name="P30">Delegação temporária (Gestor Substituto). </text:p>
        </text:list-item>
        <text:list-item>
          <text:p text:style-name="P30"><text:soft-page-break/>Supervisor indireto. </text:p>
        </text:list-item>
        <text:list-item>
          <text:p text:style-name="P29">Hierarquia estrutural entre unidades. </text:p>
        </text:list-item>
      </text:list>
      <text:p text:style-name="Text_20_body"><text:span text:style-name="Strong_20_Emphasis">Estrutura Física:</text:span> O motor de políticas consultará a tabela já implementada <text:span text:style-name="Strong_20_Emphasis"><text:span text:style-name="Source_20_Text"><text:span text:style-name="T1">seguranca</text:span></text:span></text:span><text:span text:style-name="Strong_20_Emphasis"><text:span text:style-name="Source_20_Text">.relacionamento</text:span></text:span>, cruzando <text:span text:style-name="Source_20_Text">sujeito_id</text:span> e <text:span text:style-name="Source_20_Text">objeto_id</text:span> dentro do período de vigência (<text:span text:style-name="Source_20_Text">inicio_validade</text:span> / <text:span text:style-name="Source_20_Text">fim_validade</text:span>). Isso isenta a equipe de TI de criar grupos temporários no Active Directory para gerir substituições de férias.</text:p>
      <text:p text:style-name="Horizontal_20_Line"/>
      <text:h text:style-name="Heading_20_2" text:outline-level="2">11. Anti-Patterns a Evitar</text:h>
      <text:list text:style-name="L15">
        <text:list-item>
          <text:p text:style-name="P32">Hardcode de role diretamente no controller. </text:p>
        </text:list-item>
        <text:list-item>
          <text:p text:style-name="P32">Lógica condicional de autorização espalhada pelo código (ao invés de isolada no Policy Engine). </text:p>
        </text:list-item>
        <text:list-item>
          <text:p text:style-name="P32">Embutir o CPF ou validações biométricas no Payload do JWT. </text:p>
        </text:list-item>
        <text:list-item>
          <text:p text:style-name="P31">Confiar a decisão de acesso a validações puramente do lado do React (Frontend). </text:p>
        </text:list-item>
      </text:list>
      <text:p text:style-name="Horizontal_20_Line"/>
      <text:h text:style-name="Heading_20_2" text:outline-level="2">12. Roadmap Evolutivo</text:h>
      <text:list text:style-name="L16">
        <text:list-item>
          <text:p text:style-name="P34"><text:span text:style-name="Strong_20_Emphasis">Fase 1 — MVP:</text:span> Conversão do <text:span text:style-name="Source_20_Text">sub</text:span> para Identidade Canônica, RBAC simples, e enforcement obrigatório de <text:span text:style-name="Source_20_Text">organizacao_id</text:span>. </text:p>
        </text:list-item>
        <text:list-item>
          <text:p text:style-name="P34"><text:span text:style-name="Strong_20_Emphasis">Fase 2:</text:span> Introdução do ABAC consultando atributos em tempo real no banco. </text:p>
        </text:list-item>
        <text:list-item>
          <text:p text:style-name="P34"><text:span text:style-name="Strong_20_Emphasis">Fase 3:</text:span> Externalização parcial de regras lógicas via <text:span text:style-name="Source_20_Text">condicao_json</text:span> na tabela <text:span text:style-name="Source_20_Text"><text:span text:style-name="T1">seguranca</text:span></text:span><text:span text:style-name="Source_20_Text">.excecao_permissao_usuario</text:span>. </text:p>
        </text:list-item>
        <text:list-item>
          <text:p text:style-name="P33"><text:span text:style-name="Strong_20_Emphasis">Fase 4:</text:span> ReBAC maduro, consumindo a tabela <text:span text:style-name="Source_20_Text"><text:span text:style-name="T1">seguranca.r</text:span></text:span><text:span text:style-name="Source_20_Text">elacionamento</text:span> para grafos de poder. </text:p>
        </text:list-item>
      </text:list>
      <text:p text:style-name="Horizontal_20_Line"/>
      <text:h text:style-name="Heading_20_2" text:outline-level="2">13. Exemplo de Fluxo de Autorização Completo (Registro de Presença)</text:h>
      <text:list text:style-name="L17">
        <text:list-item>
          <text:p text:style-name="P36"><text:span text:style-name="Strong_20_Emphasis">Acesso:</text:span> O usuário autenticado dispara o evento bruto de presença no SPA React, anexando o <text:span text:style-name="Emphasis">Lightweight Token</text:span> na requisição. </text:p>
        </text:list-item>
        <text:list-item>
          <text:p text:style-name="P36"><text:span text:style-name="Strong_20_Emphasis">Interceptação Técnica:</text:span> O Spring Security intercepta a chamada e valida matematicamente a assinatura do JWT baixando as chaves públicas (JWKS) do Keycloak. </text:p>
        </text:list-item>
        <text:list-item>
          <text:p text:style-name="P36"><text:span text:style-name="Strong_20_Emphasis">Resolução de Identidade (A Dica de Ouro):</text:span> O <text:span text:style-name="Source_20_Text">customJwtAuthenticationConverter</text:span> entra em ação. Ele extrai o <text:span text:style-name="Source_20_Text">sub</text:span> do token, consulta o banco de dados e localiza a Identidade Canônica (a Pessoa Física dona daquele sub). </text:p>
        </text:list-item>
        <text:list-item>
          <text:p text:style-name="P36"><text:span text:style-name="Strong_20_Emphasis">Resolução de Vínculo:</text:span> O conversor busca na tabela <text:span text:style-name="Source_20_Text">folha_ponto.vinculo_usuario</text:span> os papéis da pessoa especificamente para a Organização daquela rota. </text:p>
        </text:list-item>
        <text:list-item>
          <text:p text:style-name="P36"><text:span text:style-name="Strong_20_Emphasis">Contexto de Segurança:</text:span> Um <text:span text:style-name="Source_20_Text">BusinessPrincipalToken</text:span> (agora ciente do CPF e das Roles locais) é injetado no <text:span text:style-name="Source_20_Text">SecurityContextHolder</text:span>. </text:p>
        </text:list-item>
        <text:list-item>
          <text:p text:style-name="P36"><text:soft-page-break/><text:span text:style-name="Strong_20_Emphasis">Policy Evaluation:</text:span> A anotação (ex: <text:span text:style-name="Source_20_Text">@PreAuthorize</text:span>) invoca o motor de políticas, que avalia os atributos ABAC (precisão do GPS, validade biométrica na base local). </text:p>
        </text:list-item>
        <text:list-item>
          <text:p text:style-name="P36"><text:span text:style-name="Strong_20_Emphasis">Decisão:</text:span> Se <text:span text:style-name="Strong_20_Emphasis">PERMIT</text:span>, a camada de serviço persiste o evento. Se <text:span text:style-name="Strong_20_Emphasis">DENY</text:span>, a execução é interrompida com <text:span text:style-name="Source_20_Text">HTTP 403 Forbidden</text:span>. </text:p>
        </text:list-item>
        <text:list-item>
          <text:p text:style-name="P35"><text:span text:style-name="Strong_20_Emphasis">Trilha:</text:span> A ação e a decisão são gravadas de forma imutável no <text:span text:style-name="Source_20_Text">log_auditoria</text:span>. </text:p>
        </text:list-item>
      </text:list>
      <text:p text:style-name="Horizontal_20_Line"/>
      <text:h text:style-name="Heading_20_2" text:outline-level="2">14. Conclusão Estratégica</text:h>
      <text:p text:style-name="Text_20_body">A adoção do modelo de <text:span text:style-name="Strong_20_Emphasis">Resolução Tardia de Autorização</text:span> transforma o sistema numa fortaleza contra falhas externas. Se o Keycloak for recriado ou se o servidor trocar seu e-mail do LDAP pelo login do Google, a sua Identidade Canônica e todas as suas autorizações organizacionais no banco do Spring Boot permanecerão intactas.</text:p>
      <text:p text:style-name="Text_20_body">A separação inegociável entre <text:span text:style-name="Emphasis">Autenticação (IAM)</text:span> e <text:span text:style-name="Emphasis">Autorização (Backend)</text:span> é o que garante a longevidade, flexibilidade e a total blindagem aos requisitos de proteção de dados sensíveis estabelecidos pela LGP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8:39:30.293721594</dc:date>
    <meta:editing-duration>PT9M1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126" meta:word-count="1230" meta:character-count="8565" meta:non-whitespace-character-count="7437"/>
  </office:meta>
</office:document-meta>
</file>