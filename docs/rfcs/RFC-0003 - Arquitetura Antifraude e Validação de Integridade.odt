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Google Sans Code" svg:font-family="'Google Sans Code'"/>
    <style:font-face style:name="Google Sans Text" svg:font-family="'Google Sans Text'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text-align="end" style:justify-single-word="false"/>
      <style:text-properties officeooo:paragraph-rsid="001e66dd"/>
    </style:style>
    <style:style style:name="P2" style:family="paragraph" style:parent-style-name="Horizontal_20_Line">
      <style:text-properties style:use-window-font-color="true" loext:opacity="0%"/>
    </style:style>
    <style:style style:name="P3" style:family="paragraph" style:parent-style-name="Text_20_body" style:list-style-name="L1"/>
    <style:style style:name="P4" style:family="paragraph" style:parent-style-name="Text_20_body" style:list-style-name="L1">
      <style:paragraph-properties fo:margin-top="0cm" fo:margin-bottom="0cm" style:contextual-spacing="false"/>
    </style:style>
    <style:style style:name="P5" style:family="paragraph" style:parent-style-name="Text_20_body" style:list-style-name="L2"/>
    <style:style style:name="P6" style:family="paragraph" style:parent-style-name="Text_20_body" style:list-style-name="L2">
      <style:paragraph-properties fo:margin-top="0cm" fo:margin-bottom="0cm" style:contextual-spacing="false"/>
    </style:style>
    <style:style style:name="P7" style:family="paragraph" style:parent-style-name="Text_20_body" style:list-style-name="L3"/>
    <style:style style:name="P8" style:family="paragraph" style:parent-style-name="Text_20_body" style:list-style-name="L3">
      <style:paragraph-properties fo:margin-top="0cm" fo:margin-bottom="0cm" style:contextual-spacing="false"/>
    </style:style>
    <style:style style:name="P9" style:family="paragraph" style:parent-style-name="Text_20_body" style:list-style-name="L4"/>
    <style:style style:name="P10" style:family="paragraph" style:parent-style-name="Text_20_body" style:list-style-name="L4">
      <style:paragraph-properties fo:margin-top="0cm" fo:margin-bottom="0cm" style:contextual-spacing="false"/>
    </style:style>
    <style:style style:name="P11" style:family="paragraph" style:parent-style-name="Text_20_body" style:list-style-name="L5"/>
    <style:style style:name="P12" style:family="paragraph" style:parent-style-name="Text_20_body" style:list-style-name="L5">
      <style:paragraph-properties fo:margin-top="0cm" fo:margin-bottom="0cm" style:contextual-spacing="false"/>
    </style:style>
    <style:style style:name="P13" style:family="paragraph" style:parent-style-name="Text_20_body" style:list-style-name="L6"/>
    <style:style style:name="P14" style:family="paragraph" style:parent-style-name="Text_20_body" style:list-style-name="L6">
      <style:paragraph-properties fo:margin-top="0cm" fo:margin-bottom="0cm" style:contextual-spacing="false"/>
    </style:style>
    <style:style style:name="P15" style:family="paragraph" style:parent-style-name="Text_20_body" style:list-style-name="L7"/>
    <style:style style:name="P16" style:family="paragraph" style:parent-style-name="Text_20_body" style:list-style-name="L7">
      <style:paragraph-properties fo:margin-top="0cm" fo:margin-bottom="0cm" style:contextual-spacing="false"/>
    </style:style>
    <style:style style:name="P17" style:family="paragraph" style:parent-style-name="Text_20_body" style:list-style-name="L8">
      <style:paragraph-properties fo:margin-top="0cm" fo:margin-bottom="0cm" style:contextual-spacing="false"/>
    </style:style>
    <style:style style:name="P18" style:family="paragraph" style:parent-style-name="Text_20_body" style:list-style-name="L9"/>
    <style:style style:name="P19" style:family="paragraph" style:parent-style-name="Text_20_body" style:list-style-name="L9">
      <style:paragraph-properties fo:margin-top="0cm" fo:margin-bottom="0cm" style:contextual-spacing="false"/>
    </style:style>
    <style:style style:name="P20" style:family="paragraph" style:parent-style-name="Text_20_body" style:list-style-name="L10"/>
    <style:style style:name="P21" style:family="paragraph" style:parent-style-name="Text_20_body" style:list-style-name="L10">
      <style:paragraph-properties fo:margin-top="0cm" fo:margin-bottom="0cm" style:contextual-spacing="false"/>
    </style:style>
    <style:style style:name="P22" style:family="paragraph" style:parent-style-name="Text_20_body" style:list-style-name="L11"/>
    <style:style style:name="P23" style:family="paragraph" style:parent-style-name="Text_20_body" style:list-style-name="L12"/>
    <style:style style:name="P24" style:family="paragraph" style:parent-style-name="Text_20_body" style:list-style-name="L12">
      <style:paragraph-properties fo:margin-top="0cm" fo:margin-bottom="0cm" style:contextual-spacing="false"/>
    </style:style>
    <style:style style:name="P25" style:family="paragraph" style:parent-style-name="Text_20_body" style:list-style-name="L13"/>
    <style:style style:name="P26" style:family="paragraph" style:parent-style-name="Text_20_body" style:list-style-name="L13">
      <style:paragraph-properties fo:margin-top="0cm" fo:margin-bottom="0cm" style:contextual-spacing="false"/>
    </style:style>
    <style:style style:name="P27" style:family="paragraph" style:parent-style-name="Text_20_body" style:list-style-name="L14">
      <style:paragraph-properties fo:margin-top="0cm" fo:margin-bottom="0cm" style:contextual-spacing="false"/>
    </style:style>
    <style:style style:name="P28" style:family="paragraph" style:parent-style-name="Text_20_body" style:list-style-name="L8">
      <style:paragraph-properties fo:margin-top="0cm" fo:margin-bottom="0cm" style:contextual-spacing="false"/>
      <style:text-properties style:use-window-font-color="true" loext:opacity="0%"/>
    </style:style>
    <style:style style:name="P29" style:family="paragraph" style:parent-style-name="Text_20_body" style:list-style-name="L8">
      <style:text-properties style:use-window-font-color="true" loext:opacity="0%"/>
    </style:style>
    <style:style style:name="P30" style:family="paragraph" style:parent-style-name="Text_20_body" style:list-style-name="L14">
      <style:text-properties style:use-window-font-color="true" loext:opacity="0%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variant="normal" fo:text-transform="none" fo:color="#c7c7c7" loext:opacity="100%" style:font-name="Google Sans Text" fo:font-size="10.5pt" fo:letter-spacing="normal" fo:font-style="normal" fo:font-weight="bold"/>
    </style:style>
    <style:style style:name="T4" style:family="text">
      <style:text-properties fo:font-variant="normal" fo:text-transform="none" fo:color="#c7c7c7" loext:opacity="100%" style:font-name="Google Sans Text" fo:font-size="10.5pt" fo:letter-spacing="normal" fo:font-style="normal" fo:font-weight="normal"/>
    </style:style>
    <style:style style:name="T5" style:family="text">
      <style:text-properties fo:font-variant="normal" fo:text-transform="none" fo:color="#c7c7c7" loext:opacity="100%" style:font-name="Google Sans Text" fo:font-size="10.5pt" fo:letter-spacing="normal" fo:font-style="italic" fo:font-weight="normal"/>
    </style:style>
    <style:style style:name="T6" style:family="text">
      <style:text-properties fo:font-variant="normal" fo:text-transform="none" fo:color="#c7c7c7" loext:opacity="100%" style:font-name="Google Sans Text" fo:font-size="12pt" fo:letter-spacing="normal" fo:font-style="normal" fo:font-weight="normal"/>
    </style:style>
    <style:style style:name="T7" style:family="text">
      <style:text-properties fo:font-variant="normal" fo:text-transform="none" fo:color="#c7c7c7" loext:opacity="100%" style:font-name="Google Sans Text" fo:font-size="12pt" fo:letter-spacing="normal" fo:font-style="normal" fo:font-weight="normal" officeooo:rsid="001ed707"/>
    </style:style>
    <style:style style:name="T8" style:family="text">
      <style:text-properties fo:font-variant="normal" fo:text-transform="none" fo:color="#c7c7c7" loext:opacity="100%" style:font-name="Google Sans Code" fo:font-size="10.5pt" fo:letter-spacing="normal" fo:font-style="normal" fo:font-weight="bold"/>
    </style:style>
    <style:style style:name="T9" style:family="text">
      <style:text-properties fo:font-variant="normal" fo:text-transform="none" fo:color="#c7c7c7" loext:opacity="100%" style:font-name="Google Sans Code" fo:letter-spacing="normal" fo:font-style="normal" fo:font-weight="normal"/>
    </style:style>
    <style:style style:name="T10" style:family="text">
      <style:text-properties fo:font-variant="normal" fo:text-transform="none" fo:color="#c7c7c7" loext:opacity="100%" fo:letter-spacing="normal"/>
    </style:style>
    <style:style style:name="T11" style:family="text">
      <style:text-properties fo:font-variant="normal" fo:text-transform="none" style:font-name="Google Sans Text" fo:font-size="10.5pt" fo:letter-spacing="normal" fo:font-style="normal" fo:font-weight="bold"/>
    </style:style>
    <style:style style:name="T12" style:family="text">
      <style:text-properties fo:font-variant="normal" fo:text-transform="none" style:font-name="Google Sans Text" fo:font-size="10.5pt" fo:letter-spacing="normal" fo:font-style="normal" fo:font-weight="normal"/>
    </style:style>
    <style:style style:name="T13" style:family="text">
      <style:text-properties fo:font-variant="normal" fo:text-transform="none" style:font-name="Google Sans Text" fo:font-size="10.5pt" fo:letter-spacing="normal" fo:font-style="italic" fo:font-weight="normal"/>
    </style:style>
    <style:style style:name="T14" style:family="text">
      <style:text-properties fo:font-variant="normal" fo:text-transform="none" style:font-name="Google Sans Text" fo:font-size="12pt" fo:letter-spacing="normal" fo:font-style="normal" fo:font-weight="normal"/>
    </style:style>
    <style:style style:name="T15" style:family="text">
      <style:text-properties fo:font-variant="normal" fo:text-transform="none" style:font-name="Google Sans Text" fo:font-size="12pt" fo:letter-spacing="normal" fo:font-style="normal" fo:font-weight="normal" officeooo:rsid="001ed707"/>
    </style:style>
    <style:style style:name="T16" style:family="text">
      <style:text-properties fo:font-variant="normal" fo:text-transform="none" style:use-window-font-color="true" loext:opacity="0%" style:font-name="Google Sans Text" fo:font-size="10.5pt" fo:letter-spacing="normal" fo:font-style="normal" fo:font-weight="bold"/>
    </style:style>
    <style:style style:name="T17" style:family="text">
      <style:text-properties fo:font-variant="normal" fo:text-transform="none" style:use-window-font-color="true" loext:opacity="0%" style:font-name="Google Sans Text" fo:font-size="10.5pt" fo:letter-spacing="normal" fo:font-style="normal" fo:font-weight="normal"/>
    </style:style>
    <style:style style:name="T18" style:family="text">
      <style:text-properties fo:font-variant="normal" fo:text-transform="none" style:use-window-font-color="true" loext:opacity="0%" style:font-name="Google Sans Text" fo:font-size="12pt" fo:letter-spacing="normal" fo:font-style="normal" fo:font-weight="normal"/>
    </style:style>
    <style:style style:name="T19" style:family="text">
      <style:text-properties fo:font-variant="normal" fo:text-transform="none" style:use-window-font-color="true" loext:opacity="0%" style:font-name="Google Sans Text" fo:font-size="12pt" fo:letter-spacing="normal" fo:font-style="normal" fo:font-weight="normal" officeooo:rsid="001ed707"/>
    </style:style>
    <style:style style:name="T20" style:family="text">
      <style:text-properties fo:font-variant="normal" fo:text-transform="none" style:use-window-font-color="true" loext:opacity="0%" style:font-name="Google Sans Text" fo:font-size="12pt" fo:letter-spacing="normal" fo:font-style="normal" fo:font-weight="bold" style:font-weight-asian="bold" style:font-weight-complex="bold"/>
    </style:style>
    <style:style style:name="T21" style:family="text">
      <style:text-properties fo:font-variant="normal" fo:text-transform="none" style:use-window-font-color="true" loext:opacity="0%" style:font-name="Google Sans Code" fo:letter-spacing="normal" fo:font-style="normal" fo:font-weight="normal"/>
    </style:style>
    <style:style style:name="T22" style:family="text">
      <style:text-properties fo:font-variant="normal" fo:text-transform="none" style:use-window-font-color="true" loext:opacity="0%" style:font-name="Google Sans Code" fo:font-size="10.5pt" fo:letter-spacing="normal" fo:font-style="normal" fo:font-weight="bold"/>
    </style:style>
    <style:style style:name="T23" style:family="text">
      <style:text-properties fo:font-variant="normal" fo:text-transform="none" style:use-window-font-color="true" loext:opacity="0%" fo:letter-spacing="normal"/>
    </style:style>
    <style:style style:name="T24" style:family="text">
      <style:text-properties fo:font-variant="normal" fo:text-transform="none" style:font-name="Google Sans Code" fo:font-size="10.5pt" fo:letter-spacing="normal" fo:font-style="normal" fo:font-weight="bold"/>
    </style:style>
    <style:style style:name="T25" style:family="text">
      <style:text-properties fo:font-variant="normal" fo:text-transform="none" style:font-name="Google Sans Code" fo:letter-spacing="normal" fo:font-style="normal" fo:font-weight="normal"/>
    </style:style>
    <style:style style:name="T26" style:family="text">
      <style:text-properties fo:font-variant="normal" fo:text-transform="none" fo:letter-spacing="normal"/>
    </style:style>
    <style:style style:name="T27" style:family="text">
      <style:text-properties style:use-window-font-color="true" loext:opacity="0%"/>
    </style:style>
    <style:style style:name="T28" style:family="text">
      <style:text-properties style:font-name="Google Sans Code" fo:font-weight="bold"/>
    </style:style>
    <style:style style:name="T29" style:family="text">
      <style:text-properties officeooo:rsid="001ed707"/>
    </style:style>
    <style:style style:name="T30" style:family="text">
      <style:text-properties fo:font-style="italic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RFC-0003</text:h>
      <text:h text:style-name="Heading_20_1" text:outline-level="1">Arquitetura Antifraude e Validação de Integridade</text:h>
      <text:h text:style-name="Heading_20_2" text:outline-level="2">(Geolocalização + Biometria + Dispositivo + Identidade Segura)</text:h>
      <text:p text:style-name="P1"><text:span text:style-name="Strong_20_Emphasis">Status:</text:span> Aprovado e Atualizado (v1.1) </text:p>
      <text:p text:style-name="P1"><text:span text:style-name="Strong_20_Emphasis">Autor:</text:span> Equipe de Arquitetura </text:p>
      <text:p text:style-name="P1"><text:span text:style-name="Strong_20_Emphasis">Data:</text:span> 07/05/2026 </text:p>
      <text:p text:style-name="P1"><text:span text:style-name="Strong_20_Emphasis">Depende de:</text:span> RFC-0001, RFC-0002, RFC-0005, Arquitetura de Identidade e Acesso Segura</text:p>
      <text:p text:style-name="Horizontal_20_Line"/>
      <text:h text:style-name="Heading_20_2" text:outline-level="2">1. Contexto</text:h>
      <text:p text:style-name="Text_20_body">O sistema registra presença com base em:</text:p>
      <text:list text:style-name="L1">
        <text:list-item>
          <text:p text:style-name="P4">Geolocalização (Lat/Lng contra o Polígono da Unidade). </text:p>
        </text:list-item>
        <text:list-item>
          <text:p text:style-name="P4">Biometria facial e Prova de Vida (<text:span text:style-name="Emphasis">Liveness</text:span>). </text:p>
        </text:list-item>
        <text:list-item>
          <text:p text:style-name="P4">Identidade Canônica Governamental (Validação de CPF). </text:p>
        </text:list-item>
        <text:list-item>
          <text:p text:style-name="P4">Nível de Confiança do Dispositivo. </text:p>
        </text:list-item>
        <text:list-item>
          <text:p text:style-name="P3">Contexto organizacional (Regras de Negócio). </text:p>
        </text:list-item>
      </text:list>
      <text:p text:style-name="Text_20_body">Sem mecanismos antifraude severos, o sistema de controle de presença se torna vulnerável a:</text:p>
      <text:list text:style-name="L2">
        <text:list-item>
          <text:p text:style-name="P6">GPS spoofing (Falsificação de coordenadas). </text:p>
        </text:list-item>
        <text:list-item>
          <text:p text:style-name="P6"><text:span text:style-name="Emphasis">Presentation Attacks</text:span> / <text:span text:style-name="Emphasis">Face Replay</text:span> (Uso de foto estática ou vídeo para burlar a câmera). </text:p>
        </text:list-item>
        <text:list-item>
          <text:p text:style-name="P6"><text:span text:style-name="Emphasis">Cross-IdP Impersonation</text:span> (Sequestro de CPF usando logins sociais de terceiros). </text:p>
        </text:list-item>
        <text:list-item>
          <text:p text:style-name="P6">Registro remoto indevido ou automação via scripts. </text:p>
        </text:list-item>
        <text:list-item>
          <text:p text:style-name="P5">Compartilhamento abusivo de dispositivos. </text:p>
        </text:list-item>
      </text:list>
      <text:p text:style-name="Text_20_body">Este RFC define os mecanismos de mitigação em camadas para o MVP, alinhados estritamente à LGPD e à arquitetura de Identidade Canônica Centralizada.</text:p>
      <text:p text:style-name="Horizontal_20_Line"/>
      <text:h text:style-name="Heading_20_2" text:outline-level="2">2. Princípios Antifraude</text:h>
      <text:list text:style-name="L3">
        <text:list-item>
          <text:p text:style-name="P8"><text:span text:style-name="Strong_20_Emphasis">Nunca confiar exclusivament</text:span><text:span text:style-name="Strong_20_Emphasis"><text:span text:style-name="T27">e no client:</text:span></text:span><text:span text:style-name="T27"> O frontend (React) atua apenas como coletor; o veredito ocorre na máquina servidora. </text:span></text:p>
        </text:list-item>
        <text:list-item>
          <text:p text:style-name="P8"><text:span text:style-name="Strong_20_Emphasis"><text:span text:style-name="T16">Retenção Efêmera e Expurgo (Diretriz LGPD):</text:span></text:span><text:span text:style-name="Strong_20_Emphasis"><text:span text:style-name="T17"> Mídias brutas (fotos da face) não são armazenadas permanentemente. Elas permanecem em uma "quarentena visual" (Storage S3) estritamente para fins de auditoria de curto prazo e são expurgadas automaticamente </text:span></text:span><text:soft-page-break/><text:span text:style-name="Strong_20_Emphasis"><text:span text:style-name="T17">via rotina agendada (CRON). No banco de dados, persistem apenas os hashes biométricos.</text:span></text:span></text:p>
        </text:list-item>
        <text:list-item>
          <text:p text:style-name="P8"><text:span text:style-name="Strong_20_Emphasis"><text:span text:style-name="T27">Comando Único e Imutabilidade:</text:span></text:span><text:span text:style-name="T27"> O registro bruto gerado pelo cliente é imutável, o risco é classificado posteriormente. </text:span></text:p>
        </text:list-item>
        <text:list-item>
          <text:p text:style-name="P8"><text:span text:style-name="Strong_20_Emphasis">Validação Estendida na Fronteira (2x2):</text:span> O vínculo inicial da biometria exige orquestração governamental (fé pública). O registro diário usa o motor interno. </text:p>
        </text:list-item>
        <text:list-item>
          <text:p text:style-name="P7"><text:span text:style-name="Strong_20_Emphasis">Defesa em Profundidade (</text:span><text:span text:style-name="Strong_20_Emphasis"><text:span text:style-name="Emphasis">Defense-in-Depth</text:span></text:span><text:span text:style-name="Strong_20_Emphasis">):</text:span> Múltiplas barreiras de análise (Localização, Biometria, Dispositivo e Comportamento). </text:p>
        </text:list-item>
      </text:list>
      <text:p text:style-name="Horizontal_20_Line"/>
      <text:h text:style-name="Heading_20_2" text:outline-level="2">3. Modelo de Ameaças</text:h>
      <text:h text:style-name="Heading_20_3" text:outline-level="3">3.1 GPS Spoofing</text:h>
      <text:p text:style-name="Text_20_body">Usuário simula localização usando aplicativos falsos (Mock Locations) ou manipulando a API de geolocalização do navegador.</text:p>
      <text:h text:style-name="Heading_20_3" text:outline-level="3">3.2 Face Replay e Liveness Spoofing</text:h>
      <text:p text:style-name="Text_20_body">O fraudador apresenta fotografias de alta resolução, telas de celular ou máscaras para a webcam tentando simular a presença física do titular.</text:p>
      <text:h text:style-name="Heading_20_3" text:outline-level="3">3.3 Sequestro de Identidade (Cross-IdP Impersonation)</text:h>
      <text:p text:style-name="Text_20_body">Um invasor realiza login com um e-mail falso via Keycloak e, na tela de cadastro, tenta informar o CPF de um terceiro para assumir sua folha de ponto.</text:p>
      <text:h text:style-name="Heading_20_3" text:outline-level="3">3.4 Manipulação de Timestamp</text:h>
      <text:p text:style-name="Text_20_body">Tentativa de alterar o horário local do dispositivo para fraudar o horário de entrada ou saída.</text:p>
      <text:h text:style-name="Heading_20_3" text:outline-level="3">3.5 Device Sharing Abusivo</text:h>
      <text:p text:style-name="Text_20_body">Um único usuário utiliza seu dispositivo pessoal para registrar o ponto de diversos outros colaboradores de forma orquestrada (Modo Kiosk não autorizado).</text:p>
      <text:p text:style-name="Horizontal_20_Line"/>
      <text:h text:style-name="Heading_20_2" text:outline-level="2">4. Arquitetura Antifraude — As 5 Camadas</text:h>
      <text:list text:style-name="L4">
        <text:list-item>
          <text:p text:style-name="P10"><text:span text:style-name="Strong_20_Emphasis">Camada 1 — Validação Geográfica</text:span> (PostGIS) </text:p>
        </text:list-item>
        <text:list-item>
          <text:p text:style-name="P10"><text:span text:style-name="Strong_20_Emphasis">Camada 2 — Validação Biométrica em 2 Níveis</text:span> (Governamental + Motor Interno) </text:p>
        </text:list-item>
        <text:list-item>
          <text:p text:style-name="P10"><text:span text:style-name="Strong_20_Emphasis">Camada 3 — Integridade e Confiança de Dispositivo</text:span> (Device Fingerprinting) </text:p>
        </text:list-item>
        <text:list-item>
          <text:p text:style-name="P10"><text:span text:style-name="Strong_20_Emphasis">Camada 4 — Análise Comportamental e Risco Composto</text:span> (Heurísticas) </text:p>
        </text:list-item>
        <text:list-item>
          <text:p text:style-name="P9"><text:span text:style-name="Strong_20_Emphasis">Camada 5 — Auditoria Centralizada e Imutável</text:span> (Logs e Envers) </text:p>
        </text:list-item>
      </text:list>
      <text:p text:style-name="Horizontal_20_Line"/>
      <text:h text:style-name="Heading_20_2" text:outline-level="2"><text:soft-page-break/>5. Geolocalização (Camada 1)</text:h>
      <text:h text:style-name="Heading_20_3" text:outline-level="3">5.1 Decisão Arquitetural</text:h>
      <text:list text:style-name="L5">
        <text:list-item>
          <text:p text:style-name="P12">O polígono oficial da unidade (<text:span text:style-name="Source_20_Text">poligono_geo</text:span>) reside na tabela <text:span text:style-name="Source_20_Text">folha_ponto.unidade</text:span>. </text:p>
        </text:list-item>
        <text:list-item>
          <text:p text:style-name="P12">O cálculo geodésico (verificação se o ponto está contido na área) é executado unicamente pelo PostGIS no PostgreSQL. </text:p>
        </text:list-item>
        <text:list-item>
          <text:p text:style-name="P11">O evento bruto na tabela <text:span text:style-name="Source_20_Text">folha_ponto.registro_presenca</text:span> salva as coordenadas soltas (<text:span text:style-name="Source_20_Text">latitude</text:span>, <text:span text:style-name="Source_20_Text">longitude</text:span>) e a <text:span text:style-name="Source_20_Text">precisao_gps</text:span>. </text:p>
        </text:list-item>
      </text:list>
      <text:h text:style-name="Heading_20_3" text:outline-level="3">5.2 Validações no MVP</text:h>
      <text:list text:style-name="L6">
        <text:list-item>
          <text:p text:style-name="P14"><text:span text:style-name="Strong_20_Emphasis">Precisão:</text:span> Se a <text:span text:style-name="Source_20_Text">precisao_gps</text:span> informada pelo hardware for superior ao raio limite configurado, o evento sofre acréscimo de pontuação de risco. </text:p>
        </text:list-item>
        <text:list-item>
          <text:p text:style-name="P14"><text:span text:style-name="Strong_20_Emphasis">Distância e Continência:</text:span> O backend processa se a coordenada intercepta a geometria da unidade daquele evento. </text:p>
        </text:list-item>
        <text:list-item>
          <text:p text:style-name="P13"><text:span text:style-name="Strong_20_Emphasis">Saltos Impossíveis:</text:span> Comparação da distância percorrida desde o último ponto em relação ao tempo decorrido. </text:p>
        </text:list-item>
      </text:list>
      <text:h text:style-name="Heading_20_3" text:outline-level="3">5.3 Mitigação de Mock Location</text:h>
      <text:list text:style-name="L7">
        <text:list-item>
          <text:p text:style-name="P16">O frontend deve consultar APIs nativas para detectar uso de localizações simuladas (quando aplicável) e injetar essa suspeita no payload. </text:p>
        </text:list-item>
        <text:list-item>
          <text:p text:style-name="P15">O backend registrará no campo <text:span text:style-name="Source_20_Text">indicadores_risco</text:span> (JSONB) da tabela <text:span text:style-name="Source_20_Text">registro_presenca</text:span> a flag indicando o uso de ferramentas de <text:span text:style-name="Emphasis">spoofing</text:span>. </text:p>
        </text:list-item>
      </text:list>
      <text:p text:style-name="Horizontal_20_Line"/>
      <text:h text:style-name="Heading_20_2" text:outline-level="2">6. Biometria Facial e Liveness (Camada 2)</text:h>
      <text:p text:style-name="Text_20_body">A biometria obedece a dois momentos de validação distintos, resolvendo a vulnerabilidade do Sequestro de Identidade.</text:p>
      <text:h text:style-name="Heading_20_3" text:outline-level="3">6.1 Onboarding e Criação do Vínculo (Validação 2x2)</text:h>
      <text:list text:style-name="L8">
        <text:list-item>
          <text:p text:style-name="P17">Para impedir o <text:span text:style-name="Emphasis">Cross-IdP Impersonation</text:span>, a primeira amarração do CPF exige uma <text:span text:style-name="Strong_20_Emphasis">Validação 2x2 (Biográfica + Bio</text:span><text:span text:style-name="Strong_20_Emphasis"><text:span text:style-name="T27">métrica)</text:span></text:span><text:span text:style-name="T27">. </text:span></text:p>
        </text:list-item>
        <text:list-item>
          <text:p text:style-name="P28">O Spring Boot enviará a face capturada e o CPF informados no React para um provedor de fé pública (ex: Serpro / Datavalid). </text:p>
        </text:list-item>
        <text:list-item>
          <text:p text:style-name="P29"><text:span text:style-name="T12">Apenas após aprovação governamental, o Hash Biométrico é extraído, e a tabela </text:span><text:span text:style-name="T24">seguranca.perfil_biometrico</text:span><text:span text:style-name="T12"> é populada.</text:span></text:p>
        </text:list-item>
      </text:list>
      <text:h text:style-name="Heading_20_3" text:outline-level="3">6.2 Registro Diário (Motor Python Interno)</text:h>
      <text:list text:style-name="L9">
        <text:list-item>
          <text:p text:style-name="P19">Para o controle de presença rotineiro, o backend envia a requisição para o motor Python local via API interna. </text:p>
        </text:list-item>
        <text:list-item>
          <text:p text:style-name="P19">O motor interno: </text:p>
          <text:list>
            <text:list-item>
              <text:p text:style-name="P19">Executa avaliação de Prova de Vida (<text:span text:style-name="Emphasis">Liveness Detection</text:span>) avaliando profundidade 3D <text:soft-page-break/>na matriz do frame para bloquear <text:span text:style-name="Emphasis">Face Replay</text:span>. </text:p>
            </text:list-item>
            <text:list-item>
              <text:p text:style-name="P19">Gera o template biométrico. </text:p>
            </text:list-item>
            <text:list-item>
              <text:p text:style-name="P19">Compara o vetor extraído com o vetor armazenado na tabela <text:span text:style-name="Source_20_Text">perfil_biometrico</text:span>. </text:p>
            </text:list-item>
          </text:list>
        </text:list-item>
        <text:list-item>
          <text:p text:style-name="P18">O resultado é guardado no banco através dos campos <text:span text:style-name="Source_20_Text">pontuacao_biometrica</text:span> (o <text:span text:style-name="Emphasis">score</text:span> numérico) e <text:span text:style-name="Source_20_Text">biometria_valida</text:span> (booleano baseado em <text:span text:style-name="Emphasis">threshold</text:span>). </text:p>
        </text:list-item>
      </text:list>
      <text:h text:style-name="Heading_20_3" text:outline-level="3">6.3 Ciclo de Vida e Quarentena da Mídia Fonte (Compliance LGPD) </text:h>
      <text:p text:style-name="Text_20_body"><text:span text:style-name="T19">E</text:span><text:span text:style-name="T18">m conformidade com o princípio da minimização da LGPD, o arquivamento definitivo das fotografias rasterizadas (arquivos </text:span><text:span text:style-name="Source_20_Text"><text:span text:style-name="T21">.jpg</text:span></text:span><text:span text:style-name="T18">/</text:span><text:span text:style-name="Source_20_Text"><text:span text:style-name="T21">.png</text:span></text:span><text:span text:style-name="T23"> </text:span><text:span text:style-name="T18">brutos) é estritamente proibido.</text:span><text:span text:style-name="T23"> </text:span><text:span text:style-name="T18">A imagem capturada no momento do ponto será transmitida para uma área de armazenamento de ativos (Storage S3) isolada, atuando como uma "quarentena visual" exclusiva para sindicâncias e auditorias de curto prazo. Após a extração do vetor resultante gravado na coluna </text:span><text:span text:style-name="Source_20_Text"><text:span text:style-name="T21">modelo_biometrico</text:span></text:span><text:span text:style-name="T23"> </text:span><text:span text:style-name="T18">da tabela </text:span><text:span text:style-name="T21">seguranca.perfil_biometrico</text:span><text:span text:style-name="T18">, a imagem original no S3 será objeto de expurgo </text:span><text:span text:style-name="T20">automatizado</text:span><text:span text:style-name="T18"> (hard delete)</text:span><text:span text:style-name="T23"> </text:span><text:span text:style-name="T18">pelo Spring Boot tão logo expire o prazo de retenção definido pela política do órgão.</text:span></text:p>
      <text:p text:style-name="Horizontal_20_Line"/>
      <text:h text:style-name="Heading_20_2" text:outline-level="2">7. Integridade de Dispositivo (Camada 3)</text:h>
      <text:h text:style-name="Heading_20_3" text:outline-level="3">7.1 Identificação (Device Fingerprinting)</text:h>
      <text:p text:style-name="Text_20_body">O sistema exige a gestão de <text:span text:style-name="Emphasis">hardware</text:span> confiável através da tabela <text:span text:style-name="Source_20_Text"><text:span text:style-name="T2">seguranca.di</text:span></text:span><text:span text:style-name="Strong_20_Emphasis"><text:span text:style-name="Source_20_Text">spositivo</text:span></text:span>.</text:p>
      <text:list text:style-name="L10">
        <text:list-item>
          <text:p text:style-name="P21">O frontend gera e envia um UUID de rastreio (<text:span text:style-name="Source_20_Text">identificador_dispositivo</text:span>). </text:p>
        </text:list-item>
        <text:list-item>
          <text:p text:style-name="P21">O backend consulta/grava o dispositivo no banco e verifica o seu histórico de uso. </text:p>
        </text:list-item>
        <text:list-item>
          <text:p text:style-name="P20">A tabela <text:span text:style-name="Source_20_Text">registro_presenca</text:span> atrela obrigatoriamente o evento à chave estrangeira <text:span text:style-name="Source_20_Text">dispositivo_id</text:span>. </text:p>
        </text:list-item>
      </text:list>
      <text:h text:style-name="Heading_20_3" text:outline-level="3">7.2 Nível de Confiança</text:h>
      <text:p text:style-name="Text_20_body">A tabela de dispositivo comporta o campo <text:span text:style-name="Source_20_Text">nivel_confianca</text:span> (LOW, MEDIUM, HIGH). Esse nível é degradado automaticamente pelo backend se o mesmo aparelho físico tentar registrar a presença para dezenas de <text:span text:style-name="Source_20_Text">usuario_id</text:span> diferentes fora do modo Kiosk oficial.</text:p>
      <text:h text:style-name="Heading_20_3" text:outline-level="3">7.3 Modo de Registro</text:h>
      <text:p text:style-name="Text_20_body">Para preparar a base de dados para Kiosks ou tablets de parede, a tabela de eventos suporta a coluna <text:span text:style-name="Source_20_Text">modo_registro</text:span>.</text:p>
      <text:list text:style-name="L11">
        <text:list-item>
          <text:p text:style-name="P22">Valores previstos: <text:span text:style-name="Source_20_Text">SELF</text:span> (Aparelho próprio) ou <text:span text:style-name="Source_20_Text">SHARED_DEVICE</text:span> (Aparelho compartilhado homologado). </text:p>
        </text:list-item>
      </text:list>
      <text:p text:style-name="Horizontal_20_Line"/>
      <text:h text:style-name="Heading_20_2" text:outline-level="2"><text:soft-page-break/>8. Timestamp Seguro (Camada 4)</text:h>
      <text:p text:style-name="Text_20_body">O sistema opera com dupla checagem temporal para evitar fraudes de manipulação de relógio do celular. A tabela <text:span text:style-name="Source_20_Text">registro_presenca</text:span> exige obrigatoriamente duas colunas:</text:p>
      <text:list text:style-name="L12">
        <text:list-item>
          <text:p text:style-name="P24"><text:span text:style-name="Source_20_Text">capturado_em</text:span>: O horário alegado pelo dispositivo cliente. </text:p>
        </text:list-item>
        <text:list-item>
          <text:p text:style-name="P23"><text:span text:style-name="Source_20_Text">recebido_no_servidor_em</text:span>: O horário real e blindado da máquina servidora (em UTC). </text:p>
        </text:list-item>
      </text:list>
      <text:p text:style-name="Text_20_body">Se a divergência entre os dois tempos ultrapassar o limite aceitável de rede, o evento é marcado com alto <text:span text:style-name="Source_20_Text">pontuacao_risco</text:span>. A regra de negócio para cálculos de jornada utilizará primordialmente a hora do servidor.</text:p>
      <text:p text:style-name="Horizontal_20_Line"/>
      <text:h text:style-name="Heading_20_2" text:outline-level="2">9. Score de Risco Composto</text:h>
      <text:p text:style-name="Text_20_body">Cada requisição de presença passará por um algoritmo de <text:span text:style-name="Emphasis">Risk Scoring</text:span> que compilará os fatores das camadas anteriores, gerando uma consolidação armazenada na coluna <text:span text:style-name="Source_20_Text">pontuacao_risco</text:span> (float) e detalhada no campo <text:span text:style-name="Source_20_Text">indicadores_risco</text:span> (JSONB).</text:p>
      <text:p text:style-name="Text_20_body"><text:span text:style-name="Strong_20_Emphasis">Fórmula referencial:</text:span> <text:span text:style-name="Source_20_Text">pontuacao_risco = f(geofence_distance, gps_accuracy, biometric_score, liveness_flag, device_trust_level, temporal_divergence)</text:span></text:p>
      <text:p text:style-name="Text_20_body">No MVP, o sistema adotará a política de Comando Único, focando no registro bruto imutável. Registros com alta <text:span text:style-name="Source_20_Text">pontuacao_risco</text:span> recebem um <text:span text:style-name="Source_20_Text">status_administrativo</text:span> de <text:span text:style-name="Source_20_Text">PENDENTE</text:span> e exigirão tratamento gerencial (exceções).</text:p>
      <text:p text:style-name="Horizontal_20_Line"/>
      <text:h text:style-name="Heading_20_2" text:outline-level="2">10. Auditoria Imutável (Camada 5)</text:h>
      <text:p text:style-name="Text_20_body">Como última linha de defesa, a trilha de segurança é garantida pela arquitetura de banco de dados (RFC-0005):</text:p>
      <text:list text:style-name="L13">
        <text:list-item>
          <text:p text:style-name="P26"><text:span text:style-name="Strong_20_Emphasis">A Regra de Ouro:</text:span> O evento bruto de <text:span text:style-name="Source_20_Text">registro_presenca</text:span> nunca é deletado. Qualquer reclassificação do evento (ex: "registro redundante") apenas altera o seu <text:span text:style-name="Source_20_Text">status_administrativo</text:span> ou <text:span text:style-name="Source_20_Text">status_tecnico</text:span>, preservando a evidência da fraude. </text:p>
        </text:list-item>
        <text:list-item>
          <text:p text:style-name="P25"><text:span text:style-name="Strong_20_Emphasis"><text:span text:style-name="T16">Log Centralizado:</text:span></text:span><text:span text:style-name="Strong_20_Emphasis"><text:span text:style-name="T17"> A tabela </text:span></text:span><text:span text:style-name="Strong_20_Emphasis"><text:span text:style-name="T22">seguranca.log_auditoria</text:span></text:span><text:span text:style-name="Strong_20_Emphasis"><text:span text:style-name="T17"> será utilizada para registrar formalmente as tentativas de acesso negadas pela Validação 2x2 do Governo (Serpro), violações de regras de negócio graves do motor de políticas e banimentos de dispositivos.</text:span></text:span></text:p>
        </text:list-item>
      </text:list>
      <text:p text:style-name="P2"/>
      <text:h text:style-name="Heading_20_2" text:outline-level="2">11. Arquitetura Técnica Recomendada</text:h>
      <text:p text:style-name="Text_20_body">O processamento das camadas 1 a 4 deve ser implementado no Spring Boot através de um módulo ou <text:span text:style-name="Emphasis">pipeline</text:span> de interceptadores apartado da regra de negócio de ponto em si (ex: <text:span text:style-name="Source_20_Text">FraudDetectionEngine</text:span>). O motor de políticas avaliará os resultados gerados por este módulo e decidirá se emite a exceção ou apenas <text:span text:style-name="Emphasis">tagueia</text:span> o evento com risco alto.</text:p>
      <text:p text:style-name="Horizontal_20_Line"><text:soft-page-break/></text:p>
      <text:h text:style-name="Heading_20_2" text:outline-level="2">12. Riscos Aceitáveis no MVP vs. Inaceitáveis</text:h>
      <text:list text:style-name="L14">
        <text:list-item>
          <text:p text:style-name="P27"><text:span text:style-name="Strong_20_Emphasis">Risco Aceitável:</text:span> <text:span text:style-name="Emphasis">Spoofing</text:span> sofisticado baseado em interceptação a nível de <text:span text:style-name="Emphasis">kernel</text:span> (root/jailbreak) disfarçado perfeitamente que entregue coordenadas e imagens injetadas. </text:p>
        </text:list-item>
        <text:list-item>
          <text:p text:style-name="P27"><text:span text:style-name="Strong_20_Emphasis">Risco Inaceitável:</text:span> Validação de <text:span text:style-name="Emphasis">geofence</text:span> confiada <text:span text:style-name="T27">apenas ao JavaScript do React. </text:span></text:p>
        </text:list-item>
        <text:list-item>
          <text:p text:style-name="P30"><text:span text:style-name="T11">Risco Controlado:</text:span><text:span text:style-name="T12"> Armazenamento temporário da foto facial em Storage (S3) isolado para fins de auditoria/sindicância de curtíssimo prazo, mitigado obrigatoriamente por uma rotina de expurgo automatizado (</text:span><text:span text:style-name="T13">Scheduled Task</text:span><text:span text:style-name="T12">) na máquina servidora.</text:span> </text:p>
        </text:list-item>
      </text:list>
      <text:p text:style-name="P2"/>
      <text:h text:style-name="Heading_20_2" text:outline-level="2">13. Decisão Estratégica</text:h>
      <text:p text:style-name="Text_20_body">A arquitetura estabelece que as validações antifraude mais caras e complexas (Prova de Vida governamental via Validação 2x2) ocorram na "fronteira" (Onboarding), ancorando firmemente o CPF de forma irrefutável. Para as milhares de transações diárias de ponto, o sistema confia em heurísticas de retaguarda (Geofence, Motor Python Local e Device ID) para equilibrar extrema segurança com baixa latência e economia de custos de API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Google Sans Code" svg:font-family="'Google Sans Code'"/>
    <style:font-face style:name="Google Sans Text" svg:font-family="'Google Sans Text'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5-08T17:32:39.701820786</dc:date>
    <meta:editing-duration>PT6M30S</meta:editing-duration>
    <meta:editing-cycles>2</meta:editing-cycles>
    <meta:generator>LibreOffice/24.2.7.2$Linux_X86_64 LibreOffice_project/420$Build-2</meta:generator>
    <meta:document-statistic meta:table-count="0" meta:image-count="0" meta:object-count="0" meta:page-count="6" meta:paragraph-count="103" meta:word-count="1497" meta:character-count="10227" meta:non-whitespace-character-count="8826"/>
  </office:meta>
</office:document-meta>
</file>