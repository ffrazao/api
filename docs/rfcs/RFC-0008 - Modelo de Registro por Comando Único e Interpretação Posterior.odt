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c7c7c7" loext:opacity="100%" style:font-name="Google Sans Text" fo:font-size="12pt" fo:letter-spacing="normal" fo:font-style="normal" fo:font-weight="normal"/>
    </style:style>
    <style:style style:name="T2" style:family="text">
      <style:text-properties fo:font-variant="normal" fo:text-transform="none" fo:color="#c7c7c7" loext:opacity="100%" fo:letter-spacing="normal"/>
    </style:style>
    <style:style style:name="T3" style:family="text">
      <style:text-properties fo:font-variant="normal" fo:text-transform="none" fo:color="#c7c7c7" loext:opacity="100%" fo:letter-spacing="normal" fo:font-style="normal" fo:font-weight="normal"/>
    </style:style>
    <style:style style:name="T4" style:family="text">
      <style:text-properties fo:font-variant="normal" fo:text-transform="none" fo:color="#c7c7c7" loext:opacity="100%" style:font-name="Google Sans Code" fo:letter-spacing="normal" fo:font-style="normal" fo:font-weight="normal"/>
    </style:style>
    <style:style style:name="T5" style:family="text">
      <style:text-properties fo:font-variant="normal" fo:text-transform="none" fo:color="#c7c7c7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c7c7c7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c7c7c7" loext:opacity="100%" style:font-name="Liberation Serif" fo:letter-spacing="normal"/>
    </style:style>
    <style:style style:name="T8" style:family="text">
      <style:text-properties fo:font-variant="normal" fo:text-transform="none" fo:color="#c7c7c7" loext:opacity="100%" style:font-name="Liberation Serif" fo:letter-spacing="normal" fo:font-style="normal" fo:font-weight="normal"/>
    </style:style>
    <style:style style:name="T9" style:family="text">
      <style:text-properties fo:font-variant="normal" fo:text-transform="none" style:font-name="Google Sans Text" fo:font-size="12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style:font-name="Google Sans Code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/>
    </style:style>
    <style:style style:name="T13" style:family="text">
      <style:text-properties fo:font-variant="normal" fo:text-transform="none" style:use-window-font-color="true" loext:opacity="0%" fo:letter-spacing="normal"/>
    </style:style>
    <style:style style:name="T14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15" style:family="text">
      <style:text-properties fo:font-variant="normal" fo:text-transform="none" style:use-window-font-color="true" loext:opacity="0%" style:font-name="Google Sans Code" fo:letter-spacing="normal" fo:font-style="normal" fo:font-weight="normal"/>
    </style:style>
    <style:style style:name="T16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style:font-name="Liberation Serif" fo:letter-spacing="normal"/>
    </style:style>
    <style:style style:name="T19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21" style:family="text">
      <style:text-properties fo:font-variant="normal" fo:text-transform="none" style:font-name="Liberation Serif" fo:letter-spacing="normal"/>
    </style:style>
    <style:style style:name="T22" style:family="text">
      <style:text-properties fo:font-variant="normal" fo:text-transform="none" style:font-name="Liberation Serif" fo:letter-spacing="normal" fo:font-style="normal" fo:font-weight="normal"/>
    </style:style>
    <style:style style:name="T23" style:family="text">
      <style:text-properties fo:color="#c7c7c7" loext:opacity="100%" style:font-name="Google Sans Text" fo:font-size="12pt" fo:letter-spacing="normal" fo:font-style="italic" fo:font-weight="normal"/>
    </style:style>
    <style:style style:name="T24" style:family="text">
      <style:text-properties fo:color="#c7c7c7" loext:opacity="100%" fo:font-size="12pt" fo:letter-spacing="normal" fo:font-style="italic" fo:font-weight="normal"/>
    </style:style>
    <style:style style:name="T25" style:family="text">
      <style:text-properties fo:color="#c7c7c7" loext:opacity="100%" style:font-name="Liberation Serif" fo:font-size="12pt" fo:letter-spacing="normal" fo:font-style="italic" fo:font-weight="normal"/>
    </style:style>
    <style:style style:name="T26" style:family="text">
      <style:text-properties style:font-name="Google Sans Text" fo:font-size="12pt" fo:letter-spacing="normal" fo:font-style="italic" fo:font-weight="normal"/>
    </style:style>
    <style:style style:name="T27" style:family="text">
      <style:text-properties style:use-window-font-color="true" loext:opacity="0%" style:font-name="Google Sans Text" fo:font-size="12pt" fo:letter-spacing="normal" fo:font-style="italic" fo:font-weight="normal"/>
    </style:style>
    <style:style style:name="T28" style:family="text">
      <style:text-properties style:use-window-font-color="true" loext:opacity="0%" fo:font-size="12pt" fo:letter-spacing="normal" fo:font-style="italic" fo:font-weight="normal"/>
    </style:style>
    <style:style style:name="T29" style:family="text">
      <style:text-properties style:use-window-font-color="true" loext:opacity="0%" style:font-name="Liberation Serif" fo:font-size="12pt" fo:letter-spacing="normal" fo:font-style="italic" fo:font-weight="normal"/>
    </style:style>
    <style:style style:name="T30" style:family="text">
      <style:text-properties style:font-name="Liberation Serif" fo:font-size="12pt" fo:letter-spacing="normal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8</text:h>
      <text:h text:style-name="Heading_20_1" text:outline-level="1">Modelo de Registro por Comando Único e Interpretação Posterior</text:h>
      <text:p text:style-name="Text_20_body"><text:span text:style-name="Strong_20_Emphasis">Status:</text:span> Aprovado e Atualizado (v1.1) <text:span text:style-name="Strong_20_Emphasis">Autor:</text:span> Equipe de Arquitetura <text:span text:style-name="Strong_20_Emphasis">Data:</text:span> 07/05/2026 <text:span text:style-name="Strong_20_Emphasis">Depende de:</text:span> RFC-0001, RFC-0003, RFC-0005, Arquitetura de Identidade e Acesso Segura</text:p>
      <text:p text:style-name="Horizontal_20_Line"/>
      <text:h text:style-name="Heading_20_2" text:outline-level="2">1. Objetivo</text:h>
      <text:p text:style-name="Text_20_body">Definir o modelo operacional do sistema baseado em <text:span text:style-name="Strong_20_Emphasis">Comando Único de registro</text:span>, no qual o significado administrativo do evento é determinado posteriormente pelo backend central executado na máquina servidora.</text:p>
      <text:p text:style-name="Text_20_body">Este RFC substitui qualquer modelo arcaico baseado em múltiplos botões de hardware (ex: "início" e "término" de turno).</text:p>
      <text:p text:style-name="Horizontal_20_Line"/>
      <text:h text:style-name="Heading_20_2" text:outline-level="2">2. Princípio Fundamental</text:h>
      <text:p text:style-name="Text_20_body">A única ação explícita disponível ao servidor público na interface web ou mobile é o comando: <text:span text:style-name="Strong_20_Emphasis">"Registrar"</text:span>.</text:p>
      <text:list text:style-name="L1">
        <text:list-item>
          <text:p text:style-name="P2">Não existem botões distintos para início, almoço ou término. </text:p>
        </text:list-item>
        <text:list-item>
          <text:p text:style-name="P2">O usuário não escolhe o tipo do registro. </text:p>
        </text:list-item>
        <text:list-item>
          <text:p text:style-name="P1">A inteligência e o significado administrativo do evento são inferidos exclusivamente de forma tardia no backend. </text:p>
        </text:list-item>
      </text:list>
      <text:p text:style-name="Horizontal_20_Line"/>
      <text:h text:style-name="Heading_20_2" text:outline-level="2">3. Geração de Evento, Segurança Oculta e Diretriz LGPD</text:h>
      <text:p text:style-name="Text_20_body">Ao acionar o botão "Registrar", o dispositivo cliente (React SPA ou Mobile) envia um payload à API contendo apenas os dados sensoriais e o token de acesso. A arquitetura impõe três regras rígidas:</text:p>
      <text:h text:style-name="Heading_20_3" text:outline-level="3">3.1 A Identidade Oculta (Lightweight Tokens)</text:h>
      <text:p text:style-name="Text_20_body"><text:span text:style-name="T17">O frontend jamais</text:span><text:span text:style-name="T18"> </text:span><text:span text:style-name="T17">enviará o CPF ou o </text:span><text:span text:style-name="Source_20_Text"><text:span text:style-name="T19">usuario_id</text:span></text:span><text:span text:style-name="T18"> </text:span><text:span text:style-name="T17">no payload. O cliente envia apenas o </text:span><text:span text:style-name="T29">Lightweight Access Token</text:span><text:span text:style-name="T18"> </text:span><text:span text:style-name="T17">gerado pelo Keycloak. O interceptador do Spring Security (via </text:span><text:span text:style-name="Source_20_Text"><text:span text:style-name="T19">customJwtAuthenticationConverter</text:span></text:span><text:span text:style-name="T17">) extrai a claim técnica </text:span><text:span text:style-name="Source_20_Text"><text:span text:style-name="T19">sub</text:span></text:span><text:span text:style-name="T17">, consulta a tabela </text:span><text:span text:style-name="T19">seguranca.identidade_acesso</text:span><text:span text:style-name="T18"> </text:span><text:span text:style-name="T17">de forma isolada, descobre quem é o servidor e assina digitalmente a autoria daquele registro. Isso impossibilita que um fraudador forje um envio de ponto em nome de outra pessoa interceptando a requisição.</text:span></text:p>
      <text:h text:style-name="Heading_20_3" text:outline-level="3"><text:soft-page-break/>3.2 Ciclo de Vida da Mídia e Expurgo (Biometria)</text:h>
      <text:p text:style-name="P13"><text:span text:style-name="T17">O payload transmitirá o frame facial efêmero (foto). O motor interno processa a prova de vida (</text:span><text:span text:style-name="T29">Liveness</text:span><text:span text:style-name="T17">), gera a </text:span><text:span text:style-name="Source_20_Text"><text:span text:style-name="T19">pontuacao_biometrica</text:span></text:span><text:span text:style-name="T18"> </text:span><text:span text:style-name="T17">e extrai o Hash Biométrico. A imagem original no formato raster (</text:span><text:span text:style-name="Source_20_Text"><text:span text:style-name="T19">.jpg</text:span></text:span><text:span text:style-name="T18"> </text:span><text:span text:style-name="T17">/ </text:span><text:span text:style-name="Source_20_Text"><text:span text:style-name="T19">.png</text:span></text:span><text:span text:style-name="T17">) será transferida para um Storage isolado (S3), operando como uma quarentena visual temporária estritamente para fins de auditoria de curto prazo. Após expirado o tempo legal definido pela política do órgão, essa imagem será sumariamente destruída através de expurgo automatizado (hard delete)</text:span><text:span text:style-name="T18"> </text:span><text:span text:style-name="T17">executado pelo backend, cumprindo o princípio da minimização da LGPD.</text:span></text:p>
      <text:p text:style-name="Horizontal_20_Line"/>
      <text:h text:style-name="Heading_20_2" text:outline-level="2">4. Estrutura Física do Comando Único (Imutabilidade)</text:h>
      <text:p text:style-name="Text_20_body">Toda ação gera um evento bruto inserido unicamente (append-only) na tabela <text:span text:style-name="Strong_20_Emphasis"><text:span text:style-name="Source_20_Text">folha_ponto.registro_presenca</text:span></text:span>.</text:p>
      <text:p text:style-name="Text_20_body">Este evento bruto requer o mapeamento estrutural contra fraudes, gravando os seguintes dados:</text:p>
      <text:list text:style-name="L2">
        <text:list-item>
          <text:p text:style-name="P4"><text:span text:style-name="Strong_20_Emphasis">Timestamps de Dupla Checagem:</text:span> O <text:span text:style-name="Source_20_Text">capturado_em</text:span> (horário alegado pelo relógio do celular) e o <text:span text:style-name="Strong_20_Emphasis"><text:span text:style-name="Source_20_Text">recebido_no_servidor_em</text:span></text:span> (Timestamp Seguro oficial e blindado gerado pelo PostgreSQL em UTC). </text:p>
        </text:list-item>
        <text:list-item>
          <text:p text:style-name="P4"><text:span text:style-name="Strong_20_Emphasis">Rastreabilidade de Dispositivo:</text:span> A chave <text:span text:style-name="Source_20_Text">dispositivo_id</text:span> e a coluna <text:span text:style-name="Source_20_Text">modo_registro</text:span> (definindo se foi feito via <text:span text:style-name="Source_20_Text">SELF</text:span> ou num <text:span text:style-name="Source_20_Text">SHARED_DEVICE</text:span> como um kiosk). </text:p>
        </text:list-item>
        <text:list-item>
          <text:p text:style-name="P3"><text:span text:style-name="Strong_20_Emphasis">Evidências de Risco:</text:span> As colunas <text:span text:style-name="Source_20_Text">pontuacao_biometrica</text:span>, <text:span text:style-name="Source_20_Text">pontuacao_risco</text:span> e os <text:span text:style-name="Source_20_Text">indicadores_risco</text:span> (JSONB). </text:p>
        </text:list-item>
      </text:list>
      <text:p text:style-name="Text_20_body"><text:span text:style-name="Strong_20_Emphasis">O Princípio da Imutabilidade Estrita:</text:span> O evento bruto (a linha na tabela <text:span text:style-name="Source_20_Text">registro_presenca</text:span>) <text:span text:style-name="Strong_20_Emphasis">nunca é apagado, nunca é sobrescrito e nunca é reclassificado estruturalmente</text:span>. Apenas os seus <text:span text:style-name="Source_20_Text">status_tecnico</text:span> e <text:span text:style-name="Source_20_Text">status_administrativo</text:span> podem sofrer variações ao longo de apurações.</text:p>
      <text:p text:style-name="Horizontal_20_Line"/>
      <text:h text:style-name="Heading_20_2" text:outline-level="2">5. Inferência Local no Dispositivo Cliente (Provisória)</text:h>
      <text:p text:style-name="Text_20_body">Para proporcionar uma boa experiência de usuário (UX), o dispositivo cliente (React) pode executar uma inferência provisória local baseada no histórico do navegador para fins de feedback imediato.</text:p>
      <text:p text:style-name="Text_20_body">Exemplos de mensagens exibidas:</text:p>
      <text:list text:style-name="L3">
        <text:list-item>
          <text:p text:style-name="P6"><text:span text:style-name="Emphasis">"Registro enviado. Provável início de turno."</text:span> </text:p>
        </text:list-item>
        <text:list-item>
          <text:p text:style-name="P5"><text:span text:style-name="Emphasis">"Registro enviado. Pode gerar pendência de validação."</text:span> </text:p>
        </text:list-item>
      </text:list>
      <text:p text:style-name="Text_20_body"><text:span text:style-name="Strong_20_Emphasis">Importante:</text:span> Essa inferência não é oficial e pode divergir da interpretação final. O dispositivo nunca declara uma decisão definitiva antes da consolidação do estado na máquina servidora.</text:p>
      <text:p text:style-name="Horizontal_20_Line"/>
      <text:h text:style-name="Heading_20_2" text:outline-level="2"><text:soft-page-break/>6. Interpretação do Evento e Classificação Administrativa</text:h>
      <text:p text:style-name="Text_20_body">A interpretação canônica é realizada exclusivamente pelo backend. O significado do evento dependerá do estado anterior do servidor público (ex: se não houver turno aberto, interpretar como INÍCIO; se houver, como FINAL).</text:p>
      <text:p text:style-name="Text_20_body">Após processamento na máquina servidora, as colunas <text:span text:style-name="Source_20_Text">status_tecnico</text:span> e <text:span text:style-name="Source_20_Text">status_administrativo</text:span> da tabela <text:span text:style-name="Source_20_Text">registro_presenca</text:span> refletirão a realidade do evento.</text:p>
      <text:p text:style-name="Text_20_body">Classificações administrativas comuns:</text:p>
      <text:list text:style-name="L4">
        <text:list-item>
          <text:p text:style-name="P8">Início / Final de turno válido. </text:p>
        </text:list-item>
        <text:list-item>
          <text:p text:style-name="P8">Registro redundante (ex: múltiplos cliques em curto período). </text:p>
        </text:list-item>
        <text:list-item>
          <text:p text:style-name="P8">Registro fora da janela esperada (antes da tolerância, tardio). </text:p>
        </text:list-item>
        <text:list-item>
          <text:p text:style-name="P8">Registro inconsistente com sequência lógica. </text:p>
        </text:list-item>
        <text:list-item>
          <text:p text:style-name="P7">PENDENTE (se a <text:span text:style-name="Source_20_Text">pontuacao_risco</text:span> for alta, necessitando avaliação). </text:p>
        </text:list-item>
      </text:list>
      <text:p text:style-name="Horizontal_20_Line"/>
      <text:h text:style-name="Heading_20_2" text:outline-level="2">7. Tratamento de Inconsistências e Eventos Redundantes</text:h>
      <text:p text:style-name="Text_20_body">O sistema reconhece que determinados eventos podem gerar inconsistências lógicas, temporais ou administrativas (ex: registrar ponto fora da geofence da <text:span text:style-name="Source_20_Text">unidade_id</text:span> definida).</text:p>
      <text:p text:style-name="Text_20_body"><text:span text:style-name="Strong_20_Emphasis">Esses eventos não serão descartados.</text:span> Eles serão classificados pelo processamento e poderão:</text:p>
      <text:list text:style-name="L5">
        <text:list-item>
          <text:p text:style-name="P10">Gerar alerta ou pendência de validação (exigindo que um Manager/Chefia Imediata os justifique). </text:p>
        </text:list-item>
        <text:list-item>
          <text:p text:style-name="P10">Exigir complementação posterior textual por parte do servidor. </text:p>
        </text:list-item>
        <text:list-item>
          <text:p text:style-name="P9">Ser classificados como "Registro Redundante". </text:p>
        </text:list-item>
      </text:list>
      <text:p text:style-name="Text_20_body"><text:span text:style-name="Strong_20_Emphasis">Política de "Ignorar" Eventos:</text:span> Ignorar não significa apagar. Caso o backend identifique que um evento não altera o estado lógico ou é falho, ele será ignorado <text:span text:style-name="Strong_20_Emphasis">para efeito de cálculo de jornada</text:span>, mantendo o status administrativo invalidado. Contudo, o evento bruto permanece integralmente preservado no banco para fins de histórico e auditoria.</text:p>
      <text:p text:style-name="Horizontal_20_Line"/>
      <text:h text:style-name="Heading_20_2" text:outline-level="2">8. Modelo de Consistência Eventual</text:h>
      <text:p text:style-name="Text_20_body">O sistema opera sob o modelo de <text:span text:style-name="Strong_20_Emphasis">consistência eventual</text:span>. O dispositivo cliente pode exibir um estado provisório por alguns segundos.</text:p>
      <text:p text:style-name="Text_20_body">O <text:span text:style-name="Strong_20_Emphasis">estado canônico</text:span> é sempre o definido pelo backend central após todas as validações (Geofence, Biometria Python, Horário Seguro). Em caso de divergência entre o que a tela do celular do servidor acha que aconteceu e o que o backend avaliou, prevalece inegociavelmente a decisão da máquina servidora.</text:p>
      <text:p text:style-name="Horizontal_20_Line"/>
      <text:h text:style-name="Heading_20_2" text:outline-level="2"><text:soft-page-break/>9. Diretrizes do MVP</text:h>
      <text:p text:style-name="Text_20_body">Para a versão inicial (MVP) do sistema:</text:p>
      <text:list text:style-name="L6">
        <text:list-item>
          <text:p text:style-name="P12">Um único botão interativo: "Registrar". </text:p>
        </text:list-item>
        <text:list-item>
          <text:p text:style-name="P12">Nenhum bloqueio preventivo rígido no momento exato do clique no aplicativo (para garantir operação rápida e funcionamento em áreas de baixa latência). </text:p>
        </text:list-item>
        <text:list-item>
          <text:p text:style-name="P11">Toda regra administrativa severa (como gerar um bloqueio de jornada ou pendência por evento fora da janela de horário) é processada <text:span text:style-name="Emphasis">a posteriori</text:span> pela máquina servidora, acoplada à autorização da chefia imediata se a política do órgão assim exigir. 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7:51:50.776226770</dc:date>
    <meta:editing-duration>PT3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54" meta:word-count="938" meta:character-count="6430" meta:non-whitespace-character-count="5546"/>
  </office:meta>
</office:document-meta>
</file>