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>
      <style:paragraph-properties fo:text-align="end" style:justify-single-word="false"/>
      <style:text-properties officeooo:paragraph-rsid="0013365e"/>
    </style:style>
    <style:style style:name="T1" style:family="text"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T2" style:family="text">
      <style:text-properties fo:font-variant="normal" fo:text-transform="none" fo:color="#c7c7c7" loext:opacity="100%" style:font-name="Google Sans Code" fo:font-size="10.5pt" fo:letter-spacing="normal" fo:font-style="normal" fo:font-weight="bold"/>
    </style:style>
    <style:style style:name="T3" style:family="text">
      <style:text-properties fo:font-variant="normal" fo:text-transform="none" style:font-name="Google Sans Text" fo:font-size="10.5pt" fo:letter-spacing="normal" fo:font-style="normal" fo:font-weight="normal"/>
    </style:style>
    <style:style style:name="T4" style:family="text">
      <style:text-properties fo:font-variant="normal" fo:text-transform="none" style:font-name="Google Sans Code" fo:font-size="10.5pt" fo:letter-spacing="normal" fo:font-style="normal" fo:font-weight="bold"/>
    </style:style>
    <style:style style:name="T5" style:family="text">
      <style:text-properties fo:font-variant="normal" fo:text-transform="none" style:use-window-font-color="true" loext:opacity="0%" style:font-name="Google Sans Text" fo:font-size="10.5pt" fo:letter-spacing="normal" fo:font-style="normal" fo:font-weight="normal"/>
    </style:style>
    <style:style style:name="T6" style:family="text">
      <style:text-properties fo:font-variant="normal" fo:text-transform="none" style:use-window-font-color="true" loext:opacity="0%" style:font-name="Google Sans Code" fo:font-size="10.5pt" fo:letter-spacing="normal" fo:font-style="normal" fo:font-weight="bold"/>
    </style:style>
    <style:style style:name="T7" style:family="text">
      <style:text-properties fo:font-variant="normal" fo:text-transform="none" style:use-window-font-color="true" loext:opacity="0%" fo:font-size="10.5pt" fo:letter-spacing="normal" fo:font-style="normal" fo:font-weight="normal"/>
    </style:style>
    <style:style style:name="T8" style:family="text">
      <style:text-properties fo:font-variant="normal" fo:text-transform="none" style:use-window-font-color="true" loext:opacity="0%" fo:font-size="10.5pt" fo:letter-spacing="normal" fo:font-style="normal" fo:font-weight="bold"/>
    </style:style>
    <style:style style:name="T9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/>
    </style:style>
    <style:style style:name="T10" style:family="text">
      <style:text-properties fo:font-variant="normal" fo:text-transform="none" style:use-window-font-color="true" loext:opacity="0%" style:font-name="Liberation Serif" fo:font-size="10.5pt" fo:letter-spacing="normal" fo:font-style="normal" fo:font-weight="bold"/>
    </style:style>
    <style:style style:name="T11" style:family="text">
      <style:text-properties fo:font-variant="normal" fo:text-transform="none" style:use-window-font-color="true" loext:opacity="0%" style:font-name="Liberation Serif" fo:letter-spacing="normal" fo:font-style="normal" fo:font-weight="normal"/>
    </style:style>
    <style:style style:name="T12" style:family="text">
      <style:text-properties fo:font-variant="normal" fo:text-transform="none" style:use-window-font-color="true" loext:opacity="0%" style:font-name="Liberation Serif" fo:letter-spacing="normal" fo:font-style="normal" fo:font-weight="bold"/>
    </style:style>
    <style:style style:name="T1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size-complex="12pt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Liberation Serif"/>
    </style:style>
    <style:style style:name="T17" style:family="text">
      <style:text-properties style:use-window-font-color="true" loext:opacity="0%" style:font-name="Liberation Serif" fo:font-weight="bold" style:font-weight-asian="bold" style:font-weight-complex="bold"/>
    </style:style>
    <style:style style:name="T18" style:family="text">
      <style:text-properties style:use-window-font-color="true" loext:opacity="0%" style:font-name="Liberation Serif" fo:font-size="12pt" style:font-size-asian="12pt" style:font-size-complex="12pt"/>
    </style:style>
    <style:style style:name="T19" style:family="text">
      <style:text-properties style:use-window-font-color="true" loext:opacity="0%" style:font-name="Liberation Seri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09</text:h>
      <text:h text:style-name="Heading_20_1" text:outline-level="1">Implementação da Camada Web / REST Endpoints e Integração de Segurança</text:h>
      <text:p text:style-name="P20"><text:span text:style-name="Strong_20_Emphasis">Status:</text:span> Aprovado e Atualizado (v1.1) </text:p>
      <text:p text:style-name="P20"><text:span text:style-name="Strong_20_Emphasis">Sistema:</text:span> API de Serviços SEAGRI-DF </text:p>
      <text:p text:style-name="P20"><text:span text:style-name="Strong_20_Emphasis">Plataforma:</text:span> Spring Boot / Java </text:p>
      <text:p text:style-name="P20"><text:span text:style-name="Strong_20_Emphasis">Segurança:</text:span> Keycloak + Spring Security Resource Server </text:p>
      <text:p text:style-name="P20"><text:span text:style-name="Strong_20_Emphasis">Banco de dados:</text:span> PostgreSQL </text:p>
      <text:p text:style-name="P20"><text:span text:style-name="Strong_20_Emphasis">Modelo:</text:span> Multitenant com Schemas Segregados </text:p>
      <text:p text:style-name="P20"><text:span text:style-name="Strong_20_Emphasis">Depende de:</text:span> RFC-0001, RFC-0005, RFC-0008, Arquitetura de Identidade e Acesso Segura</text:p>
      <text:p text:style-name="Horizontal_20_Line"/>
      <text:h text:style-name="Heading_20_2" text:outline-level="2">1. Objetivo</text:h>
      <text:p text:style-name="Text_20_body">Definir os padrões técnicos para a implementação da camada Web (REST Controllers) da aplicação.</text:p>
      <text:p text:style-name="Text_20_body">Essa camada será responsável por:</text:p>
      <text:list text:style-name="L1">
        <text:list-item>
          <text:p text:style-name="P3">Expor endpoints HTTP de forma padronizada. </text:p>
        </text:list-item>
        <text:list-item>
          <text:p text:style-name="P3">Validar requisições na borda (Jakarta Validation). </text:p>
        </text:list-item>
        <text:list-item>
          <text:p text:style-name="P3">Delegar chamadas para a camada de aplicação de forma limpa. </text:p>
        </text:list-item>
        <text:list-item>
          <text:p text:style-name="P3">Padronizar respostas da API (JSON único). </text:p>
        </text:list-item>
        <text:list-item>
          <text:p text:style-name="P2">Integrar segurança de forma agnóstica às regras de IAM (Isolamento de Domínio). </text:p>
        </text:list-item>
      </text:list>
      <text:p text:style-name="Text_20_body">A implementação deve respeitar as decisões arquiteturais já definidas nas RFCs anteriores (DDD, Ports &amp; Adapters, Comando Único e Identidade Canônica Centralizada). A camada Web deve permanecer extremamente fina, contendo apenas responsabilidades de interface e transporte de DTOs.</text:p>
      <text:p text:style-name="Horizontal_20_Line"/>
      <text:h text:style-name="Heading_20_2" text:outline-level="2">2. Contexto do Sistema</text:h>
      <text:p text:style-name="Text_20_body">A API possui as seguintes características inegociáveis de segurança:</text:p>
      <text:list text:style-name="L2">
        <text:list-item>
          <text:p text:style-name="P5"><text:span text:style-name="Strong_20_Emphasis">Autenticação via Keycloak:</text:span> A API não valida senhas, ela consome <text:span text:style-name="Emphasis">Lightweight Access Tokens</text:span> e confia na assinatura criptográfica (OIDC). </text:p>
        </text:list-item>
        <text:list-item>
          <text:p text:style-name="P5"><text:span text:style-name="Strong_20_Emphasis">Modelo Multitenant:</text:span> As regras de acesso são ditadas pelo <text:span text:style-name="Source_20_Text">organizacao_id</text:span> e avaliadas dinamicamente. </text:p>
        </text:list-item>
        <text:list-item>
          <text:p text:style-name="P4"><text:span text:style-name="Strong_20_Emphasis">Confiança Zero (Zero Trust):</text:span> A camada Web não confia nos dados enviados pelo frontend (React), extraindo a identidade do usuário através de integrações profundas e interceptadores <text:soft-page-break/>do Spring Security. </text:p>
        </text:list-item>
      </text:list>
      <text:p text:style-name="Horizontal_20_Line"/>
      <text:h text:style-name="Heading_20_2" text:outline-level="2">3. Estrutura da Camada Web</text:h>
      <text:p text:style-name="Text_20_body">A camada Web utilizará uma estrutura baseada em <text:span text:style-name="Emphasis">controllers</text:span> abstratos reutilizáveis, permitindo a padronização e a redução drástica de duplicação de código (<text:span text:style-name="Emphasis">boilerplate</text:span>).</text:p>
      <text:p text:style-name="Horizontal_20_Line"/>
      <text:h text:style-name="Heading_20_2" text:outline-level="2">4. Controller Base da API e Extração de Identidade</text:h>
      <text:p text:style-name="Text_20_body">Será criado um controller base genérico, responsável pelos comportamentos comuns a toda a camada Web.</text:p>
      <text:p text:style-name="Text_20_body"><text:span text:style-name="Strong_20_Emphasis">Componente:</text:span> <text:span text:style-name="Source_20_Text">AbstractApiController</text:span></text:p>
      <text:p text:style-name="Text_20_body">Esse controller não assume operações CRUD e oferecerá funcionalidades centrais, integrando-se estritamente à segurança do Spring:</text:p>
      <text:list text:style-name="L3">
        <text:list-item>
          <text:p text:style-name="P7"><text:span text:style-name="Strong_20_Emphasis">Extração da Identidade Canônica:</text:span> Em vez de extrair a claim <text:span text:style-name="Source_20_Text">sub</text:span> diretamente do JWT, este controller acessará o <text:span text:style-name="Source_20_Text">SecurityContextHolder</text:span> para resgatar o <text:span text:style-name="Strong_20_Emphasis"><text:span text:style-name="Source_20_Text">BusinessPrincipalToken</text:span></text:span> (injetado precocemente pelo <text:span text:style-name="Source_20_Text">customJwtAuthenticationConverter</text:span>). Isso garante que os <text:span text:style-name="Emphasis">endpoints</text:span> já saibam o CPF da pessoa física e suas <text:span text:style-name="Emphasis">Roles</text:span> locais aplicáveis. </text:p>
        </text:list-item>
        <text:list-item>
          <text:p text:style-name="P7"><text:span text:style-name="Strong_20_Emphasis">Acesso ao Tenant:</text:span> Acesso facilitado ao identificador da organização atual (repassado via requisição ou rota). </text:p>
        </text:list-item>
        <text:list-item>
          <text:p text:style-name="P6"><text:span text:style-name="Strong_20_Emphasis">Envelopamento:</text:span> Utilitários para construção do envelopamento padronizado de respostas (<text:span text:style-name="Source_20_Text">ApiResponse</text:span>). </text:p>
        </text:list-item>
      </text:list>
      <text:p text:style-name="Text_20_body">Todos os controllers da aplicação estenderão direta ou indiretamente este componente.</text:p>
      <text:p text:style-name="Horizontal_20_Line"/>
      <text:h text:style-name="Heading_20_2" text:outline-level="2">5. Controllers Especializados para CRUD (Dupla Hierarquia)</text:h>
      <text:p text:style-name="Text_20_body">Para entidades que expõem operações padrão de persistência, utilizaremos uma dupla hierarquia de controllers genéricos, alinhada à nossa camada de serviços e ao isolamento de <text:span text:style-name="Emphasis">Schemas</text:span>.</text:p>
      <text:h text:style-name="Heading_20_3" text:outline-level="3">5.1. Contexto Global (Sem Tenant)</text:h>
      <text:p text:style-name="Text_20_body">Para tabelas de apoio e domínios globais que residem no schema <text:span text:style-name="Source_20_Text">pessoa</text:span> (ex: Profissões, Nacionalidades). <text:span text:style-name="Strong_20_Emphasis">Componente:</text:span> <text:span text:style-name="Source_20_Text">AbstractCrudController</text:span></text:p>
      <text:h text:style-name="Heading_20_3" text:outline-level="3">5.2. Contexto Isolado (Multi-Tenant)</text:h>
      <text:p text:style-name="Text_20_body">Para as entidades exclusivas de cada organização dentro do schema <text:span text:style-name="Source_20_Text">folha_ponto</text:span>. Este controller injetará compulsoriamente a validação de segurança de fronteira. <text:span text:style-name="Strong_20_Emphasis">Componente:</text:span> <text:span text:style-name="Source_20_Text">AbstractCrudTenantController</text:span></text:p>
      <text:p text:style-name="Text_20_body">Ambos os controllers deverão:</text:p>
      <text:list text:style-name="L4">
        <text:list-item>
          <text:p text:style-name="P9"><text:soft-page-break/>Expor endpoints CRUD padrão (<text:span text:style-name="Source_20_Text">GET</text:span>, <text:span text:style-name="Source_20_Text">POST</text:span>, <text:span text:style-name="Source_20_Text">PUT/PATCH</text:span>, <text:span text:style-name="Source_20_Text">DELETE</text:span>). </text:p>
        </text:list-item>
        <text:list-item>
          <text:p text:style-name="P9">Delegar operações aos respectivos Application Services (<text:span text:style-name="Source_20_Text">CrudSrv</text:span> ou <text:span text:style-name="Source_20_Text">CrudTenantSrv</text:span>). </text:p>
        </text:list-item>
        <text:list-item>
          <text:p text:style-name="P8">Forçar a injeção do parâmetro <text:span text:style-name="Source_20_Text">organizacao_id</text:span> em todas as rotas do contexto isolado para o enforcement de multitenancy. </text:p>
        </text:list-item>
      </text:list>
      <text:p text:style-name="Horizontal_20_Line"/>
      <text:h text:style-name="Heading_20_2" text:outline-level="2">6. Tratamento de Entidades Imutáveis (Comando Único)</text:h>
      <text:p text:style-name="Text_20_body">Em conformidade com as RFC-0005 e RFC-0008 (Comando Único e Imutabilidade), entidades estritamente imutáveis <text:span text:style-name="Strong_20_Emphasis">jamais deverão estender os controllers genéricos de CRUD</text:span>.</text:p>
      <text:p text:style-name="Text_20_body"><text:span text:style-name="Strong_20_Emphasis">Exemplo:</text:span> <text:span text:style-name="Source_20_Text">RegistroPresencaController</text:span> Este controller deverá estender diretamente o <text:span text:style-name="Source_20_Text">AbstractApiController</text:span>, expondo <text:span text:style-name="Strong_20_Emphasis">exclusivamente</text:span>:</text:p>
      <text:list text:style-name="L5">
        <text:list-item>
          <text:p text:style-name="P11"><text:span text:style-name="T13">Rotas de </text:span><text:span text:style-name="Source_20_Text"><text:span text:style-name="T14">POST</text:span></text:span><text:span text:style-name="T13"> (para recepção do evento bruto com GPS e Foto destinada à quarentena visual temporária com expurgo agendado).</text:span></text:p>
        </text:list-item>
        <text:list-item>
          <text:p text:style-name="P10"><text:span text:style-name="T18">Rotas de </text:span><text:span text:style-name="Source_20_Text"><text:span text:style-name="T19">GET</text:span></text:span><text:span text:style-name="T18"> (para listagem</text:span><text:span text:style-name="T16"> de histórico, audit</text:span>oria e relatórios). </text:p>
        </text:list-item>
      </text:list>
      <text:p text:style-name="Text_20_body">Sob nenhuma hipótese rotas de <text:span text:style-name="Source_20_Text">PUT</text:span> ou <text:span text:style-name="Source_20_Text">DELETE</text:span> serão expostas para essas entidades operacionais críticas.</text:p>
      <text:p text:style-name="Horizontal_20_Line"/>
      <text:h text:style-name="Heading_20_2" text:outline-level="2">7. Consultas Simplificadas (Lookup para UI)</text:h>
      <text:p text:style-name="Text_20_body">O sistema precisará alimentar componentes de interface de usuário (React SPA) como <text:span text:style-name="Source_20_Text">select</text:span>, <text:span text:style-name="Source_20_Text">combobox</text:span> e <text:span text:style-name="Source_20_Text">autocomplete</text:span> através de listas simplificadas e não paginadas.</text:p>
      <text:p text:style-name="Text_20_body">Os controllers abstratos de CRUD exporão um endpoint de lookup de forma nativa. <text:span text:style-name="Strong_20_Emphasis">Exemplo de rota embutida:</text:span> <text:span text:style-name="Source_20_Text">GET /api/v1/organizacoes/{orgId}/unidades/lookup</text:span></text:p>
      <text:p text:style-name="Text_20_body">Esse endpoint retornará a coleção de DTOs mínimos (Apenas <text:span text:style-name="Source_20_Text">id</text:span> e <text:span text:style-name="Source_20_Text">nome</text:span>), melhorando o desempenho da rede.</text:p>
      <text:p text:style-name="Horizontal_20_Line"/>
      <text:h text:style-name="Heading_20_2" text:outline-level="2">8. Padronização de Respostas da API</text:h>
      <text:p text:style-name="Text_20_body">Todas as respostas HTTP do Spring Boot devem seguir um formato consistente e previsível.</text:p>
      <text:p text:style-name="Text_20_body"><text:span text:style-name="Strong_20_Emphasis">Componente:</text:span> <text:span text:style-name="Source_20_Text">ApiResponse&lt;T&gt;</text:span></text:p>
      <text:p text:style-name="Text_20_body"><text:span text:style-name="Strong_20_Emphasis">Campos obrigatórios:</text:span></text:p>
      <text:list text:style-name="L6">
        <text:list-item>
          <text:p text:style-name="P13"><text:span text:style-name="Source_20_Text">timestamp</text:span>: Horário oficial do servidor em UTC. </text:p>
        </text:list-item>
        <text:list-item>
          <text:p text:style-name="P13"><text:span text:style-name="Source_20_Text">status</text:span>: Código numérico HTTP. </text:p>
        </text:list-item>
        <text:list-item>
          <text:p text:style-name="P13"><text:span text:style-name="Source_20_Text">message</text:span>: Mensagem descritiva (ex: "Registro salvo com sucesso"). </text:p>
        </text:list-item>
        <text:list-item>
          <text:p text:style-name="P13"><text:span text:style-name="Source_20_Text">payload</text:span>: Objeto <text:span text:style-name="Source_20_Text">T</text:span> ou Lista <text:span text:style-name="Source_20_Text">List&lt;T&gt;</text:span> contendo os dados. </text:p>
        </text:list-item>
        <text:list-item>
          <text:p text:style-name="P12"><text:span text:style-name="Source_20_Text">errors</text:span>: Lista de detalhamentos de validação ou restrição. </text:p>
        </text:list-item>
      </text:list>
      <text:p text:style-name="Horizontal_20_Line"/>
      <text:h text:style-name="Heading_20_2" text:outline-level="2"><text:soft-page-break/>9. Tratamento Global de Exceções e Respostas SPA-Friendly</text:h>
      <text:p text:style-name="Text_20_body">A API possuirá um tratamento centralizado de erros (via <text:span text:style-name="Source_20_Text">@ControllerAdvice</text:span>). Para que o frontend React possa orquestrar rotas de forma limpa, as falhas de segurança do IAM não devem renderizar páginas HTML nativas do Spring.</text:p>
      <text:p text:style-name="Text_20_body">O <text:span text:style-name="Emphasis">Global Exception Handler</text:span> garantirá a devolução do modelo <text:span text:style-name="Source_20_Text">ApiResponse</text:span> para:</text:p>
      <text:list text:style-name="L7">
        <text:list-item>
          <text:p text:style-name="P15"><text:span text:style-name="Strong_20_Emphasis">Erros de Segurança (401/403):</text:span> Utilizando implementações customizadas no Resource Server (<text:span text:style-name="Source_20_Text">customAccessDeniedHandler</text:span> e <text:span text:style-name="Source_20_Text">customAuthenticationEntryPoint</text:span>), erros de token expirado ou violação de Tenant retornarão JSON formatado, nunca um <text:span text:style-name="Emphasis">redirect</text:span> HTML. </text:p>
        </text:list-item>
        <text:list-item>
          <text:p text:style-name="P15"><text:span text:style-name="Strong_20_Emphasis">Erros de Validação:</text:span> Interceptação de falhas nos DTOs. </text:p>
        </text:list-item>
        <text:list-item>
          <text:p text:style-name="P15"><text:span text:style-name="Strong_20_Emphasis">Erros de Negócio:</text:span> Violações lançadas pela camada de <text:span text:style-name="Emphasis">Domain/Application</text:span>. </text:p>
        </text:list-item>
        <text:list-item>
          <text:p text:style-name="P14"><text:span text:style-name="Strong_20_Emphasis">Erros do PBAC:</text:span> O <text:span text:style-name="Emphasis">Policy Decision Point</text:span> retornará uma negativa estruturada com o motivo da rejeição. </text:p>
        </text:list-item>
      </text:list>
      <text:p text:style-name="Horizontal_20_Line"/>
      <text:h text:style-name="Heading_20_2" text:outline-level="2">10. Validação Automática de Requisições</text:h>
      <text:p text:style-name="Text_20_body">As requisições utilizarão validação declarativa baseada no <text:span text:style-name="Emphasis">Jakarta Validation</text:span> (<text:span text:style-name="Source_20_Text">@Valid</text:span>, <text:span text:style-name="Source_20_Text">@NotNull</text:span>, <text:span text:style-name="Source_20_Text">@NotBlank</text:span>, <text:span text:style-name="Source_20_Text">@Size</text:span>). A camada Web bloqueia dados malformados antes de invocarem a regra de negócio.</text:p>
      <text:p text:style-name="Horizontal_20_Line"/>
      <text:h text:style-name="Heading_20_2" text:outline-level="2">11. Documentação e Versionamento</text:h>
      <text:list text:style-name="L8">
        <text:list-item>
          <text:p text:style-name="P17"><text:span text:style-name="Strong_20_Emphasis">OpenAPI (Swagger):</text:span> Documentação gerada automaticamente para os contratos da API. </text:p>
        </text:list-item>
        <text:list-item>
          <text:p text:style-name="P16"><text:span text:style-name="Strong_20_Emphasis">Versionamento:</text:span> Todos os endpoints utilizarão versionamento semântico nas URLs (<text:span text:style-name="Source_20_Text">/api/v1/...</text:span>) para assegurar retrocompatibilidade. </text:p>
        </text:list-item>
      </text:list>
      <text:p text:style-name="Horizontal_20_Line"/>
      <text:h text:style-name="Heading_20_2" text:outline-level="2">12. DTOs, Mapeamento e a Diretriz "Fetch On-Demand" (LGPD)</text:h>
      <text:p text:style-name="Text_20_body">O trânsito de dados através da camada REST é o principal vetor de vazamentos (Data Breach). A aplicação consumirá e retornará exclusivamente DTOs (via <text:span text:style-name="Strong_20_Emphasis">MapStruct</text:span>).</text:p>
      <text:p text:style-name="Text_20_body">Para cumprir a conformidade exigida pelo documento de <text:span text:style-name="Strong_20_Emphasis">Arquitetura de Identidade Segura</text:span>:</text:p>
      <text:list text:style-name="L9">
        <text:list-item>
          <text:p text:style-name="P19"><text:span text:style-name="Strong_20_Emphasis">Fetch On-Demand Obrigatório:</text:span> Endpoints de listagem genérica (<text:span text:style-name="Source_20_Text">GET /usuarios</text:span>) usarão DTOs magros, excluindo colunas sensíveis da tabela <text:span text:style-name="Source_20_Text">pessoa_fisica</text:span> e <text:span text:style-name="Source_20_Text">contato_endereco</text:span>. </text:p>
        </text:list-item>
        <text:list-item>
          <text:p text:style-name="P18"><text:span text:style-name="Strong_20_Emphasis">Blindagem de Dados Sigilosos:</text:span> CPF, Endereço de geolocalização e Hashes Biométricos nunca poderão vazar nas listagens padrão. Eles só serão trafegados em DTOs dedicados de endpoints específicos de segurança máxima (ex: <text:span text:style-name="Source_20_Text">GET /api/v1/users/me</text:span>), acessados sob demanda pelo React SPA. </text:p>
        </text:list-item>
      </text:list>
      <text:p text:style-name="Horizontal_20_Line"><text:soft-page-break/></text:p>
      <text:h text:style-name="Heading_20_2" text:outline-level="2">13. Estrutura Conceitual Final da Camada Web</text:h>
      <text:p text:style-name="Text_20_body">A organização dos <text:span text:style-name="Emphasis">Controllers</text:span> obedecerá a esta hierarquia arquitetural definitiva:</text:p>
      <text:p text:style-name="Preformatted_20_Text"><text:span text:style-name="Source_20_Text">AbstractApiController (Base com Identidade de Negócio e ApiResponse)</text:span></text:p>
      <text:p text:style-name="Preformatted_20_Text"><text:span text:style-name="Source_20_Text">│</text:span></text:p>
      <text:p text:style-name="Preformatted_20_Text"><text:span text:style-name="Source_20_Text">├── AbstractCrudController (Tabelas GLOBAIS - Schema Pessoa)</text:span></text:p>
      <text:p text:style-name="Preformatted_20_Text"><text:span text:style-name="Source_20_Text">│ <text:s text:c="2"/>└── ProfissaoController</text:span></text:p>
      <text:p text:style-name="Preformatted_20_Text"><text:span text:style-name="Source_20_Text">│</text:span></text:p>
      <text:p text:style-name="Preformatted_20_Text"><text:span text:style-name="Source_20_Text">├── AbstractCrudTenantController (Tabelas MULTI-TENANT - Schema Folha_Ponto)</text:span></text:p>
      <text:p text:style-name="Preformatted_20_Text"><text:span text:style-name="Source_20_Text">│ <text:s text:c="2"/>├── UnidadeController</text:span></text:p>
      <text:p text:style-name="Preformatted_20_Text"><text:span text:style-name="Source_20_Text">│ <text:s text:c="2"/>└── VinculoUsuarioController</text:span></text:p>
      <text:p text:style-name="Preformatted_20_Text"><text:span text:style-name="Source_20_Text">│</text:span></text:p>
      <text:p text:style-name="Preformatted_20_Text"><text:span text:style-name="Source_20_Text">└── Controllers Diretos (Regras Específicas, Imutáveis e Workflows)</text:span></text:p>
      <text:p text:style-name="Preformatted_20_Text"><text:span text:style-name="Source_20_Text"><text:s text:c="4"/>├── RegistroPresencaController (Exclusivo GET e POST de Comando Único)</text:span></text:p>
      <text:p text:style-name="Preformatted_20_Text"><text:span text:style-name="Source_20_Text"><text:s text:c="4"/>├── RelatoriosController (Consolidações e Exportações de Jornada)</text:span></text:p>
      <text:p text:style-name="P1"><text:span text:style-name="Source_20_Text"><text:s text:c="4"/>└── OnboardingController (Endpoint Aberto para Action Tokens e Validação 2x2 Serpro)</text:span></text:p>
      <text:p text:style-name="Text_20_body"><text:span text:style-name="Strong_20_Emphasis">Nota sobre o </text:span><text:span text:style-name="Strong_20_Emphasis"><text:span text:style-name="Source_20_Text">OnboardingController</text:span></text:span><text:span text:style-name="Strong_20_Emphasis">:</text:span> Este é o controlador especializado projetado para interceptar a requisição de completude de perfil (Foto + CPF). Ele estará configurado para validar não o <text:span text:style-name="Emphasis">Access Token</text:span> principal, mas o JWT de curta duração (<text:span text:style-name="Emphasis">Action Token</text:span>) emitido pelo SPI do Keycloak durante a pausa de login inicial do usuário.</text:p>
      <text:p text:style-name="Horizontal_20_Line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7:54:19.249544502</dc:date>
    <meta:editing-duration>PT2M56S</meta:editing-duration>
    <meta:editing-cycles>2</meta:editing-cycles>
    <meta:generator>LibreOffice/24.2.7.2$Linux_X86_64 LibreOffice_project/420$Build-2</meta:generator>
    <meta:print-date>2026-05-07T13:49:30.061607239</meta:print-date>
    <meta:printed-by>Arquivos PDF</meta:printed-by>
    <meta:document-statistic meta:table-count="0" meta:image-count="0" meta:object-count="0" meta:page-count="5" meta:paragraph-count="95" meta:word-count="1153" meta:character-count="8334" meta:non-whitespace-character-count="7253"/>
  </office:meta>
</office:document-meta>
</file>