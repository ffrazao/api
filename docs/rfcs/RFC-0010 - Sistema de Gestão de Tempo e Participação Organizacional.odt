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use-window-font-color="true" loext:opacity="0%" style:font-name="Liberation Serif" fo:font-size="12pt" style:font-size-asian="12pt" style:font-size-complex="12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officeooo:rsid="000b2d6d"/>
    </style:style>
    <style:style style:name="T2" style:family="text">
      <style:text-properties fo:font-variant="normal" fo:text-transform="none" fo:color="#c7c7c7" loext:opacity="100%" style:font-name="Google Sans Text" fo:font-size="10.5pt" fo:letter-spacing="normal" fo:font-style="normal" fo:font-weight="normal"/>
    </style:style>
    <style:style style:name="T3" style:family="text">
      <style:text-properties fo:font-variant="normal" fo:text-transform="none" fo:color="#c7c7c7" loext:opacity="100%" style:font-name="Google Sans Text" fo:font-size="10.5pt" fo:letter-spacing="normal" fo:font-style="normal" fo:font-weight="bold"/>
    </style:style>
    <style:style style:name="T4" style:family="text">
      <style:text-properties fo:font-variant="normal" fo:text-transform="none" fo:color="#c7c7c7" loext:opacity="100%" style:font-name="Google Sans Code" fo:font-size="10.5pt" fo:letter-spacing="normal" fo:font-style="normal" fo:font-weight="bold"/>
    </style:style>
    <style:style style:name="T5" style:family="text">
      <style:text-properties fo:font-variant="normal" fo:text-transform="none" style:font-name="Google Sans Text" fo:font-size="10.5pt" fo:letter-spacing="normal" fo:font-style="normal" fo:font-weight="normal"/>
    </style:style>
    <style:style style:name="T6" style:family="text">
      <style:text-properties fo:font-variant="normal" fo:text-transform="none" style:font-name="Google Sans Text" fo:font-size="10.5pt" fo:letter-spacing="normal" fo:font-style="normal" fo:font-weight="bold"/>
    </style:style>
    <style:style style:name="T7" style:family="text">
      <style:text-properties fo:font-variant="normal" fo:text-transform="none" style:font-name="Google Sans Code" fo:font-size="10.5pt" fo:letter-spacing="normal" fo:font-style="normal" fo:font-weight="bold"/>
    </style:style>
    <style:style style:name="T8" style:family="text">
      <style:text-properties fo:font-variant="normal" fo:text-transform="none" style:use-window-font-color="true" loext:opacity="0%" style:font-name="Google Sans Text" fo:font-size="10.5pt" fo:letter-spacing="normal" fo:font-style="normal" fo:font-weight="normal"/>
    </style:style>
    <style:style style:name="T9" style:family="text">
      <style:text-properties fo:font-variant="normal" fo:text-transform="none" style:use-window-font-color="true" loext:opacity="0%" style:font-name="Google Sans Text" fo:font-size="10.5pt" fo:letter-spacing="normal" fo:font-style="normal" fo:font-weight="bold"/>
    </style:style>
    <style:style style:name="T10" style:family="text">
      <style:text-properties fo:font-variant="normal" fo:text-transform="none" style:use-window-font-color="true" loext:opacity="0%" style:font-name="Google Sans Code" fo:font-size="10.5pt" fo:letter-spacing="normal" fo:font-style="normal" fo:font-weight="bold"/>
    </style:style>
    <style:style style:name="T11" style:family="text">
      <style:text-properties fo:font-variant="normal" fo:text-transform="none" style:use-window-font-color="true" loext:opacity="0%" fo:font-size="10.5pt" fo:letter-spacing="normal" fo:font-style="normal" fo:font-weight="normal"/>
    </style:style>
    <style:style style:name="T12" style:family="text">
      <style:text-properties fo:font-variant="normal" fo:text-transform="none" style:use-window-font-color="true" loext:opacity="0%" fo:font-size="10.5pt" fo:letter-spacing="normal" fo:font-style="normal" fo:font-weight="bold"/>
    </style:style>
    <style:style style:name="T13" style:family="text">
      <style:text-properties fo:font-variant="normal" fo:text-transform="none" style:use-window-font-color="true" loext:opacity="0%" style:font-name="Liberation Serif" fo:font-size="10.5pt" fo:letter-spacing="normal" fo:font-style="normal" fo:font-weight="normal"/>
    </style:style>
    <style:style style:name="T14" style:family="text">
      <style:text-properties fo:font-variant="normal" fo:text-transform="none" style:use-window-font-color="true" loext:opacity="0%" style:font-name="Liberation Serif" fo:font-size="10.5pt" fo:letter-spacing="normal" fo:font-style="normal" fo:font-weight="bold"/>
    </style:style>
    <style:style style:name="T15" style:family="text">
      <style:text-properties fo:font-variant="normal" fo:text-transform="none" style:use-window-font-color="true" loext:opacity="0%" style:font-name="Liberation Serif" fo:letter-spacing="normal" fo:font-style="normal" fo:font-weight="normal"/>
    </style:style>
    <style:style style:name="T16" style:family="text">
      <style:text-properties fo:font-variant="normal" fo:text-transform="none" style:use-window-font-color="true" loext:opacity="0%" style:font-name="Liberation Serif" fo:letter-spacing="normal" fo:font-style="normal" fo:font-weight="bold"/>
    </style:style>
    <style:style style:name="T17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style:font-size-asian="12pt" style:font-size-complex="12pt"/>
    </style:style>
    <style:style style:name="T19" style:family="text">
      <style:text-properties style:use-window-font-color="true" loext:opacity="0%"/>
    </style:style>
    <style:style style:name="T20" style:family="text">
      <style:text-properties style:use-window-font-color="true" loext:opacity="0%" style:font-name="Liberation Serif"/>
    </style:style>
    <style:style style:name="T21" style:family="text">
      <style:text-properties style:use-window-font-color="true" loext:opacity="0%" style:font-name="Liberation Serif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FC-0010</text:h>
      <text:h text:style-name="Heading_20_1" text:outline-level="1">Sistema de Gestão de Tempo e Participação Organizacional</text:h>
      <text:p text:style-name="Text_20_body"><text:span text:style-name="Strong_20_Emphasis">Status:</text:span> Aprovado e Atualizado (v1.1)<text:line-break/><text:span text:style-name="Strong_20_Emphasis">Autor:</text:span> Equipe de Arquitetura<text:line-break/><text:span text:style-name="Strong_20_Emphasis">Data:</text:span> 07/05/2026<text:line-break/><text:span text:style-name="Strong_20_Emphasis">Depende de:</text:span> RFC-0001, RFC-0002, RFC-0005, Arquitetura de Identidade e Acesso Segura</text:p>
      <text:p text:style-name="Horizontal_20_Line"/>
      <text:h text:style-name="Heading_20_2" text:outline-level="2">1. Introdução</text:h>
      <text:p text:style-name="Text_20_body">Este documento descreve o modelo conceitual e arquitetural do sistema projetado para <text:span text:style-name="Strong_20_Emphasis">gerenciar o tempo de indivíduos</text:span>, permitindo que esse tempo seja:</text:p>
      <text:list text:style-name="L1">
        <text:list-item>
          <text:p text:style-name="P3">Vendido. </text:p>
        </text:list-item>
        <text:list-item>
          <text:p text:style-name="P3">Doado. </text:p>
        </text:list-item>
        <text:list-item>
          <text:p text:style-name="P3">Disponibilizado. </text:p>
        </text:list-item>
        <text:list-item>
          <text:p text:style-name="P3">Organizado. </text:p>
        </text:list-item>
        <text:list-item>
          <text:p text:style-name="P2">Supervisionado por terceiros. </text:p>
        </text:list-item>
      </text:list>
      <text:p text:style-name="Text_20_body">O sistema não tem como objetivo principal gerenciar tarefas ou projetos granulares, mas sim <text:span text:style-name="Strong_20_Emphasis">registrar, organizar e validar compromissos de tempo entre partes interessadas</text:span>.</text:p>
      <text:p text:style-name="Text_20_body">A plataforma pode ser utilizada em diversos contextos, incluindo prestação de serviços, gestão de equipes, cursos, treinamentos, eventos e projetos governamentais. O conceito central é tratar <text:span text:style-name="Strong_20_Emphasis">tempo como um ativo organizacional e contratual</text:span>, atrelado rigidamente à Identidade Canônica (CPF) do participante.</text:p>
      <text:p text:style-name="Horizontal_20_Line"/>
      <text:h text:style-name="Heading_20_2" text:outline-level="2">2. Princípios Fundamentais do Sistema</text:h>
      <text:h text:style-name="Heading_20_3" text:outline-level="3">2.1 Tempo como recurso contratual</text:h>
      <text:p text:style-name="Text_20_body">O sistema registra <text:span text:style-name="Strong_20_Emphasis">acordos de utilização de tempo</text:span> entre compradores, vendedores, doadores e organizações coordenadoras. Esses acordos definem cronogramas, registro de presenças e períodos de disponibilidade.</text:p>
      <text:h text:style-name="Heading_20_3" text:outline-level="3">2.2 Flexibilidade Operacional e de Local</text:h>
      <text:p text:style-name="Text_20_body">O controle de tempo pode seguir o modelo <text:span text:style-name="Strong_20_Emphasis">rígido</text:span> (horários definidos e controle estruturado), <text:span text:style-name="Strong_20_Emphasis">flexível</text:span> (autonomia e adaptabilidade) ou <text:span text:style-name="Strong_20_Emphasis">híbrido</text:span>. As atividades podem ocorrer na sede da organização, em unidades específicas, na residência do participante (teletrabalho) ou num local de <text:soft-page-break/>evento. Toda essa flexibilidade se apoia na nossa arquitetura de validação geográfica (Geofence no PostGIS).</text:p>
      <text:p text:style-name="Horizontal_20_Line"/>
      <text:h text:style-name="Heading_20_2" text:outline-level="2">3. Estrutura Organizacional</text:h>
      <text:p text:style-name="Text_20_body">O sistema organiza participantes através de <text:span text:style-name="Strong_20_Emphasis">Organizações</text:span> (Tabela <text:span text:style-name="Source_20_Text">folha_ponto.organizacao</text:span>).</text:p>
      <text:p text:style-name="Text_20_body">Cada organização pode possuir uma estrutura interna composta por unidades, equipes e grupos (Tabela <text:span text:style-name="Source_20_Text">folha_ponto.unidade</text:span>). Essas estruturas podem formar hierarquias complexas (através das views e tabelas do schema <text:span text:style-name="Source_20_Text">pessoa</text:span>, como <text:span text:style-name="Source_20_Text">pessoa_grupo_hierarquia</text:span>), permitindo adaptação a diferentes níveis governamentais ou corporativos.</text:p>
      <text:p text:style-name="Horizontal_20_Line"/>
      <text:h text:style-name="Heading_20_2" text:outline-level="2">4. Perfis de Usuário (Papéis Organizacionais Globais)</text:h>
      <text:p text:style-name="Text_20_body">Os perfis principais definem a governança ampla sobre uma Organização. O princípio base dita que todo usuário pode registrar seu tempo e participar de atividades.</text:p>
      <text:p text:style-name="Text_20_body">Esses papéis físicos são armazenados estritamente na tabela <text:span text:style-name="Strong_20_Emphasis"><text:span text:style-name="Source_20_Text">folha_ponto.vinculo_usuario</text:span></text:span>:</text:p>
      <text:list text:style-name="L2">
        <text:list-item>
          <text:p text:style-name="P5"><text:span text:style-name="Strong_20_Emphasis">Owner (Proprietário):</text:span> Responsável por criar a organização, definir a estrutura e delegar a administração inicial. Possui a capacidade de transferir a propriedade da organização. </text:p>
        </text:list-item>
        <text:list-item>
          <text:p text:style-name="P5"><text:span text:style-name="Strong_20_Emphasis">Admin (Administrador Global):</text:span> Administrador da plataforma (Super User), com controle de ativação de funcionalidades sistêmicas. </text:p>
        </text:list-item>
        <text:list-item>
          <text:p text:style-name="P5"><text:span text:style-name="Strong_20_Emphasis">Manager (Gestor Administrativo):</text:span> Responsável pelo suporte administrativo, envio de convites e acompanhamento geral da participação de usuários. </text:p>
        </text:list-item>
        <text:list-item>
          <text:p text:style-name="P5"><text:span text:style-name="Strong_20_Emphasis">Participant (Participante):</text:span> Representa o indivíduo (servidor, voluntário ou prestador) que participa das atividades, não implicando necessariamente relação formal de emprego trabalhista. </text:p>
        </text:list-item>
        <text:list-item>
          <text:p text:style-name="P4"><text:span text:style-name="Strong_20_Emphasis">Auditor:</text:span> Perfil destinado exclusivamente à verificação de integridade dos dados e análise de processos administrativos sem poder de alteração. </text:p>
        </text:list-item>
      </text:list>
      <text:p text:style-name="Horizontal_20_Line"/>
      <text:h text:style-name="Heading_20_2" text:outline-level="2">5. Papéis Operacionais nas Unidades (Atuação Tática)</text:h>
      <text:p text:style-name="Text_20_body">Além dos perfis globais, o sistema permite papéis de nível tático dentro de lotações específicas. Esses dados residem nas tabelas de alocação e relacionamento (ReBAC):</text:p>
      <text:list text:style-name="L3">
        <text:list-item>
          <text:p text:style-name="P7"><text:span text:style-name="Strong_20_Emphasis">Gestor de Unidade (Tabela </text:span><text:span text:style-name="Strong_20_Emphasis"><text:span text:style-name="Source_20_Text">folha_ponto.alocacao_unidade</text:span></text:span><text:span text:style-name="Strong_20_Emphasis">):</text:span> Responsável direto por uma unidade específica. Valida justificativas, aceita novos membros e gerencia a rotina do time. </text:p>
        </text:list-item>
        <text:list-item>
          <text:p text:style-name="P7"><text:span text:style-name="Strong_20_Emphasis">Assistente / Secretário (Tabela </text:span><text:span text:style-name="Strong_20_Emphasis"><text:span text:style-name="Source_20_Text">folha_ponto.alocacao_unidade</text:span></text:span><text:span text:style-name="Strong_20_Emphasis">):</text:span> Recebe delegação de um gestor para suporte administrativo, atuando com permissões herdadas. </text:p>
        </text:list-item>
        <text:list-item>
          <text:p text:style-name="P6"><text:soft-page-break/><text:span text:style-name="Strong_20_Emphasis">Gestor Substituto (Tabela </text:span><text:span text:style-name="Strong_20_Emphasis"><text:span text:style-name="T1">seguranca</text:span></text:span><text:span text:style-name="Strong_20_Emphasis"><text:span text:style-name="Source_20_Text">.relacionamento</text:span></text:span><text:span text:style-name="Strong_20_Emphasis">):</text:span> Assume temporariamente as responsabilidades de gestão de uma unidade ou de um gestor titular. Este papel possui vigência explícita (<text:span text:style-name="Source_20_Text">inicio_validade</text:span> e <text:span text:style-name="Source_20_Text">fim_validade</text:span>) orquestrada nativamente pelo motor de autorização do Spring Boot. </text:p>
        </text:list-item>
      </text:list>
      <text:p text:style-name="Horizontal_20_Line"/>
      <text:h text:style-name="Heading_20_2" text:outline-level="2">6. Criação de Organizações e Temporalidade</text:h>
      <text:p text:style-name="Text_20_body">Todas as relações entre usuários e organizações são temporais (com registros de data de início, fim e histórico imutável via <text:span text:style-name="Emphasis">Envers</text:span> na tabela <text:span text:style-name="Source_20_Text">alocacao_unidade_aud</text:span>).</text:p>
      <text:p text:style-name="Text_20_body">Inicialmente, a criação de novas instâncias organizacionais será controlada pelo administrador do sistema (Admin), especialmente visando atender o ambiente de Entidades Públicas (B2G), garantindo que a emissão de novos <text:span text:style-name="Emphasis">Tenants</text:span> seja auditada.</text:p>
      <text:p text:style-name="Horizontal_20_Line"/>
      <text:h text:style-name="Heading_20_2" text:outline-level="2">7. O Sistema de Convites e a Identidade Canônica</text:h>
      <text:p text:style-name="Text_20_body">O convite é o mecanismo canônico de entrada. Ele estabelece o vínculo inicial entre o usuário, a organização e a unidade (gravado fisicamente na tabela <text:span text:style-name="Strong_20_Emphasis"><text:span text:style-name="Source_20_Text">folha_ponto.convite</text:span></text:span>).</text:p>
      <text:p text:style-name="Text_20_body"><text:span text:style-name="Strong_20_Emphasis">O fluxo de resolução de Identidade (Alinhado à LGPD):</text:span></text:p>
      <text:list text:style-name="L4">
        <text:list-item>
          <text:p text:style-name="P9">O Manager envia o convite para o e-mail (ex: pessoal ou corporativo) do colaborador. </text:p>
        </text:list-item>
        <text:list-item>
          <text:p text:style-name="P9">O convidado acessa o sistema através do provedor de identidade Keycloak usando aquele e-mail (ou via Login Social) e aceita o convite. </text:p>
        </text:list-item>
        <text:list-item>
          <text:p text:style-name="P9"><text:span text:style-name="Strong_20_Emphasis">Resiliência da Identidade (Validação 2x2):</text:span> O e-mail usado no convite é apenas uma chave de acesso temporária. Quando o convidado efetuar seu primeiro login, o sistema o forçará a info<text:span text:style-name="T21">rmar o seu </text:span><text:span text:style-name="Strong_20_Emphasis"><text:span text:style-name="T21">CPF</text:span></text:span><text:span text:style-name="T21"> e capturar a face (Prova de Vida via Serpro). </text:span></text:p>
        </text:list-item>
        <text:list-item>
          <text:p text:style-name="P8"><text:span text:style-name="T17">Após o sucesso biométrico, o sistema consumirá o convite e amarrará a nova conta técnica (</text:span><text:span text:style-name="Source_20_Text"><text:span text:style-name="T18">sub</text:span></text:span><text:span text:style-name="T17">) ao CPF preexistente na tabela </text:span><text:span text:style-name="T18">seguranca.identidade_acesso</text:span><text:span text:style-name="T17">. Isso garante que um servidor público convidado via e-mail pessoal não fragmente seu histórico de trabalho governamental já existente em outras secretarias.</text:span></text:p>
        </text:list-item>
      </text:list>
      <text:p text:style-name="Horizontal_20_Line"/>
      <text:h text:style-name="Heading_20_2" text:outline-level="2">8. Relatório de Registro de Tempo (Compliance e Privacidade)</text:h>
      <text:p text:style-name="Text_20_body">O relatório principal é um documento formal de validação de jornada, consolidando o cronograma acordado, os registros de presença (eventos brutos imutáveis) e as justificativas deferidas.</text:p>
      <text:p text:style-name="Text_20_body"><text:span text:style-name="Strong_20_Emphasis">Diretriz de LGPD (</text:span><text:span text:style-name="Strong_20_Emphasis"><text:span text:style-name="Emphasis">Fetch On-Demand</text:span></text:span><text:span text:style-name="Strong_20_Emphasis">):</text:span> Para mitigar vazamentos e proteger a privacidade do usuário:</text:p>
      <text:list text:style-name="L5">
        <text:list-item>
          <text:p text:style-name="P11">O documento não deve expor <text:span text:style-name="Emphasis">Hashes Biométricos</text:span> brutos. </text:p>
        </text:list-item>
        <text:list-item>
          <text:p text:style-name="P11">Informações georreferenciadas precisas e dados sensíveis de endereço devem ser mascarados na interface padrão. </text:p>
        </text:list-item>
        <text:list-item>
          <text:p text:style-name="P10"><text:soft-page-break/>Esses detalhes estarão acessíveis unicamente se o requisitante possuir o papel estrito de <text:span text:style-name="Source_20_Text">AUDITOR</text:span> ou <text:span text:style-name="Source_20_Text">OWNER</text:span>, sendo devolvidos pela API somente quando explicitamente solicitados via backend (sem inchar o JWT). </text:p>
        </text:list-item>
      </text:list>
      <text:p text:style-name="Horizontal_20_Line"/>
      <text:h text:style-name="Heading_20_2" text:outline-level="2">9. Segurança e Autenticação (O Modelo Desacoplado)</text:h>
      <text:p text:style-name="Text_20_body">A arquitetura define inegociavelmente o uso de um <text:span text:style-name="Strong_20_Emphasis">Modelo Desacoplado</text:span> de Segurança (Arquitetura de Identidade Canônica em Três Camadas):</text:p>
      <text:list text:style-name="L6">
        <text:list-item>
          <text:p text:style-name="P13"><text:span text:style-name="Strong_20_Emphasis">IAM (Keycloak):</text:span> Atuará <text:span text:style-name="Strong_20_Emphasis">exclusivamente na Autenticação</text:span>. Validará senhas e biometrias de terceiros, emitindo um <text:span text:style-name="Emphasis">Lightweight Access Token</text:span> (Token Leve) contendo apenas o <text:span text:style-name="Source_20_Text">sub</text:span> e destituído de permissões organizacionais. Não haverá gestão de grupos ou roles de negócio no painel do Keycloak (Regra: <text:span text:style-name="Emphasis">Import Users = Off</text:span>). </text:p>
        </text:list-item>
        <text:list-item>
          <text:p text:style-name="P13"><text:span text:style-name="Strong_20_Emphasis">Autorização (Spring Boot / Backend):</text:span> Toda a governança descrita neste RFC (Roles, Gestor Substituto, Unidades) é gerenciada internamente pela API Java. </text:p>
        </text:list-item>
        <text:list-item>
          <text:p text:style-name="P12"><text:span text:style-name="Strong_20_Emphasis"><text:span text:style-name="T18">Mecânica de Orquestração:</text:span></text:span><text:span text:style-name="Strong_20_Emphasis"><text:span text:style-name="T17"> A cada requisição, o interceptador do Spring Security (</text:span></text:span><text:span text:style-name="Strong_20_Emphasis"><text:span text:style-name="Source_20_Text"><text:span text:style-name="T18">customJwtAuthenticationConverter</text:span></text:span></text:span><text:span text:style-name="Strong_20_Emphasis"><text:span text:style-name="T17">) cruzará o </text:span></text:span><text:span text:style-name="Strong_20_Emphasis"><text:span text:style-name="Source_20_Text"><text:span text:style-name="T18">sub</text:span></text:span></text:span><text:span text:style-name="Strong_20_Emphasis"><text:span text:style-name="T17"> do Keycloak com a nossa tabela </text:span></text:span><text:span text:style-name="Strong_20_Emphasis"><text:span text:style-name="T18">seguranca.identidade_acesso</text:span></text:span><text:span text:style-name="Strong_20_Emphasis"><text:span text:style-name="T17">, localizando o CPF, buscando os papéis de negócio do usuário e instanciando um </text:span></text:span><text:span text:style-name="Strong_20_Emphasis"><text:span text:style-name="Source_20_Text"><text:span text:style-name="T18">BusinessPrincipalToken</text:span></text:span></text:span><text:span text:style-name="Strong_20_Emphasis"><text:span text:style-name="T17"> para autorizar a operação final.</text:span></text:span></text:p>
        </text:list-item>
      </text:list>
      <text:p text:style-name="P1"/>
      <text:h text:style-name="Heading_20_2" text:outline-level="2">10. Considerações Finais</text:h>
      <text:p text:style-name="Text_20_body">Este documento fundamenta a visão negocial e funcional da plataforma. Ele consolida o sistema como uma ferramenta de coordenação de ativos temporais com alto rigor de segurança.</text:p>
      <text:p text:style-name="Text_20_body">Apoiado nas RFCs 0001 à 0009, a plataforma PPP oferece flexibilidade organizacional extrema aliada a uma base tecnológica estrita, auditável, multi-tenant e perfeitamente blindada contra fraudes governamentais e vazamentos de dados regulados pela LGP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6:01:38.697887468</meta:creation-date>
    <dc:date>2026-05-08T17:56:59.451525567</dc:date>
    <meta:editing-duration>PT3M2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4" meta:paragraph-count="57" meta:word-count="1068" meta:character-count="7673" meta:non-whitespace-character-count="6664"/>
  </office:meta>
</office:document-meta>
</file>