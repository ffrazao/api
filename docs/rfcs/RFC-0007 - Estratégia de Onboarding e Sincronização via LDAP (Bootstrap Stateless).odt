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00ed0a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letter-spacing="normal" loext:padding-left="0.049cm" loext:padding-right="0cm" loext:padding-top="0cm" loext:padding-bottom="0cm" loext:border-left="0.06pt solid #37383b" loext:border-right="none" loext:border-top="none" loext:border-bottom="non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5">
      <style:text-properties style:use-window-font-color="true" loext:opacity="0%"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c7c7c7" loext:opacity="100%" style:font-name="Google Sans Text" fo:font-size="12pt" fo:letter-spacing="normal" fo:font-style="normal" fo:font-weight="normal"/>
    </style:style>
    <style:style style:name="T2" style:family="text">
      <style:text-properties fo:font-variant="normal" fo:text-transform="none" fo:color="#c7c7c7" loext:opacity="100%" fo:letter-spacing="normal"/>
    </style:style>
    <style:style style:name="T3" style:family="text">
      <style:text-properties fo:font-variant="normal" fo:text-transform="none" style:font-name="Google Sans Text" fo:font-size="12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bold"/>
    </style:style>
    <style:style style:name="T7" style:family="text">
      <style:text-properties fo:font-variant="normal" fo:text-transform="none" style:use-window-font-color="true" loext:opacity="0%" style:font-name="Google Sans Text" fo:font-size="12pt" fo:letter-spacing="normal" fo:font-style="normal" fo:font-weight="normal"/>
    </style:style>
    <style:style style:name="T8" style:family="text">
      <style:text-properties fo:font-variant="normal" fo:text-transform="none" style:use-window-font-color="true" loext:opacity="0%" fo:letter-spacing="normal"/>
    </style:style>
    <style:style style:name="T9" style:family="text">
      <style:text-properties fo:font-variant="normal" fo:text-transform="none" style:use-window-font-color="true" loext:opacity="0%" fo:font-size="12pt" fo:letter-spacing="normal" fo:font-style="normal" fo:font-weight="normal"/>
    </style:style>
    <style:style style:name="T10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style:use-window-font-color="true" loext:opacity="0%" style:font-name="Liberation Serif" fo:letter-spacing="normal"/>
    </style:style>
    <style:style style:name="T13" style:family="text">
      <style:text-properties fo:color="#c7c7c7" loext:opacity="100%" style:font-name="Google Sans Code" fo:font-weight="bold"/>
    </style:style>
    <style:style style:name="T14" style:family="text">
      <style:text-properties fo:color="#c7c7c7" loext:opacity="100%" style:font-name="Google Sans Code" fo:letter-spacing="normal" fo:font-weight="bold" loext:padding-left="0.049cm" loext:padding-right="0cm" loext:padding-top="0cm" loext:padding-bottom="0cm" loext:border-left="0.06pt solid #37383b" loext:border-right="none" loext:border-top="none" loext:border-bottom="none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letter-spacing="normal" loext:padding-left="0.049cm" loext:padding-right="0cm" loext:padding-top="0cm" loext:padding-bottom="0cm" loext:border-left="0.06pt solid #37383b" loext:border-right="none" loext:border-top="none" loext:border-bottom="none"/>
    </style:style>
    <style:style style:name="T17" style:family="text">
      <style:text-properties style:use-window-font-color="true" loext:opacity="0%" fo:letter-spacing="normal" loext:padding-left="0.049cm" loext:padding-right="0cm" loext:padding-top="0cm" loext:padding-bottom="0cm" loext:border-left="0.06pt solid #37383b" loext:border-right="none" loext:border-top="none" loext:border-bottom="none"/>
    </style:style>
    <style:style style:name="T18" style:family="text">
      <style:text-properties style:use-window-font-color="true" loext:opacity="0%" style:font-name="Google Sans Code" fo:letter-spacing="normal" fo:font-weight="bold" loext:padding-left="0.049cm" loext:padding-right="0cm" loext:padding-top="0cm" loext:padding-bottom="0cm" loext:border-left="0.06pt solid #37383b" loext:border-right="none" loext:border-top="none" loext:border-bottom="none"/>
    </style:style>
    <style:style style:name="T19" style:family="text">
      <style:text-properties fo:font-weight="bold"/>
    </style:style>
    <style:style style:name="T20" style:family="text">
      <style:text-properties style:font-name="Google Sans Code" fo:font-weight="bold"/>
    </style:style>
    <style:style style:name="T21" style:family="text">
      <style:text-properties officeooo:rsid="0001802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07</text:h>
      <text:h text:style-name="Heading_20_1" text:outline-level="1">Estratégia de Onboarding e Sincronização via LDAP (Bootstrap Stateless)</text:h>
      <text:p text:style-name="P1"><text:span text:style-name="Strong_20_Emphasis">Status:</text:span> Aprovado e Atualizado (v1.1) </text:p>
      <text:p text:style-name="P1"><text:span text:style-name="Strong_20_Emphasis">Autor:</text:span> Equipe de Arquitetura </text:p>
      <text:p text:style-name="P1"><text:span text:style-name="Strong_20_Emphasis">Data:</text:span> 07/05/2026 </text:p>
      <text:p text:style-name="P1"><text:span text:style-name="Strong_20_Emphasis">Depende de:</text:span> RFC-0001, RFC-0002, RFC-0005</text:p>
      <text:p text:style-name="Horizontal_20_Line"/>
      <text:h text:style-name="Heading_20_2" text:outline-level="2">1. Contexto e Objetivo</text:h>
      <text:p text:style-name="Text_20_body">A plataforma atende a órgãos governamentais e grandes corporações que já possuem seus próprios diretórios de usuários, como o Active Directory (AD) / LDAP. Exigir o cadastro manual de milhares de servidores e dezenas de secretarias inviabilizaria a implantação do sistema.</text:p>
      <text:p text:style-name="Text_20_body">Por outro lado, o sincronismo contínuo e bidirecional com o AD costuma engessar a evolução da plataforma, forçando regras de negócio puras (como designar um gestor substituto para o final de semana) a dependerem de lentos chamados de suporte para a equipe de infraestrutura de TI alterar grupos na rede.</text:p>
      <text:p text:style-name="Text_20_body"><text:span text:style-name="Strong_20_Emphasis">Objetivo:</text:span> Este RFC define a arquitetura de <text:span text:style-name="Strong_20_Emphasis">"Bootstrap Stateless"</text:span>, estabelecendo como a organização (Tenant) e o servidor público nascem no sistema, e como o cordão umbilical de gerenciamento estrutural com a TI é cortado após a carga inicial, garantindo agilidade operacional e segurança governamental.</text:p>
      <text:p text:style-name="Horizontal_20_Line"/>
      <text:h text:style-name="Heading_20_2" text:outline-level="2">2. A Regra do Keycloak: Autenticação Stateless</text:h>
      <text:p text:style-name="Text_20_body">Para a integração LDAP/AD configurada no Keycloak, a seguinte regra é inegociável:</text:p>
      <text:list text:style-name="L1">
        <text:list-item>
          <text:p text:style-name="P4">O parâmetro <text:span text:style-name="Strong_20_Emphasis"><text:span text:style-name="Source_20_Text">Import Users</text:span></text:span><text:span text:style-name="Strong_20_Emphasis"> ficará sempre configurado como </text:span><text:span text:style-name="Strong_20_Emphasis"><text:span text:style-name="Source_20_Text">Off</text:span></text:span>. </text:p>
        </text:list-item>
      </text:list>
      <text:p text:style-name="Text_20_body"><text:span text:style-name="Strong_20_Emphasis">Motivação Técnica e de Segurança:</text:span></text:p>
      <text:list text:style-name="L2">
        <text:list-item>
          <text:p text:style-name="P6">O LDAP atuará estritamente como um validador de senhas em tempo real. Se um servidor público for exonerado e a sua conta for desativada no AD da rede governamental, o seu acesso ao sistema de presença será <text:span text:style-name="Strong_20_Emphasis">cortado no exato milissegundo</text:span>, sem depender de rotinas de sincronização agendadas (CRON jobs). </text:p>
        </text:list-item>
        <text:list-item>
          <text:p text:style-name="P5">Como os usuários não são importados para o banco interno do Keycloak, evitamos que o IAM tente sobrescrever as configurações e papéis (roles) locais da nossa plataforma a cada login. </text:p>
        </text:list-item>
      </text:list>
      <text:p text:style-name="Horizontal_20_Line"/>
      <text:h text:style-name="Heading_20_2" text:outline-level="2"><text:soft-page-break/>3. O Processo de Bootstrap (Carga Inicial Organizacional)</text:h>
      <text:p text:style-name="Text_20_body">A leitura da árvore do AD não será usada para sincronização contínua de permissões, mas sim como uma "fotografia inicial" (Bootstrap) para poupar trabalho na implantação.</text:p>
      <text:h text:style-name="Heading_20_3" text:outline-level="3">3.1 Mapeamento de Unidades e Vínculos</text:h>
      <text:p text:style-name="Text_20_body">No momento da criação do Tenant (Organização) na plataforma, um script de inicialização fará a leitura da árvore do AD (ex: <text:span text:style-name="Source_20_Text">OU=UNIDADES,DC=governo,DC=gdfnet,DC=df</text:span>).</text:p>
      <text:list text:style-name="L3">
        <text:list-item>
          <text:p text:style-name="P8">As pastas/departamentos do AD serão traduzidos fisicamente para registros na tabela <text:span text:style-name="Strong_20_Emphasis"><text:span text:style-name="Source_20_Text">folha_ponto.unidade</text:span></text:span>. </text:p>
        </text:list-item>
        <text:list-item>
          <text:p text:style-name="P7">Os usuários contidos nestas pastas terão seus acessos traduzidos para a tabela <text:span text:style-name="Strong_20_Emphasis"><text:span text:style-name="Source_20_Text">folha_ponto.vinculo_usuario</text:span></text:span>, nascendo com o papel básico de <text:span text:style-name="Source_20_Text">PARTICIPANTE</text:span> atrelado à organização. </text:p>
        </text:list-item>
      </text:list>
      <text:p text:style-name="Horizontal_20_Line"/>
      <text:h text:style-name="Heading_20_2" text:outline-level="2">4. Interceptação do Primeiro Login (Onboarding Seguro)</text:h>
      <text:p text:style-name="Text_20_body">Saber em qual unidade o servidor trabalha não resolve o problema de segurança central: garantir que a matrícula de rede que está fazendo login pertence ao CPF correto.</text:p>
      <text:p text:style-name="Text_20_body">Quando o servidor logar via LDAP pela primeira vez, o Keycloak gerará um identificador técnico (<text:span text:style-name="Source_20_Text">sub</text:span>) inédito. A arquitetura de segurança atuará da seguinte forma:</text:p>
      <text:list text:style-name="L4">
        <text:list-item>
          <text:p text:style-name="P10"><text:span text:style-name="Strong_20_Emphasis">Pausa e Redirecionamento (Custom SPI):</text:span> O Keycloak, através do <text:span text:style-name="Source_20_Text">Custom Authenticator SPI</text:span>, notará que o <text:span text:style-name="Source_20_Text">sub</text:span> do LDAP não possui um CPF atrelado. O login é pausado, um <text:span text:style-name="Strong_20_Emphasis">Action Token</text:span> é emitido, e o servidor é redirecionado para a aplicação React. </text:p>
        </text:list-item>
        <text:list-item>
          <text:p text:style-name="P10"><text:span text:style-name="Strong_20_Emphasis">Validação 2x2 Governamental:</text:span> No React, o servidor informa o seu CPF, aciona a câmera e captura uma selfie. O Spring Boot recebe os dados e faz o cruzamento contra as bases governamentais de fé pública (Serpro / Datavalid). </text:p>
        </text:list-item>
        <text:list-item>
          <text:p text:style-name="P10"><text:span text:style-name="Strong_20_Emphasis"><text:span text:style-name="T11">Retenção Efêmera e Expurgo</text:span></text:span><text:span text:style-name="Strong_20_Emphasis"><text:span text:style-name="T10">:</text:span></text:span><text:span text:style-name="Strong_20_Emphasis"><text:span text:style-name="T12"> </text:span></text:span><text:span text:style-name="Strong_20_Emphasis"><text:span text:style-name="T10">A imagem da face é utilizada para a extração do Hash Biométrico e, em seguida, armazenada temporariamente em uma quarentena visual (Storage S3) estritamente para fins de auditoria. Essa mídia será objeto de expurgo automatizado (hard delete)</text:span></text:span><text:span text:style-name="Strong_20_Emphasis"><text:span text:style-name="T12"> </text:span></text:span><text:span text:style-name="Strong_20_Emphasis"><text:span text:style-name="T10">após o período configurado, em estrita conformidade com a LGPD.</text:span></text:span></text:p>
        </text:list-item>
        <text:list-item>
          <text:p text:style-name="P9"><text:span text:style-name="Strong_20_Emphasis">Retomada:</text:span> Com a validação biográfica e biométrica aprovada, o React devolve o servidor ao Keycloak, que consome o Action Token e emite o <text:span text:style-name="Emphasis">Lightweight Access Token</text:span> definitivo. </text:p>
        </text:list-item>
      </text:list>
      <text:p text:style-name="Horizontal_20_Line"/>
      <text:h text:style-name="Heading_20_2" text:outline-level="2">5. O Vínculo da Matrícula LDAP com a Identidade Canônica</text:h>
      <text:p text:style-name="Text_20_body">É neste momento que a integração técnica se converte em domínio de negócio.</text:p>
      <text:p text:style-name="P2"><text:span text:style-name="T16">A</text:span><text:span text:style-name="T17">pós a aprovação do Serpro, o backend registrará o </text:span><text:span text:style-name="Source_20_Text"><text:span text:style-name="T18">sub</text:span></text:span><text:span text:style-name="T17"> proveniente do LDAP e o atrelará ao ID do CPF na tabela central </text:span><text:span text:style-name="T18">seguranca.identidade_acesso</text:span><text:span text:style-name="T17">.</text:span></text:p>
      <text:p text:style-name="P3"><text:span text:style-name="T19">O Benefício Resiliente:</text:span> Isso significa que a integração LDAP é apenas um vetor temporário de acesso. O sistema reconhece a "Pessoa Física X". Se amanhã o órgão mudar do Active Directory para o Google Workspace, o servidor logará pelo Google, informará o CPF, validará a face e o <text:soft-page-break/>sistema apenas adicionará o "novo sub do Google" à mesma tabela <text:span text:style-name="T20">seguranca.identidade_acesso</text:span>. O histórico de folha de ponto do servidor jamais será perdido perante mudanças de infraestrutura de TI.</text:p>
      <text:p text:style-name="Text_20_body"/>
      <text:p text:style-name="Horizontal_20_Line"/>
      <text:h text:style-name="Heading_20_2" text:outline-level="2">6. Gestão Contínua e Desacoplamento da TI</text:h>
      <text:p text:style-name="Text_20_body">O aspecto mais revolucionário da abordagem <text:span text:style-name="Emphasis">Bootstrap</text:span> é a liberdade operacional transferida para o negócio (RH / Gestão de Pessoas):</text:p>
      <text:list text:style-name="L5">
        <text:list-item>
          <text:p text:style-name="P11">Após a importação inicial (passo 3), qualquer modificação na estrutura de setores, criação de novas unidades ou identificação de um Gestor Titular passam a ser feitas <text:span text:style-name="Strong_20_Emphasis">exclusivamente no banco de dados da plataforma (PostgreSQL)</text:span>. </text:p>
        </text:list-item>
        <text:list-item>
          <text:p text:style-name="P11">Se um Gestor sai de férias e precisa nomear um "Gestor Substituto", ele não precisará abrir <text:span text:style-name="T15">um chamado (ticket) para o Administrador de Redes alterar os grupos do Active Directory. </text:span></text:p>
        </text:list-item>
        <text:list-item>
          <text:p text:style-name="P14"><text:span text:style-name="T5">Essa designação ocorrerá nativamente na nossa interface de aplicação, utilizando as tabelas do motor PBAC/ReBAC (</text:span><text:span text:style-name="T6">seguranca.excecao_permissao_usuario</text:span><text:span text:style-name="T5"> e </text:span><text:span text:style-name="T6">seguranca.relacionamento</text:span><text:span text:style-name="T5">), garantindo delegações temporárias precisas com data de início e fim.</text:span></text:p>
        </text:list-item>
      </text:list>
      <text:p text:style-name="Horizontal_20_Line"/>
      <text:h text:style-name="Heading_20_2" text:outline-level="2">7. Resumo de Orquestração do LDAP</text:h>
      <text:list text:style-name="L6">
        <text:list-item>
          <text:p text:style-name="P13"><text:span text:style-name="Strong_20_Emphasis">Criação do Tenant:</text:span> Lê o AD ➔ Popula <text:span text:style-name="Source_20_Text">folha_ponto.unidade</text:span> e <text:span text:style-name="Source_20_Text">folha_ponto.vinculo_usuario</text:span>. </text:p>
        </text:list-item>
        <text:list-item>
          <text:p text:style-name="P13"><text:span text:style-name="Strong_20_Emphasis">Autenticação:</text:span> Valida credencial contra o AD (Stateless). </text:p>
        </text:list-item>
        <text:list-item>
          <text:p text:style-name="P13"><text:span text:style-name="Strong_20_Emphasis">Onboarding Inicial:</text:span> Pausa o login ➔ SPA React ➔ Validação 2x2 de CPF e Face (Serpro) ➔ Popula <text:span text:style-name="T21">seguranca</text:span><text:span text:style-name="Source_20_Text">.identidade_acesso</text:span>. </text:p>
        </text:list-item>
        <text:list-item>
          <text:p text:style-name="P12"><text:span text:style-name="Strong_20_Emphasis">Governança:</text:span> A partir do dia 1, toda estruturação, delegação e hierarquia de acesso ocorrem no motor local do Spring Boot, blindado de intervenções do setor de infraestrutura da rede. </text:p>
        </text:list-item>
      </text:list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7:49:09.020333629</dc:date>
    <meta:editing-duration>PT4M4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43" meta:word-count="923" meta:character-count="5958" meta:non-whitespace-character-count="5077"/>
  </office:meta>
</office:document-meta>
</file>